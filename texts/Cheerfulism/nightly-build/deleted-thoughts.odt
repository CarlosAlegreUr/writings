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70000007046429609FD40C839.png" manifest:media-type="image/png"/>
  <manifest:file-entry manifest:full-path="Pictures/10000001000001E30000004D651DD5093DD00D98.png" manifest:media-type="image/png"/>
  <manifest:file-entry manifest:full-path="Pictures/100000010000019400000057C8456BCE2D2E7849.png" manifest:media-type="image/png"/>
  <manifest:file-entry manifest:full-path="Pictures/10000001000001E40000005120AF2C283271E425.png" manifest:media-type="image/png"/>
  <manifest:file-entry manifest:full-path="Pictures/100000010000012A00000041E5362E858C8CBB3B.png" manifest:media-type="image/png"/>
  <manifest:file-entry manifest:full-path="Pictures/100000010000009100000035325FCC03EB92ED1C.png" manifest:media-type="image/png"/>
  <manifest:file-entry manifest:full-path="Pictures/100000010000045C0000032497B88218710C9C73.png" manifest:media-type="image/png"/>
  <manifest:file-entry manifest:full-path="Pictures/100000010000060A00000202A99732DE2CE8FB07.png" manifest:media-type="image/png"/>
  <manifest:file-entry manifest:full-path="Pictures/100000010000034A000002C75D09D855509DCC89.png" manifest:media-type="image/png"/>
  <manifest:file-entry manifest:full-path="Pictures/1000000100000331000002177A1969E20049E395.png" manifest:media-type="image/png"/>
  <manifest:file-entry manifest:full-path="Pictures/100000010000034C000002E216A777335FCEBC0C.png" manifest:media-type="image/png"/>
  <manifest:file-entry manifest:full-path="Pictures/10000001000003A900000248200C373DDA7DFD1C.png" manifest:media-type="image/png"/>
  <manifest:file-entry manifest:full-path="Pictures/10000001000001DA000001D826270E40ABCE11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859f38" officeooo:paragraph-rsid="0016a03e" fo:background-color="transparent" style:font-size-asian="10pt" style:font-style-asian="normal" style:font-weight-asian="normal" style:font-size-complex="10pt" style:font-style-complex="normal" style:font-weight-complex="normal"/>
    </style:style>
    <style:style style:name="P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867c46" officeooo:paragraph-rsid="0016a03e" fo:background-color="transparent" style:font-size-asian="10pt" style:font-style-asian="normal" style:font-weight-asian="normal" style:font-size-complex="10pt" style:font-style-complex="normal" style:font-weight-complex="normal"/>
    </style:style>
    <style:style style:name="P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79d300" officeooo:paragraph-rsid="0016a03e" fo:background-color="transparent" style:font-size-asian="10pt" style:font-style-asian="normal" style:font-weight-asian="normal" style:font-size-complex="10pt" style:font-style-complex="normal" style:font-weight-complex="normal"/>
    </style:style>
    <style:style style:name="P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87814b" officeooo:paragraph-rsid="0016a03e"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8e826b" officeooo:paragraph-rsid="0016a03e"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8f0b9b" officeooo:paragraph-rsid="0016a03e"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94c838" officeooo:paragraph-rsid="0016a03e" fo:background-color="transparent"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a863c0" officeooo:paragraph-rsid="0016a03e" fo:background-color="transparent" style:font-size-asian="10pt" style:font-style-asian="normal" style:font-weight-asian="normal" style:font-size-complex="10pt" style:font-style-complex="normal" style:font-weight-complex="normal"/>
    </style:style>
    <style:style style:name="P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a9719a" officeooo:paragraph-rsid="0016a03e" fo:background-color="transparent"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a9d420" officeooo:paragraph-rsid="0016a03e" fo:background-color="transparent"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b08489" officeooo:paragraph-rsid="0016a03e" fo:background-color="transparent"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b3a803" officeooo:paragraph-rsid="0016a03e" fo:background-color="transparent"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b87ea5" officeooo:paragraph-rsid="0016a03e" fo:background-color="transparent"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bad5af" officeooo:paragraph-rsid="0016a03e" fo:background-color="transparent"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bdb3bb" officeooo:paragraph-rsid="0016a03e"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bf094b" officeooo:paragraph-rsid="0016a03e"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bf47e2" officeooo:paragraph-rsid="0016a03e"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c10546" officeooo:paragraph-rsid="0016a03e"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c14aaa" officeooo:paragraph-rsid="0016a03e" fo:background-color="transparent"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c2485a" officeooo:paragraph-rsid="0016a03e" fo:background-color="transparent"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c54095" officeooo:paragraph-rsid="0016a03e" fo:background-color="transparent"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c55984" officeooo:paragraph-rsid="0016a03e" fo:background-color="transparent"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c65a61" officeooo:paragraph-rsid="0016a03e" fo:background-color="transparent"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db7bd8" officeooo:paragraph-rsid="0016a03e"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d212ed" officeooo:paragraph-rsid="0016a03e" fo:background-color="transparent"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cfebcf" officeooo:paragraph-rsid="0016a03e" fo:background-color="transparent"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dd37ee" officeooo:paragraph-rsid="0016a03e"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df630b" officeooo:paragraph-rsid="0016a03e" fo:background-color="transparent"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e125ce" officeooo:paragraph-rsid="0016a03e" fo:background-color="transparent"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f6732c" officeooo:paragraph-rsid="0016a03e"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e2a708" officeooo:paragraph-rsid="0016a03e"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e4fefc" officeooo:paragraph-rsid="0016a03e"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f814cc" officeooo:paragraph-rsid="0016a03e"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e50d32" officeooo:paragraph-rsid="0016a03e" fo:background-color="transparent"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e9276b" officeooo:paragraph-rsid="0016a03e" fo:background-color="transparent"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fa0ed4" officeooo:paragraph-rsid="0016a03e" fo:background-color="transparent"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fe2ecb" officeooo:paragraph-rsid="0016a03e" fo:background-color="transparent"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eb7990" officeooo:paragraph-rsid="0016a03e"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71820d" officeooo:paragraph-rsid="0016a03e"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595f63" officeooo:paragraph-rsid="0016a03e"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9057418" officeooo:paragraph-rsid="0016a03e"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748003" officeooo:paragraph-rsid="0016a03e"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8784aa7" officeooo:paragraph-rsid="0016a03e"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907086b" officeooo:paragraph-rsid="0016a03e"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123eb7" officeooo:paragraph-rsid="0016a03e"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88204" officeooo:paragraph-rsid="0016a03e"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a6a27f" officeooo:paragraph-rsid="0016a03e" fo:background-color="transparent"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0e30d" officeooo:paragraph-rsid="0016a03e"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3c900" officeooo:paragraph-rsid="0016a03e" fo:background-color="transparent"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a79887" officeooo:paragraph-rsid="0016a03e" fo:background-color="transparent"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2fa1993" officeooo:paragraph-rsid="0016a03e"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0cacb6" officeooo:paragraph-rsid="0016a03e" fo:background-color="transparent"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e989f6" officeooo:paragraph-rsid="0016a03e"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3b037" officeooo:paragraph-rsid="0016a03e"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ef46615" officeooo:paragraph-rsid="0016a03e"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41188" officeooo:paragraph-rsid="0016a03e"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8ffa5d" officeooo:paragraph-rsid="0016a03e"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917dde" officeooo:paragraph-rsid="0016a03e"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2879c1" officeooo:paragraph-rsid="0016a03e"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2ed36f2b" officeooo:paragraph-rsid="0016a03e"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7272fe2" officeooo:paragraph-rsid="0016a03e"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47357174" officeooo:paragraph-rsid="0016a03e" fo:background-color="transparent"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39fde288" officeooo:paragraph-rsid="0016a03e"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016a03e"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eb2e34" officeooo:paragraph-rsid="0016a03e"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ef7db4" officeooo:paragraph-rsid="0016a03e"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4c695b" officeooo:paragraph-rsid="0016a03e" fo:background-color="transparent"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477bff" officeooo:paragraph-rsid="0016a03e"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27f25de" officeooo:paragraph-rsid="0016a03e"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9d7a94" officeooo:paragraph-rsid="0016a03e"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6356c6" officeooo:paragraph-rsid="0016a03e" fo:background-color="transparent"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68510c" officeooo:paragraph-rsid="0016a03e"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6a2521" officeooo:paragraph-rsid="0016a03e"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72fd09" officeooo:paragraph-rsid="0016a03e" fo:background-color="transparent"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6c5af2" officeooo:paragraph-rsid="0016a03e" fo:background-color="transparent"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3104a5" officeooo:paragraph-rsid="0016a03e"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33689e" officeooo:paragraph-rsid="0016a03e"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370d10" officeooo:paragraph-rsid="0016a03e"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899c0c" officeooo:paragraph-rsid="0017e444"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fbe77e3" officeooo:paragraph-rsid="0017e444"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54806f" officeooo:paragraph-rsid="0016a03e"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589931" officeooo:paragraph-rsid="0016a03e"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5594fc" officeooo:paragraph-rsid="0016a03e"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399a45" officeooo:paragraph-rsid="0016a03e"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7c0b56" officeooo:paragraph-rsid="0016a03e"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5918e3" officeooo:paragraph-rsid="0016a03e"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8645fa" officeooo:paragraph-rsid="0016a03e"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83cb7a" officeooo:paragraph-rsid="0016a03e"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855b5b" officeooo:paragraph-rsid="0016a03e"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8eb3a3" officeooo:paragraph-rsid="0016a03e" style:font-size-asian="10pt" style:font-style-asian="normal" style:font-weight-asian="normal" style:font-size-complex="10pt" style:font-style-complex="normal" style:font-weight-complex="normal"/>
    </style:style>
    <style:style style:name="P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0016a03e"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8d7e78" officeooo:paragraph-rsid="0016a03e" style:font-size-asian="10pt" style:font-style-asian="normal" style:font-weight-asian="normal" style:font-size-complex="10pt" style:font-style-complex="normal" style:font-weight-complex="normal"/>
    </style:style>
    <style:style style:name="P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28084e" officeooo:paragraph-rsid="0016a03e"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f3aa1f" officeooo:paragraph-rsid="0016a03e" style:font-size-asian="10pt" style:font-style-asian="normal" style:font-weight-asian="normal" style:font-size-complex="10pt" style:font-style-complex="normal" style:font-weight-complex="normal"/>
    </style:style>
    <style:style style:name="P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016a03e" style:font-size-asian="10pt" style:font-style-asian="normal" style:font-weight-asian="normal" style:font-size-complex="10pt" style:font-style-complex="normal" style:font-weight-complex="normal"/>
    </style:style>
    <style:style style:name="P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2ff942b" officeooo:paragraph-rsid="0016a03e"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979d24" officeooo:paragraph-rsid="0016a03e"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046fb4" officeooo:paragraph-rsid="0016a03e"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cc5faa" officeooo:paragraph-rsid="0016a03e"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cd06c9" officeooo:paragraph-rsid="0016a03e" style:font-size-asian="10pt" style:font-style-asian="normal" style:font-weight-asian="normal" style:font-size-complex="10pt" style:font-style-complex="normal" style:font-weight-complex="normal"/>
    </style:style>
    <style:style style:name="P1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0016a03e" style:font-size-asian="10pt" style:font-style-asian="normal" style:font-weight-asian="normal" style:font-size-complex="10pt" style:font-style-complex="normal" style:font-weight-complex="normal"/>
    </style:style>
    <style:style style:name="P1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d65579" officeooo:paragraph-rsid="0016a03e" style:font-size-asian="10pt" style:font-style-asian="normal" style:font-weight-asian="normal" style:font-size-complex="10pt" style:font-style-complex="normal" style:font-weight-complex="normal"/>
    </style:style>
    <style:style style:name="P1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9d7ede" officeooo:paragraph-rsid="0016a03e"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d80374" officeooo:paragraph-rsid="0016a03e" style:font-size-asian="10pt" style:font-style-asian="normal" style:font-weight-asian="normal" style:font-size-complex="10pt" style:font-style-complex="normal" style:font-weight-complex="normal"/>
    </style:style>
    <style:style style:name="P1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227d6" officeooo:paragraph-rsid="0016a03e"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b2cdd0" officeooo:paragraph-rsid="0016a03e"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2007a9" officeooo:paragraph-rsid="0016a03e" style:font-size-asian="10pt" style:font-style-asian="normal" style:font-weight-asian="normal" style:font-size-complex="10pt" style:font-style-complex="normal" style:font-weight-complex="normal"/>
    </style:style>
    <style:style style:name="P1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2c44304" officeooo:paragraph-rsid="0016a03e"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e1820" officeooo:paragraph-rsid="0016a03e" style:font-size-asian="10pt" style:font-style-asian="normal" style:font-weight-asian="normal" style:font-size-complex="10pt" style:font-style-complex="normal" style:font-weight-complex="normal"/>
    </style:style>
    <style:style style:name="P1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7bb0d0" officeooo:paragraph-rsid="0016a03e" style:font-size-asian="10pt" style:font-style-asian="normal" style:font-weight-asian="normal" style:font-size-complex="10pt" style:font-style-complex="normal" style:font-weight-complex="normal"/>
    </style:style>
    <style:style style:name="P1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c3ed65" officeooo:paragraph-rsid="0016a03e" style:font-size-asian="10pt" style:font-style-asian="normal" style:font-weight-asian="normal" style:font-size-complex="10pt" style:font-style-complex="normal" style:font-weight-complex="normal"/>
    </style:style>
    <style:style style:name="P1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b9ad96" officeooo:paragraph-rsid="0016a03e" style:font-size-asian="10pt" style:font-style-asian="normal" style:font-weight-asian="normal" style:font-size-complex="10pt" style:font-style-complex="normal" style:font-weight-complex="normal"/>
    </style:style>
    <style:style style:name="P1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809734" officeooo:paragraph-rsid="0016a03e" style:font-size-asian="10pt" style:font-style-asian="normal" style:font-weight-asian="normal" style:font-size-complex="10pt" style:font-style-complex="normal" style:font-weight-complex="normal"/>
    </style:style>
    <style:style style:name="P1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3ac34f" officeooo:paragraph-rsid="0016a03e"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3dadd2" officeooo:paragraph-rsid="0016a03e" style:font-size-asian="10pt" style:font-style-asian="normal" style:font-weight-asian="normal" style:font-size-complex="10pt" style:font-style-complex="normal" style:font-weight-complex="normal"/>
    </style:style>
    <style:style style:name="P1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40bc99" officeooo:paragraph-rsid="0016a03e" style:font-size-asian="10pt" style:font-style-asian="normal" style:font-weight-asian="normal" style:font-size-complex="10pt" style:font-style-complex="normal" style:font-weight-complex="normal"/>
    </style:style>
    <style:style style:name="P1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cc4cf5" officeooo:paragraph-rsid="0016a03e" style:font-size-asian="10pt" style:font-style-asian="normal" style:font-weight-asian="normal" style:font-size-complex="10pt" style:font-style-complex="normal" style:font-weight-complex="normal"/>
    </style:style>
    <style:style style:name="P1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d06444" officeooo:paragraph-rsid="0016a03e" style:font-size-asian="10pt" style:font-style-asian="normal" style:font-weight-asian="normal" style:font-size-complex="10pt" style:font-style-complex="normal" style:font-weight-complex="normal"/>
    </style:style>
    <style:style style:name="P1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845d01" officeooo:paragraph-rsid="0016a03e" style:font-size-asian="10pt" style:font-style-asian="normal" style:font-weight-asian="normal" style:font-size-complex="10pt" style:font-style-complex="normal" style:font-weight-complex="normal"/>
    </style:style>
    <style:style style:name="P1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c7ffa3" officeooo:paragraph-rsid="0016a03e" style:font-size-asian="10pt" style:font-style-asian="normal" style:font-weight-asian="normal" style:font-size-complex="10pt" style:font-style-complex="normal" style:font-weight-complex="normal"/>
    </style:style>
    <style:style style:name="P1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86e39a" officeooo:paragraph-rsid="0016a03e"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8ae40b" officeooo:paragraph-rsid="0016a03e"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caadf6" officeooo:paragraph-rsid="0016a03e"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8d4803" officeooo:paragraph-rsid="0016a03e"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4f2d4a" officeooo:paragraph-rsid="0016a03e"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7db802" officeooo:paragraph-rsid="0016a03e"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808f22" officeooo:paragraph-rsid="0016a03e"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d1d16a" officeooo:paragraph-rsid="0016a03e"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dafe66" officeooo:paragraph-rsid="0016a03e"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e14156" officeooo:paragraph-rsid="0016a03e"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80b0ea" officeooo:paragraph-rsid="0016a03e"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e366b4" officeooo:paragraph-rsid="0016a03e"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e57b95" officeooo:paragraph-rsid="0016a03e"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a0b0c2" officeooo:paragraph-rsid="0016a03e"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605601" officeooo:paragraph-rsid="0016a03e"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8d0b85" officeooo:paragraph-rsid="0016a03e"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64e19d" officeooo:paragraph-rsid="0016a03e"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8fc09f" officeooo:paragraph-rsid="0016a03e" style:font-size-asian="10pt" style:font-style-asian="normal" style:font-weight-asian="normal" style:font-size-complex="10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9404d2" officeooo:paragraph-rsid="0016a03e"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a68c1d8" officeooo:paragraph-rsid="0016a03e" style:font-size-asian="10pt" style:font-style-asian="normal" style:font-weight-asian="normal" style:font-size-complex="10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94172d" officeooo:paragraph-rsid="0016a03e" style:font-size-asian="10pt" style:font-style-asian="normal" style:font-weight-asian="normal" style:font-size-complex="10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1966dc" officeooo:paragraph-rsid="0016a03e" style:font-size-asian="10pt" style:font-style-asian="normal" style:font-weight-asian="normal" style:font-size-complex="10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cc3e7f" officeooo:paragraph-rsid="0016a03e" style:font-size-asian="10pt" style:font-style-asian="normal" style:font-weight-asian="normal" style:font-size-complex="10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3d1f194" officeooo:paragraph-rsid="0016a03e" style:font-size-asian="10pt" style:font-style-asian="normal" style:font-weight-asian="normal" style:font-size-complex="10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99decf" officeooo:paragraph-rsid="0016a03e" style:font-size-asian="10pt" style:font-style-asian="normal" style:font-weight-asian="normal" style:font-size-complex="10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a6eb4c" officeooo:paragraph-rsid="0016a03e" style:font-size-asian="10pt" style:font-style-asian="normal" style:font-weight-asian="normal" style:font-size-complex="10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8f0981" officeooo:paragraph-rsid="0016a03e"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942767" officeooo:paragraph-rsid="0016a03e" style:font-size-asian="10pt" style:font-style-asian="normal" style:font-weight-asian="normal" style:font-size-complex="10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b1785e" officeooo:paragraph-rsid="0016a03e" style:font-size-asian="10pt" style:font-style-asian="normal" style:font-weight-asian="normal" style:font-size-complex="10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a24763" officeooo:paragraph-rsid="0016a03e" style:font-size-asian="10pt" style:font-style-asian="normal" style:font-weight-asian="normal" style:font-size-complex="10pt" style:font-style-complex="normal" style:font-weight-complex="normal"/>
    </style:style>
    <style:style style:name="P1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a3411e" officeooo:paragraph-rsid="0016a03e" style:font-size-asian="10pt" style:font-style-asian="normal" style:font-weight-asian="normal" style:font-size-complex="10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a6dd27" officeooo:paragraph-rsid="0016a03e" style:font-size-asian="10pt" style:font-style-asian="normal" style:font-weight-asian="normal" style:font-size-complex="10pt" style:font-style-complex="normal" style:font-weight-complex="normal"/>
    </style:style>
    <style:style style:name="P1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2a8ad02" officeooo:paragraph-rsid="0016a03e" style:font-size-asian="10pt" style:font-style-asian="normal" style:font-weight-asian="normal" style:font-size-complex="10pt" style:font-style-complex="normal" style:font-weight-complex="normal"/>
    </style:style>
    <style:style style:name="P1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06972c" officeooo:paragraph-rsid="0016a03e" style:font-size-asian="10pt" style:font-style-asian="normal" style:font-weight-asian="normal" style:font-size-complex="10pt" style:font-style-complex="normal" style:font-weight-complex="normal"/>
    </style:style>
    <style:style style:name="P1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ed8542" officeooo:paragraph-rsid="0016a03e" style:font-size-asian="10pt" style:font-style-asian="normal" style:font-weight-asian="normal" style:font-size-complex="10pt" style:font-style-complex="normal" style:font-weight-complex="normal"/>
    </style:style>
    <style:style style:name="P1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ee3cf8" officeooo:paragraph-rsid="0016a03e"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2eccac" officeooo:paragraph-rsid="0016a03e"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ed36f2b" officeooo:paragraph-rsid="0016a03e"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2ed36f2b" officeooo:paragraph-rsid="0016a03e"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2f324e49" officeooo:paragraph-rsid="0016a03e"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3b037" officeooo:paragraph-rsid="0016a03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90f4c" officeooo:paragraph-rsid="0016a03e"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63eab8" officeooo:paragraph-rsid="0016a03e"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84f5c" officeooo:paragraph-rsid="0016a03e"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2f384f5c" officeooo:paragraph-rsid="0016a03e" style:font-size-asian="10pt" style:font-style-asian="normal" style:font-weight-asian="normal" style:font-size-complex="10pt" style:font-style-complex="normal" style:font-weight-complex="normal"/>
    </style:style>
    <style:style style:name="P166"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2f384f5c" officeooo:paragraph-rsid="0016a03e" style:font-size-asian="10pt" style:font-style-asian="normal" style:font-weight-asian="normal" style:font-size-complex="10pt" style:font-style-complex="normal" style:font-weight-complex="normal"/>
    </style:style>
    <style:style style:name="P1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c1035" officeooo:paragraph-rsid="0016a03e" style:font-size-asian="10pt" style:font-style-asian="normal" style:font-weight-asian="normal" style:font-size-complex="10pt" style:font-style-complex="normal" style:font-weight-complex="normal"/>
    </style:style>
    <style:style style:name="P1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94d37" officeooo:paragraph-rsid="0016a03e" style:font-size-asian="10pt" style:font-style-asian="normal" style:font-weight-asian="normal" style:font-size-complex="10pt" style:font-style-complex="normal" style:font-weight-complex="normal"/>
    </style:style>
    <style:style style:name="P1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f10a9" officeooo:paragraph-rsid="0016a03e" style:font-size-asian="10pt" style:font-style-asian="normal" style:font-weight-asian="normal" style:font-size-complex="10pt" style:font-style-complex="normal" style:font-weight-complex="normal"/>
    </style:style>
    <style:style style:name="P1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434d33" officeooo:paragraph-rsid="0016a03e" style:font-size-asian="10pt" style:font-style-asian="normal" style:font-weight-asian="normal" style:font-size-complex="10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453839" officeooo:paragraph-rsid="0016a03e" style:font-size-asian="10pt" style:font-style-asian="normal" style:font-weight-asian="normal" style:font-size-complex="10pt" style:font-style-complex="normal" style:font-weight-complex="normal"/>
    </style:style>
    <style:style style:name="P172"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2f453839" officeooo:paragraph-rsid="0016a03e"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47224eff" officeooo:paragraph-rsid="0016a03e" style:font-size-asian="10pt" style:font-style-asian="normal" style:font-weight-asian="normal" style:font-size-complex="10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46efcd" officeooo:paragraph-rsid="0016a03e" style:font-size-asian="10pt" style:font-style-asian="normal" style:font-weight-asian="normal" style:font-size-complex="10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476fb1" officeooo:paragraph-rsid="0016a03e" style:font-size-asian="10pt" style:font-style-asian="normal" style:font-weight-asian="normal" style:font-size-complex="10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2f476fb1" officeooo:paragraph-rsid="0016a03e" style:font-size-asian="10pt" style:font-style-asian="normal" style:font-weight-asian="normal" style:font-size-complex="10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9fdeea" officeooo:paragraph-rsid="0016a03e" style:font-size-asian="10pt" style:font-style-asian="normal" style:font-weight-asian="normal" style:font-size-complex="10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3accef" officeooo:paragraph-rsid="0016a03e" style:font-size-asian="10pt" style:font-style-asian="normal" style:font-weight-asian="normal" style:font-size-complex="10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2f4c1c41" officeooo:paragraph-rsid="0016a03e" style:font-size-asian="10pt" style:font-style-asian="normal" style:font-weight-asian="normal" style:font-size-complex="10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2f4ee1e7" officeooo:paragraph-rsid="0016a03e" style:font-size-asian="10pt" style:font-style-asian="normal" style:font-weight-asian="normal" style:font-size-complex="10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39d52132" officeooo:paragraph-rsid="0016a03e" style:font-size-asian="10pt" style:font-style-asian="normal" style:font-weight-asian="normal" style:font-size-complex="10pt" style:font-style-complex="normal" style:font-weight-complex="normal"/>
    </style:style>
    <style:style style:name="P182"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39d5545c" officeooo:paragraph-rsid="0016a03e" style:font-size-asian="10pt" style:font-style-asian="normal" style:font-weight-asian="normal" style:font-size-complex="10pt" style:font-style-complex="normal" style:font-weight-complex="normal"/>
    </style:style>
    <style:style style:name="P18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39d70808" officeooo:paragraph-rsid="0016a03e"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d8f6f8" officeooo:paragraph-rsid="0016a03e"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dd1aea" officeooo:paragraph-rsid="0016a03e" style:font-size-asian="10pt" style:font-style-asian="normal" style:font-weight-asian="normal" style:font-size-complex="10pt" style:font-style-complex="normal" style:font-weight-complex="normal"/>
    </style:style>
    <style:style style:name="P1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fafef0" officeooo:paragraph-rsid="0016a03e" style:font-size-asian="10pt" style:font-style-asian="normal" style:font-weight-asian="normal" style:font-size-complex="10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e2b5ca" officeooo:paragraph-rsid="0016a03e" style:font-size-asian="10pt" style:font-style-asian="normal" style:font-weight-asian="normal" style:font-size-complex="10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507eb2" officeooo:paragraph-rsid="0016a03e" style:font-size-asian="10pt" style:font-style-asian="normal" style:font-weight-asian="normal" style:font-size-complex="10pt" style:font-style-complex="normal" style:font-weight-complex="normal"/>
    </style:style>
    <style:style style:name="P1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f3eedb" officeooo:paragraph-rsid="0016a03e" style:font-size-asian="10pt" style:font-style-asian="normal" style:font-weight-asian="normal" style:font-size-complex="10pt" style:font-style-complex="normal" style:font-weight-complex="normal"/>
    </style:style>
    <style:style style:name="P1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39f6de00" officeooo:paragraph-rsid="0016a03e" style:font-size-asian="10pt" style:font-style-asian="normal" style:font-weight-asian="normal" style:font-size-complex="10pt" style:font-style-complex="normal" style:font-weight-complex="normal"/>
    </style:style>
    <style:style style:name="P1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517d9d" officeooo:paragraph-rsid="0016a03e" style:font-size-asian="10pt" style:font-style-asian="normal" style:font-weight-asian="normal" style:font-size-complex="10pt" style:font-style-complex="normal" style:font-weight-complex="normal"/>
    </style:style>
    <style:style style:name="P1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f52c324" officeooo:paragraph-rsid="0016a03e" style:font-size-asian="10pt" style:font-style-asian="normal" style:font-weight-asian="normal" style:font-size-complex="10pt" style:font-style-complex="normal" style:font-weight-complex="normal"/>
    </style:style>
    <style:style style:name="P1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db111d3" officeooo:paragraph-rsid="0016a03e" style:font-size-asian="10pt" style:font-style-asian="normal" style:font-weight-asian="normal" style:font-size-complex="10pt" style:font-style-complex="normal" style:font-weight-complex="normal"/>
    </style:style>
    <style:style style:name="P1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202322" officeooo:paragraph-rsid="0016a03e" style:font-size-asian="10pt" style:font-style-asian="normal" style:font-weight-asian="normal" style:font-size-complex="10pt" style:font-style-complex="normal" style:font-weight-complex="normal"/>
    </style:style>
    <style:style style:name="P1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5fc32b" officeooo:paragraph-rsid="0016a03e" style:font-size-asian="10pt" style:font-style-asian="normal" style:font-weight-asian="normal" style:font-size-complex="10pt" style:font-style-complex="normal" style:font-weight-complex="normal"/>
    </style:style>
    <style:style style:name="P1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67cd75" officeooo:paragraph-rsid="0016a03e" style:font-size-asian="10pt" style:font-style-asian="normal" style:font-weight-asian="normal" style:font-size-complex="10pt" style:font-style-complex="normal" style:font-weight-complex="normal"/>
    </style:style>
    <style:style style:name="P1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ecde649" officeooo:paragraph-rsid="0016a03e" style:font-size-asian="10pt" style:font-style-asian="normal" style:font-weight-asian="normal" style:font-size-complex="10pt" style:font-style-complex="normal" style:font-weight-complex="normal"/>
    </style:style>
    <style:style style:name="P1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ed02506" officeooo:paragraph-rsid="0016a03e" style:font-size-asian="10pt" style:font-style-asian="normal" style:font-weight-asian="normal" style:font-size-complex="10pt" style:font-style-complex="normal" style:font-weight-complex="normal"/>
    </style:style>
    <style:style style:name="P1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27197f" officeooo:paragraph-rsid="0016a03e" style:font-size-asian="10pt" style:font-style-asian="normal" style:font-weight-asian="normal" style:font-size-complex="10pt" style:font-style-complex="normal" style:font-weight-complex="normal"/>
    </style:style>
    <style:style style:name="P2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29e07c" officeooo:paragraph-rsid="0016a03e" style:font-size-asian="10pt" style:font-style-asian="normal" style:font-weight-asian="normal" style:font-size-complex="10pt" style:font-style-complex="normal" style:font-weight-complex="normal"/>
    </style:style>
    <style:style style:name="P2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29ee86" officeooo:paragraph-rsid="0016a03e" style:font-size-asian="10pt" style:font-style-asian="normal" style:font-weight-asian="normal" style:font-size-complex="10pt" style:font-style-complex="normal" style:font-weight-complex="normal"/>
    </style:style>
    <style:style style:name="P2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2f34bb" officeooo:paragraph-rsid="0016a03e" style:font-size-asian="10pt" style:font-style-asian="normal" style:font-weight-asian="normal" style:font-size-complex="10pt" style:font-style-complex="normal" style:font-weight-complex="normal"/>
    </style:style>
    <style:style style:name="P2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30899f" officeooo:paragraph-rsid="0016a03e" style:font-size-asian="10pt" style:font-style-asian="normal" style:font-weight-asian="normal" style:font-size-complex="10pt" style:font-style-complex="normal" style:font-weight-complex="normal"/>
    </style:style>
    <style:style style:name="P2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3939af" officeooo:paragraph-rsid="0016a03e" style:font-size-asian="10pt" style:font-style-asian="normal" style:font-weight-asian="normal" style:font-size-complex="10pt" style:font-style-complex="normal" style:font-weight-complex="normal"/>
    </style:style>
    <style:style style:name="P2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424b00" officeooo:paragraph-rsid="0016a03e" style:font-size-asian="10pt" style:font-style-asian="normal" style:font-weight-asian="normal" style:font-size-complex="10pt" style:font-style-complex="normal" style:font-weight-complex="normal"/>
    </style:style>
    <style:style style:name="P2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439a87" officeooo:paragraph-rsid="0016a03e" style:font-size-asian="10pt" style:font-style-asian="normal" style:font-weight-asian="normal" style:font-size-complex="10pt" style:font-style-complex="normal" style:font-weight-complex="normal"/>
    </style:style>
    <style:style style:name="P2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3bb85a" officeooo:paragraph-rsid="0016a03e" style:font-size-asian="10pt" style:font-style-asian="normal" style:font-weight-asian="normal" style:font-size-complex="10pt" style:font-style-complex="normal" style:font-weight-complex="normal"/>
    </style:style>
    <style:style style:name="P2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46527f" officeooo:paragraph-rsid="0016a03e" style:font-size-asian="10pt" style:font-style-asian="normal" style:font-weight-asian="normal" style:font-size-complex="10pt" style:font-style-complex="normal" style:font-weight-complex="normal"/>
    </style:style>
    <style:style style:name="P2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9a24426" officeooo:paragraph-rsid="0017e444" style:font-size-asian="10pt" style:font-style-asian="normal" style:font-weight-asian="normal" style:font-size-complex="10pt" style:font-style-complex="normal" style:font-weight-complex="normal"/>
    </style:style>
    <style:style style:name="P2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8692d1" officeooo:paragraph-rsid="0017e444" style:font-size-asian="10pt" style:font-style-asian="normal" style:font-weight-asian="normal" style:font-size-complex="10pt" style:font-style-complex="normal" style:font-weight-complex="normal"/>
    </style:style>
    <style:style style:name="P2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87f329" officeooo:paragraph-rsid="0017e444" style:font-size-asian="10pt" style:font-style-asian="normal" style:font-weight-asian="normal" style:font-size-complex="10pt" style:font-style-complex="normal" style:font-weight-complex="normal"/>
    </style:style>
    <style:style style:name="P2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8cf3a3" officeooo:paragraph-rsid="0017e444" style:font-size-asian="10pt" style:font-style-asian="normal" style:font-weight-asian="normal" style:font-size-complex="10pt" style:font-style-complex="normal" style:font-weight-complex="normal"/>
    </style:style>
    <style:style style:name="P2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f02aa" officeooo:paragraph-rsid="0017e444" style:font-size-asian="10pt" style:font-style-asian="normal" style:font-weight-asian="normal" style:font-size-complex="10pt" style:font-style-complex="normal" style:font-weight-complex="normal"/>
    </style:style>
    <style:style style:name="P2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8eaa96" officeooo:paragraph-rsid="0017e444" style:font-size-asian="10pt" style:font-style-asian="normal" style:font-weight-asian="normal" style:font-size-complex="10pt" style:font-style-complex="normal" style:font-weight-complex="normal"/>
    </style:style>
    <style:style style:name="P2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92500f" officeooo:paragraph-rsid="0017e444" style:font-size-asian="10pt" style:font-style-asian="normal" style:font-weight-asian="normal" style:font-size-complex="10pt" style:font-style-complex="normal" style:font-weight-complex="normal"/>
    </style:style>
    <style:style style:name="P2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8645fa" officeooo:paragraph-rsid="0016a03e" fo:background-color="#d4ea6b" style:font-size-asian="10pt" style:font-style-asian="normal" style:font-weight-asian="normal" style:font-size-complex="10pt" style:font-style-complex="normal" style:font-weight-complex="normal"/>
    </style:style>
    <style:style style:name="P2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399a45" officeooo:paragraph-rsid="0016a03e" fo:background-color="#ffff00" style:font-size-asian="10pt" style:font-style-asian="normal" style:font-weight-asian="normal" style:font-size-complex="10pt" style:font-style-complex="normal" style:font-weight-complex="normal"/>
    </style:style>
    <style:style style:name="P218"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2ed36f2b" officeooo:paragraph-rsid="0016a03e" fo:background-color="#ffff00" style:font-size-asian="10pt" style:font-style-asian="normal" style:font-weight-asian="normal" style:font-size-complex="10pt" style:font-style-complex="normal" style:font-weight-complex="normal"/>
    </style:style>
    <style:style style:name="P2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69bda3b" officeooo:paragraph-rsid="0016a03e" fo:background-color="#ffff00" style:font-size-asian="10pt" style:font-style-asian="normal" style:font-weight-asian="normal" style:font-size-complex="10pt" style:font-style-complex="normal" style:font-weight-complex="normal"/>
    </style:style>
    <style:style style:name="P220"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2f4dc34b" officeooo:paragraph-rsid="0016a03e" fo:background-color="#ffff00" style:font-size-asian="10pt" style:font-style-asian="normal" style:font-weight-asian="normal" style:font-size-complex="10pt" style:font-style-complex="normal" style:font-weight-complex="normal"/>
    </style:style>
    <style:style style:name="P2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6cfd1" officeooo:paragraph-rsid="0017e444" fo:background-color="#ffff00" style:font-size-asian="10pt" style:font-style-asian="normal" style:font-weight-asian="normal" style:font-size-complex="10pt" style:font-style-complex="normal" style:font-weight-complex="normal"/>
    </style:style>
    <style:style style:name="P2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4894c838" officeooo:paragraph-rsid="0016a03e" fo:background-color="transparent" style:font-size-asian="10pt" style:font-style-asian="normal" style:font-weight-asian="bold" style:font-size-complex="10pt" style:font-style-complex="normal" style:font-weight-complex="bold"/>
    </style:style>
    <style:style style:name="P2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4627197f" officeooo:paragraph-rsid="0016a03e" fo:background-color="transparent" style:font-size-asian="10pt" style:font-style-asian="normal" style:font-weight-asian="bold" style:font-size-complex="10pt" style:font-style-complex="normal" style:font-weight-complex="bold"/>
    </style:style>
    <style:style style:name="P2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4299decf" officeooo:paragraph-rsid="0016a03e" style:font-size-asian="10pt" style:font-style-asian="normal" style:font-weight-asian="bold" style:font-size-complex="10pt" style:font-style-complex="normal" style:font-weight-complex="bold"/>
    </style:style>
    <style:style style:name="P225"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none" fo:font-weight="normal" officeooo:rsid="4879d300" officeooo:paragraph-rsid="0016a03e" fo:background-color="transparent" style:font-size-asian="10pt" style:font-style-asian="italic" style:font-weight-asian="normal" style:font-size-complex="10pt" style:font-style-complex="italic" style:font-weight-complex="normal"/>
    </style:style>
    <style:style style:name="P2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ed48390" officeooo:paragraph-rsid="0016a03e" fo:background-color="transparent" style:font-size-asian="10pt" style:font-style-asian="italic" style:font-weight-asian="normal" style:font-size-complex="10pt" style:font-style-complex="italic" style:font-weight-complex="normal"/>
    </style:style>
    <style:style style:name="P2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f218242" officeooo:paragraph-rsid="0016a03e" fo:background-color="transparent" style:font-size-asian="10pt" style:font-style-asian="italic" style:font-weight-asian="normal" style:font-size-complex="10pt" style:font-style-complex="italic" style:font-weight-complex="normal"/>
    </style:style>
    <style:style style:name="P2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468b1960" officeooo:paragraph-rsid="0016a03e" fo:background-color="transparent" style:font-size-asian="10pt" style:font-style-asian="italic" style:font-weight-asian="normal" style:font-size-complex="10pt" style:font-style-complex="italic" style:font-weight-complex="normal"/>
    </style:style>
    <style:style style:name="P2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ee077da" officeooo:paragraph-rsid="0016a03e" fo:background-color="transparent" style:font-size-asian="10pt" style:font-style-asian="italic" style:font-weight-asian="normal" style:font-size-complex="10pt" style:font-style-complex="italic" style:font-weight-complex="normal"/>
    </style:style>
    <style:style style:name="P2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f117ae0" officeooo:paragraph-rsid="0016a03e" fo:background-color="transparent" style:font-size-asian="10pt" style:font-style-asian="italic" style:font-weight-asian="normal" style:font-size-complex="10pt" style:font-style-complex="italic" style:font-weight-complex="normal"/>
    </style:style>
    <style:style style:name="P2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f254eac" officeooo:paragraph-rsid="0016a03e" fo:background-color="transparent" style:font-size-asian="10pt" style:font-style-asian="italic" style:font-weight-asian="normal" style:font-size-complex="10pt" style:font-style-complex="italic" style:font-weight-complex="normal"/>
    </style:style>
    <style:style style:name="P2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f276817" officeooo:paragraph-rsid="0016a03e" fo:background-color="transparent" style:font-size-asian="10pt" style:font-style-asian="italic" style:font-weight-asian="normal" style:font-size-complex="10pt" style:font-style-complex="italic" style:font-weight-complex="normal"/>
    </style:style>
    <style:style style:name="P2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f2879c1" officeooo:paragraph-rsid="0016a03e" fo:background-color="transparent" style:font-size-asian="10pt" style:font-style-asian="italic" style:font-weight-asian="normal" style:font-size-complex="10pt" style:font-style-complex="italic" style:font-weight-complex="normal"/>
    </style:style>
    <style:style style:name="P2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4c87f329" officeooo:paragraph-rsid="0017e444" fo:background-color="transparent" style:font-size-asian="10pt" style:font-style-asian="italic" style:font-weight-asian="normal" style:font-size-complex="10pt" style:font-style-complex="italic" style:font-weight-complex="normal"/>
    </style:style>
    <style:style style:name="P2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09dd4c99" officeooo:paragraph-rsid="0017e444" fo:background-color="transparent" style:font-size-asian="10pt" style:font-style-asian="italic" style:font-weight-asian="normal" style:font-size-complex="10pt" style:font-style-complex="italic" style:font-weight-complex="normal"/>
    </style:style>
    <style:style style:name="P2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1d72f64" officeooo:paragraph-rsid="0017e444" fo:background-color="transparent" style:font-size-asian="10pt" style:font-style-asian="italic" style:font-weight-asian="normal" style:font-size-complex="10pt" style:font-style-complex="italic" style:font-weight-complex="normal"/>
    </style:style>
    <style:style style:name="P2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f33b037" officeooo:paragraph-rsid="0016a03e" style:font-size-asian="10pt" style:font-style-asian="italic" style:font-weight-asian="normal" style:font-size-complex="10pt" style:font-style-complex="italic" style:font-weight-complex="normal"/>
    </style:style>
    <style:style style:name="P238"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italic" style:text-underline-style="none" fo:font-weight="normal" officeooo:rsid="47295f0c" officeooo:paragraph-rsid="0016a03e" style:font-size-asian="10pt" style:font-style-asian="italic" style:font-weight-asian="normal" style:font-size-complex="10pt" style:font-style-complex="italic" style:font-weight-complex="normal"/>
    </style:style>
    <style:style style:name="P2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4c8cf3a3" officeooo:paragraph-rsid="0017e444" style:font-size-asian="10pt" style:font-style-asian="italic" style:font-weight-asian="normal" style:font-size-complex="10pt" style:font-style-complex="italic" style:font-weight-complex="normal"/>
    </style:style>
    <style:style style:name="P2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4c8e3202" officeooo:paragraph-rsid="0017e444" style:font-size-asian="10pt" style:font-style-asian="italic" style:font-weight-asian="normal" style:font-size-complex="10pt" style:font-style-complex="italic" style:font-weight-complex="normal"/>
    </style:style>
    <style:style style:name="P2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07df02aa" officeooo:paragraph-rsid="0017e444" style:font-size-asian="10pt" style:font-style-asian="italic" style:font-weight-asian="normal" style:font-size-complex="10pt" style:font-style-complex="italic" style:font-weight-complex="normal"/>
    </style:style>
    <style:style style:name="P2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bold" officeooo:rsid="4ea41ab9" officeooo:paragraph-rsid="0016a03e" fo:background-color="transparent" style:font-size-asian="10pt" style:font-style-asian="italic" style:font-weight-asian="bold" style:font-size-complex="10pt" style:font-style-complex="italic" style:font-weight-complex="bold"/>
    </style:style>
    <style:style style:name="P2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48859f38" officeooo:paragraph-rsid="0016a03e" fo:background-color="transparent" style:font-size-asian="12pt" style:font-style-asian="normal" style:font-weight-asian="bold" style:font-size-complex="12pt" style:font-style-complex="normal" style:font-weight-complex="bold"/>
    </style:style>
    <style:style style:name="P2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4904bf15" officeooo:paragraph-rsid="0016a03e" style:font-size-asian="12pt" style:font-style-asian="normal" style:font-weight-asian="bold" style:font-size-complex="12pt" style:font-style-complex="normal" style:font-weight-complex="bold"/>
    </style:style>
    <style:style style:name="P2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477a46fb" officeooo:paragraph-rsid="0016a03e" fo:background-color="#ffff00" style:font-size-asian="12pt" style:font-style-asian="normal" style:font-weight-asian="bold" style:font-size-complex="12pt" style:font-style-complex="normal" style:font-weight-complex="bold"/>
    </style:style>
    <style:style style:name="P2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4d623ba1" officeooo:paragraph-rsid="0016a03e" fo:background-color="#ffff00" style:font-size-asian="12pt" style:font-style-asian="normal" style:font-weight-asian="bold" style:font-size-complex="12pt" style:font-style-complex="normal" style:font-weight-complex="bold"/>
    </style:style>
    <style:style style:name="P2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016a03e"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0016a03e"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62a0ee" officeooo:paragraph-rsid="0016a03e"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66369c" officeooo:paragraph-rsid="0016a03e" fo:background-color="#ffff00"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45cf3" officeooo:paragraph-rsid="0016a03e" fo:background-color="#ffff00"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4d5facb0" officeooo:paragraph-rsid="0016a03e" fo:background-color="#ffff00"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4d623ba1" officeooo:paragraph-rsid="0016a03e" fo:background-color="#ffff00"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6961a" officeooo:paragraph-rsid="0016a03e" fo:background-color="transparent"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6e121" officeooo:paragraph-rsid="0016a03e" fo:background-color="transparent"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91eaa6" officeooo:paragraph-rsid="0016a03e" fo:background-color="transparent"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0016a03e" fo:background-color="transparent"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33d9e397" officeooo:paragraph-rsid="0016a03e" fo:background-color="transparent" style:font-size-asian="13pt" style:font-style-asian="normal" style:font-weight-asian="bold" style:font-size-complex="13pt" style:font-style-complex="normal" style:font-weight-complex="bold"/>
    </style:style>
    <style:style style:name="P259"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8679d51" officeooo:paragraph-rsid="0016a03e" fo:background-color="transparent" style:font-size-asian="11pt" style:font-style-asian="normal" style:font-weight-asian="bold" style:font-size-complex="11pt" style:font-style-complex="normal" style:font-weight-complex="bold"/>
    </style:style>
    <style:style style:name="P260"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8679d51" officeooo:paragraph-rsid="0016a03e" style:font-size-asian="11pt" style:font-style-asian="normal" style:font-weight-asian="bold" style:font-size-complex="11pt" style:font-style-complex="normal" style:font-weight-complex="bold"/>
    </style:style>
    <style:style style:name="P261"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solid" style:text-underline-width="auto" style:text-underline-color="font-color" fo:font-weight="normal" officeooo:rsid="08679d51" officeooo:paragraph-rsid="0016a03e" style:font-size-asian="11pt" style:font-style-asian="normal" style:font-weight-asian="normal" style:font-size-complex="11pt" style:font-style-complex="normal" style:font-weight-complex="normal"/>
    </style:style>
    <style:style style:name="P262" style:family="paragraph" style:parent-style-name="Standard">
      <style:paragraph-properties fo:text-align="justify" style:justify-single-word="false"/>
      <style:text-properties fo:font-variant="normal" fo:text-transform="none" fo:color="#111111" loext:opacity="100%" style:font-name="Garamond" fo:font-size="10.5pt" fo:letter-spacing="normal" fo:font-style="normal" style:text-underline-style="none" fo:font-weight="bold" officeooo:rsid="4299decf" officeooo:paragraph-rsid="0016a03e" style:font-size-asian="10.5pt" style:font-style-asian="normal" style:font-weight-asian="bold" style:font-size-complex="10.5pt" style:font-style-complex="normal" style:font-weight-complex="bold"/>
    </style:style>
    <style:style style:name="P26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3eef79e8" officeooo:paragraph-rsid="0016a03e" fo:background-color="transparent" style:font-size-asian="10pt" style:font-style-asian="normal" style:font-weight-asian="normal" style:font-size-complex="10pt" style:font-style-complex="normal" style:font-weight-complex="normal"/>
    </style:style>
    <style:style style:name="P26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435404e3" officeooo:paragraph-rsid="0016a03e" fo:background-color="transparent" style:font-size-asian="10pt" style:font-style-asian="normal" style:font-weight-asian="normal" style:font-size-complex="10pt" style:font-style-complex="normal" style:font-weight-complex="normal"/>
    </style:style>
    <style:style style:name="P265"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43593692" officeooo:paragraph-rsid="0016a03e" fo:background-color="transparent" style:font-size-asian="10pt" style:font-style-asian="normal" style:font-weight-asian="normal" style:font-size-complex="10pt" style:font-style-complex="normal" style:font-weight-complex="normal"/>
    </style:style>
    <style:style style:name="P266"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435e2ab5" officeooo:paragraph-rsid="0016a03e" fo:background-color="transparent" style:font-size-asian="10pt" style:font-style-asian="normal" style:font-weight-asian="normal" style:font-size-complex="10pt" style:font-style-complex="normal" style:font-weight-complex="normal"/>
    </style:style>
    <style:style style:name="P267"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4d8b5685" officeooo:paragraph-rsid="0016a03e" fo:background-color="transparent" style:font-size-asian="10pt" style:font-style-asian="normal" style:font-weight-asian="normal" style:font-size-complex="10pt" style:font-style-complex="normal" style:font-weight-complex="normal"/>
    </style:style>
    <style:style style:name="P268"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bold" officeooo:rsid="3eef79e8" officeooo:paragraph-rsid="0016a03e" fo:background-color="#ffff00" style:font-size-asian="10pt" style:font-style-asian="normal" style:font-weight-asian="bold" style:font-size-complex="10pt" style:font-style-complex="normal" style:font-weight-complex="bold"/>
    </style:style>
    <style:style style:name="P269" style:family="paragraph" style:parent-style-name="Standard">
      <style:paragraph-properties fo:text-align="justify" style:justify-single-word="false"/>
      <style:text-properties officeooo:paragraph-rsid="0016a03e"/>
    </style:style>
    <style:style style:name="P270" style:family="paragraph" style:parent-style-name="Standard">
      <style:paragraph-properties fo:text-align="justify" style:justify-single-word="false"/>
      <style:text-properties officeooo:rsid="42babbc0" officeooo:paragraph-rsid="0016a03e"/>
    </style:style>
    <style:style style:name="P271" style:family="paragraph" style:parent-style-name="Standard">
      <style:paragraph-properties fo:text-align="justify" style:justify-single-word="false"/>
      <style:text-properties officeooo:rsid="3a3ef444" officeooo:paragraph-rsid="0016a03e"/>
    </style:style>
    <style:style style:name="P272" style:family="paragraph" style:parent-style-name="Standard">
      <style:paragraph-properties fo:text-align="justify" style:justify-single-word="false"/>
      <style:text-properties officeooo:rsid="46cc4cf5" officeooo:paragraph-rsid="0016a03e"/>
    </style:style>
    <style:style style:name="P273" style:family="paragraph" style:parent-style-name="Standard">
      <style:paragraph-properties fo:text-align="justify" style:justify-single-word="false"/>
      <style:text-properties officeooo:rsid="46cdfdd1" officeooo:paragraph-rsid="0016a03e"/>
    </style:style>
    <style:style style:name="P274" style:family="paragraph" style:parent-style-name="Standard">
      <style:paragraph-properties fo:text-align="justify" style:justify-single-word="false"/>
      <style:text-properties officeooo:rsid="4286e39a" officeooo:paragraph-rsid="0016a03e"/>
    </style:style>
    <style:style style:name="P275" style:family="paragraph" style:parent-style-name="Standard">
      <style:paragraph-properties fo:text-align="justify" style:justify-single-word="false"/>
      <style:text-properties officeooo:rsid="3a3ac34f" officeooo:paragraph-rsid="0016a03e"/>
    </style:style>
    <style:style style:name="P276" style:family="paragraph" style:parent-style-name="Standard">
      <style:paragraph-properties fo:text-align="justify" style:justify-single-word="false"/>
      <style:text-properties officeooo:rsid="2f808f22" officeooo:paragraph-rsid="0016a03e"/>
    </style:style>
    <style:style style:name="P277" style:family="paragraph" style:parent-style-name="Standard">
      <style:paragraph-properties fo:text-align="justify" style:justify-single-word="false"/>
      <style:text-properties officeooo:rsid="442cc1cb" officeooo:paragraph-rsid="0016a03e"/>
    </style:style>
    <style:style style:name="P278" style:family="paragraph" style:parent-style-name="Standard">
      <style:paragraph-properties fo:text-align="justify" style:justify-single-word="false"/>
      <style:text-properties officeooo:rsid="42dd6159" officeooo:paragraph-rsid="0016a03e"/>
    </style:style>
    <style:style style:name="P279" style:family="paragraph" style:parent-style-name="Standard">
      <style:paragraph-properties fo:text-align="justify" style:justify-single-word="false"/>
      <style:text-properties officeooo:rsid="42e14156" officeooo:paragraph-rsid="0016a03e"/>
    </style:style>
    <style:style style:name="P280" style:family="paragraph" style:parent-style-name="Standard">
      <style:paragraph-properties fo:text-align="justify" style:justify-single-word="false"/>
      <style:text-properties officeooo:rsid="3a617588" officeooo:paragraph-rsid="0016a03e"/>
    </style:style>
    <style:style style:name="P281" style:family="paragraph" style:parent-style-name="Standard">
      <style:paragraph-properties fo:text-align="justify" style:justify-single-word="false"/>
      <style:text-properties officeooo:rsid="2f914d0b" officeooo:paragraph-rsid="0016a03e"/>
    </style:style>
    <style:style style:name="P282" style:family="paragraph" style:parent-style-name="Standard">
      <style:paragraph-properties fo:text-align="justify" style:justify-single-word="false"/>
      <style:text-properties officeooo:rsid="2f9404d2" officeooo:paragraph-rsid="0016a03e"/>
    </style:style>
    <style:style style:name="P283" style:family="paragraph" style:parent-style-name="Standard">
      <style:paragraph-properties fo:text-align="justify" style:justify-single-word="false"/>
      <style:text-properties officeooo:rsid="4d080d44" officeooo:paragraph-rsid="0016a03e"/>
    </style:style>
    <style:style style:name="P284" style:family="paragraph" style:parent-style-name="Standard">
      <style:paragraph-properties fo:text-align="justify" style:justify-single-word="false"/>
      <style:text-properties officeooo:rsid="42ebd8df" officeooo:paragraph-rsid="0016a03e"/>
    </style:style>
    <style:style style:name="P285" style:family="paragraph" style:parent-style-name="Standard">
      <style:paragraph-properties fo:text-align="justify" style:justify-single-word="false"/>
      <style:text-properties officeooo:rsid="2f957ffb" officeooo:paragraph-rsid="0016a03e"/>
    </style:style>
    <style:style style:name="P286" style:family="paragraph" style:parent-style-name="Standard">
      <style:paragraph-properties fo:text-align="justify" style:justify-single-word="false"/>
      <style:text-properties officeooo:rsid="42a6eb4c" officeooo:paragraph-rsid="0016a03e"/>
    </style:style>
    <style:style style:name="P287" style:family="paragraph" style:parent-style-name="Standard">
      <style:paragraph-properties fo:text-align="justify" style:justify-single-word="false"/>
      <style:text-properties officeooo:rsid="4299decf" officeooo:paragraph-rsid="0016a03e"/>
    </style:style>
    <style:style style:name="P288" style:family="paragraph" style:parent-style-name="Standard">
      <style:paragraph-properties fo:text-align="justify" style:justify-single-word="false"/>
      <style:text-properties officeooo:rsid="428d4803" officeooo:paragraph-rsid="0016a03e"/>
    </style:style>
    <style:style style:name="P289" style:family="paragraph" style:parent-style-name="Standard">
      <style:paragraph-properties fo:text-align="justify" style:justify-single-word="false"/>
      <style:text-properties officeooo:rsid="42942767" officeooo:paragraph-rsid="0016a03e"/>
    </style:style>
    <style:style style:name="P290" style:family="paragraph" style:parent-style-name="Standard">
      <style:paragraph-properties fo:text-align="justify" style:justify-single-word="false"/>
      <style:text-properties officeooo:rsid="470e75c9" officeooo:paragraph-rsid="0016a03e"/>
    </style:style>
    <style:style style:name="P291" style:family="paragraph" style:parent-style-name="Standard">
      <style:paragraph-properties fo:text-align="justify" style:justify-single-word="false"/>
      <style:text-properties officeooo:rsid="42b1785e" officeooo:paragraph-rsid="0016a03e"/>
    </style:style>
    <style:style style:name="P292" style:family="paragraph" style:parent-style-name="Standard">
      <style:paragraph-properties fo:text-align="justify" style:justify-single-word="false"/>
      <style:text-properties officeooo:rsid="42b4da3d" officeooo:paragraph-rsid="0016a03e"/>
    </style:style>
    <style:style style:name="P293" style:family="paragraph" style:parent-style-name="Standard">
      <style:paragraph-properties fo:text-align="justify" style:justify-single-word="false"/>
      <style:text-properties officeooo:rsid="429abc1b" officeooo:paragraph-rsid="0016a03e"/>
    </style:style>
    <style:style style:name="P294" style:family="paragraph" style:parent-style-name="Standard">
      <style:paragraph-properties fo:text-align="justify" style:justify-single-word="false"/>
      <style:text-properties officeooo:rsid="42a24763" officeooo:paragraph-rsid="0016a03e"/>
    </style:style>
    <style:style style:name="P295" style:family="paragraph" style:parent-style-name="Standard">
      <style:paragraph-properties fo:text-align="justify" style:justify-single-word="false"/>
      <style:text-properties officeooo:rsid="42a3411e" officeooo:paragraph-rsid="0016a03e"/>
    </style:style>
    <style:style style:name="P296" style:family="paragraph" style:parent-style-name="Standard">
      <style:paragraph-properties fo:text-align="justify" style:justify-single-word="false"/>
      <style:text-properties officeooo:rsid="42a696ad" officeooo:paragraph-rsid="0016a03e"/>
    </style:style>
    <style:style style:name="P297" style:family="paragraph" style:parent-style-name="Standard">
      <style:paragraph-properties fo:text-align="justify" style:justify-single-word="false"/>
      <style:text-properties officeooo:rsid="42a8ad02" officeooo:paragraph-rsid="0016a03e"/>
    </style:style>
    <style:style style:name="P298" style:family="paragraph" style:parent-style-name="Standard">
      <style:paragraph-properties fo:text-align="justify" style:justify-single-word="false"/>
      <style:text-properties officeooo:rsid="42a9dc7f" officeooo:paragraph-rsid="0016a03e"/>
    </style:style>
    <style:style style:name="P2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c92500f" officeooo:paragraph-rsid="0017e444" fo:background-color="transparent" style:font-size-asian="10pt" style:font-style-asian="normal" style:font-weight-asian="normal" style:font-size-complex="10pt" style:font-style-complex="normal" style:font-weight-complex="normal"/>
    </style:style>
    <style:style style:name="P3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91717b6" officeooo:paragraph-rsid="001a1e2e" fo:background-color="#ffff00" style:font-size-asian="10pt" style:font-style-asian="normal" style:font-weight-asian="normal" style:font-size-complex="10pt" style:font-style-complex="normal" style:font-weight-complex="normal"/>
    </style:style>
    <style:style style:name="P3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9499d4d" officeooo:paragraph-rsid="001a1e2e" fo:background-color="#ffff00" style:font-size-asian="10pt" style:font-style-asian="normal" style:font-weight-asian="normal" style:font-size-complex="10pt" style:font-style-complex="normal" style:font-weight-complex="normal"/>
    </style:style>
    <style:style style:name="P3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915913b" officeooo:paragraph-rsid="001a1e2e" fo:background-color="#ffff00" style:font-size-asian="10pt" style:font-style-asian="normal" style:font-weight-asian="normal" style:font-size-complex="10pt" style:font-style-complex="normal" style:font-weight-complex="normal"/>
    </style:style>
    <style:style style:name="P3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4915913b" officeooo:paragraph-rsid="001a1e2e"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49499d4d" officeooo:paragraph-rsid="001a1e2e" fo:background-color="#ffff00" style:font-size-asian="10pt" style:font-style-asian="normal" style:font-weight-asian="bold" style:font-size-complex="10pt" style:font-style-complex="normal" style:font-weight-complex="bold"/>
    </style:style>
    <style:style style:name="P305"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d7bef26" officeooo:paragraph-rsid="001a1e2e" fo:background-color="#ffff00" style:font-size-asian="13pt" style:font-style-asian="normal" style:font-weight-asian="bold" style:font-size-complex="13pt" style:font-style-complex="normal" style:font-weight-complex="bold"/>
    </style:style>
    <style:style style:name="T1" style:family="text">
      <style:text-properties fo:background-color="#ffff00" loext:char-shading-value="0"/>
    </style:style>
    <style:style style:name="T2" style:family="text">
      <style:text-properties officeooo:rsid="33d9e397" fo:background-color="#ffff00" loext:char-shading-value="0"/>
    </style:style>
    <style:style style:name="T3" style:family="text">
      <style:text-properties officeooo:rsid="487285e1" fo:background-color="#ffff00" loext:char-shading-value="0"/>
    </style:style>
    <style:style style:name="T4" style:family="text">
      <style:text-properties officeooo:rsid="48919157" fo:background-color="#ffff00" loext:char-shading-value="0"/>
    </style:style>
    <style:style style:name="T5" style:family="text">
      <style:text-properties officeooo:rsid="48a4ee95" fo:background-color="#ffff00" loext:char-shading-value="0"/>
    </style:style>
    <style:style style:name="T6" style:family="text">
      <style:text-properties officeooo:rsid="181da435" fo:background-color="#ffff00" loext:char-shading-value="0"/>
    </style:style>
    <style:style style:name="T7" style:family="text">
      <style:text-properties officeooo:rsid="4d44980a" fo:background-color="#ffff00" loext:char-shading-value="0"/>
    </style:style>
    <style:style style:name="T8" style:family="text">
      <style:text-properties officeooo:rsid="116bc21c" fo:background-color="#ffff00" loext:char-shading-value="0"/>
    </style:style>
    <style:style style:name="T9" style:family="text">
      <style:text-properties officeooo:rsid="4d47bbf1" fo:background-color="#ffff00" loext:char-shading-value="0"/>
    </style:style>
    <style:style style:name="T10" style:family="text">
      <style:text-properties officeooo:rsid="4fba3258" fo:background-color="#ffff00" loext:char-shading-value="0"/>
    </style:style>
    <style:style style:name="T11" style:family="text">
      <style:text-properties officeooo:rsid="4c911baf" fo:background-color="#ffff00" loext:char-shading-value="0"/>
    </style:style>
    <style:style style:name="T12" style:family="text">
      <style:text-properties officeooo:rsid="4c95c304" fo:background-color="#ffff00" loext:char-shading-value="0"/>
    </style:style>
    <style:style style:name="T13" style:family="text">
      <style:text-properties officeooo:rsid="33d9e397"/>
    </style:style>
    <style:style style:name="T14" style:family="text">
      <style:text-properties officeooo:rsid="49012b8e"/>
    </style:style>
    <style:style style:name="T15" style:family="text">
      <style:text-properties officeooo:rsid="4886ba77"/>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4886ba77" style:font-style-asian="italic" style:font-style-complex="italic"/>
    </style:style>
    <style:style style:name="T18" style:family="text">
      <style:text-properties fo:font-style="italic" style:text-underline-style="solid" style:text-underline-width="auto" style:text-underline-color="font-color" officeooo:rsid="4660a812" style:font-style-asian="italic" style:font-style-complex="italic"/>
    </style:style>
    <style:style style:name="T19" style:family="text">
      <style:text-properties fo:font-style="italic" style:text-underline-style="solid" style:text-underline-width="auto" style:text-underline-color="font-color" officeooo:rsid="4c87f329" style:font-style-asian="italic" style:font-style-complex="italic"/>
    </style:style>
    <style:style style:name="T20" style:family="text">
      <style:text-properties fo:font-style="italic" style:text-underline-style="solid" style:text-underline-width="auto" style:text-underline-color="font-color" fo:font-weight="bold" officeooo:rsid="462575c1"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background-color="#ffff00" loext:char-shading-value="0" style:font-style-asian="italic" style:font-style-complex="italic"/>
    </style:style>
    <style:style style:name="T22" style:family="text">
      <style:text-properties fo:font-style="italic" style:text-underline-style="solid" style:text-underline-width="auto" style:text-underline-color="font-color" fo:background-color="transparent" loext:char-shading-value="0"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officeooo:rsid="2f276817" style:font-style-asian="italic" style:font-style-complex="italic"/>
    </style:style>
    <style:style style:name="T25" style:family="text">
      <style:text-properties fo:font-style="italic" officeooo:rsid="468ffa5d" style:font-style-asian="italic" style:font-style-complex="italic"/>
    </style:style>
    <style:style style:name="T26" style:family="text">
      <style:text-properties fo:font-style="italic" officeooo:rsid="2ed36f2b" style:font-style-asian="italic" style:font-style-complex="italic"/>
    </style:style>
    <style:style style:name="T27" style:family="text">
      <style:text-properties fo:font-style="italic" officeooo:rsid="2efceec0" style:font-style-asian="italic" style:font-style-complex="italic"/>
    </style:style>
    <style:style style:name="T28" style:family="text">
      <style:text-properties fo:font-style="italic" officeooo:rsid="2f1ee542" style:font-style-asian="italic" style:font-style-complex="italic"/>
    </style:style>
    <style:style style:name="T29" style:family="text">
      <style:text-properties fo:font-style="italic" officeooo:rsid="2f390f4c" style:font-style-asian="italic" style:font-style-complex="italic"/>
    </style:style>
    <style:style style:name="T30" style:family="text">
      <style:text-properties fo:font-style="italic" officeooo:rsid="469370e4" style:font-style-asian="italic" style:font-style-complex="italic"/>
    </style:style>
    <style:style style:name="T31" style:family="text">
      <style:text-properties fo:font-style="italic" officeooo:rsid="2f3c4a8a" style:font-style-asian="italic" style:font-style-complex="italic"/>
    </style:style>
    <style:style style:name="T32" style:family="text">
      <style:text-properties fo:font-style="italic" officeooo:rsid="39a98852" style:font-style-asian="italic" style:font-style-complex="italic"/>
    </style:style>
    <style:style style:name="T33" style:family="text">
      <style:text-properties fo:font-style="italic" officeooo:rsid="2f3ecb6b" style:font-style-asian="italic" style:font-style-complex="italic"/>
    </style:style>
    <style:style style:name="T34" style:family="text">
      <style:text-properties fo:font-style="italic" officeooo:rsid="4698b8e6" style:font-style-asian="italic" style:font-style-complex="italic"/>
    </style:style>
    <style:style style:name="T35" style:family="text">
      <style:text-properties fo:font-style="italic" officeooo:rsid="2f188132" style:font-style-asian="italic" style:font-style-complex="italic"/>
    </style:style>
    <style:style style:name="T36" style:family="text">
      <style:text-properties fo:font-style="italic" officeooo:rsid="4729dcdd" style:font-style-asian="italic" style:font-style-complex="italic"/>
    </style:style>
    <style:style style:name="T37" style:family="text">
      <style:text-properties fo:font-style="italic" officeooo:rsid="469264e4" style:font-style-asian="italic" style:font-style-complex="italic"/>
    </style:style>
    <style:style style:name="T38" style:family="text">
      <style:text-properties fo:font-style="italic" officeooo:rsid="2f0f1012" style:font-style-asian="italic" style:font-style-complex="italic"/>
    </style:style>
    <style:style style:name="T39" style:family="text">
      <style:text-properties fo:font-style="italic" officeooo:rsid="2ee7778c" style:font-style-asian="italic" style:font-style-complex="italic"/>
    </style:style>
    <style:style style:name="T40" style:family="text">
      <style:text-properties fo:font-style="italic" officeooo:rsid="2ef5b3c2" style:font-style-asian="italic" style:font-style-complex="italic"/>
    </style:style>
    <style:style style:name="T41" style:family="text">
      <style:text-properties fo:font-style="italic" officeooo:rsid="2f456ace" style:font-style-asian="italic" style:font-style-complex="italic"/>
    </style:style>
    <style:style style:name="T42" style:family="text">
      <style:text-properties fo:font-style="italic" officeooo:rsid="469bda3b" style:font-style-asian="italic" style:font-style-complex="italic"/>
    </style:style>
    <style:style style:name="T43" style:family="text">
      <style:text-properties fo:font-style="italic" officeooo:rsid="47224eff" style:font-style-asian="italic" style:font-style-complex="italic"/>
    </style:style>
    <style:style style:name="T44" style:family="text">
      <style:text-properties fo:font-style="italic" officeooo:rsid="472e9a79" style:font-style-asian="italic" style:font-style-complex="italic"/>
    </style:style>
    <style:style style:name="T45" style:family="text">
      <style:text-properties fo:font-style="italic" officeooo:rsid="47301ec8" style:font-style-asian="italic" style:font-style-complex="italic"/>
    </style:style>
    <style:style style:name="T46" style:family="text">
      <style:text-properties fo:font-style="italic" officeooo:rsid="46800714" style:font-style-asian="italic" style:font-style-complex="italic"/>
    </style:style>
    <style:style style:name="T47" style:family="text">
      <style:text-properties fo:font-style="italic" officeooo:rsid="4728580b" style:font-style-asian="italic" style:font-style-complex="italic"/>
    </style:style>
    <style:style style:name="T48" style:family="text">
      <style:text-properties fo:font-style="italic" officeooo:rsid="47295f0c" style:font-style-asian="italic" style:font-style-complex="italic"/>
    </style:style>
    <style:style style:name="T49" style:family="text">
      <style:text-properties fo:font-style="italic" officeooo:rsid="473b4690" style:font-style-asian="italic" style:font-style-complex="italic"/>
    </style:style>
    <style:style style:name="T50" style:family="text">
      <style:text-properties fo:font-style="italic" officeooo:rsid="39df41f2" style:font-style-asian="italic" style:font-style-complex="italic"/>
    </style:style>
    <style:style style:name="T51" style:family="text">
      <style:text-properties fo:font-style="italic" officeooo:rsid="34e1ad76" style:font-style-asian="italic" style:font-style-complex="italic"/>
    </style:style>
    <style:style style:name="T52" style:family="text">
      <style:text-properties fo:font-style="italic" officeooo:rsid="39e48afe" style:font-style-asian="italic" style:font-style-complex="italic"/>
    </style:style>
    <style:style style:name="T53" style:family="text">
      <style:text-properties fo:font-style="italic" officeooo:rsid="4681ce2b" style:font-style-asian="italic" style:font-style-complex="italic"/>
    </style:style>
    <style:style style:name="T54" style:family="text">
      <style:text-properties fo:font-style="italic" officeooo:rsid="2ed48390" style:font-style-asian="italic" style:font-style-complex="italic"/>
    </style:style>
    <style:style style:name="T55" style:family="text">
      <style:text-properties fo:font-style="italic" officeooo:rsid="39f35a7d" style:font-style-asian="italic" style:font-style-complex="italic"/>
    </style:style>
    <style:style style:name="T56" style:family="text">
      <style:text-properties fo:font-style="italic" officeooo:rsid="39f4fcb4" style:font-style-asian="italic" style:font-style-complex="italic"/>
    </style:style>
    <style:style style:name="T57" style:family="text">
      <style:text-properties fo:font-style="italic" officeooo:rsid="12354256" style:font-style-asian="italic" style:font-style-complex="italic"/>
    </style:style>
    <style:style style:name="T58" style:family="text">
      <style:text-properties fo:font-style="italic" officeooo:rsid="2ec9ebef" style:font-style-asian="italic" style:font-style-complex="italic"/>
    </style:style>
    <style:style style:name="T59" style:family="text">
      <style:text-properties officeooo:rsid="48878960"/>
    </style:style>
    <style:style style:name="T60" style:family="text">
      <style:text-properties officeooo:rsid="48a48928"/>
    </style:style>
    <style:style style:name="T61" style:family="text">
      <style:text-properties officeooo:rsid="488aec74"/>
    </style:style>
    <style:style style:name="T62" style:family="text">
      <style:text-properties officeooo:rsid="488a8b55"/>
    </style:style>
    <style:style style:name="T63" style:family="text">
      <style:text-properties officeooo:rsid="48919157"/>
    </style:style>
    <style:style style:name="T64" style:family="text">
      <style:text-properties officeooo:rsid="48a4ee95"/>
    </style:style>
    <style:style style:name="T65" style:family="text">
      <style:text-properties officeooo:rsid="48964160"/>
    </style:style>
    <style:style style:name="T66" style:family="text">
      <style:text-properties officeooo:rsid="4897e1d4"/>
    </style:style>
    <style:style style:name="T67" style:family="text">
      <style:text-properties officeooo:rsid="489909d6"/>
    </style:style>
    <style:style style:name="T68" style:family="text">
      <style:text-properties officeooo:rsid="489b60f3"/>
    </style:style>
    <style:style style:name="T69" style:family="text">
      <style:text-properties officeooo:rsid="489d5c55"/>
    </style:style>
    <style:style style:name="T70" style:family="text">
      <style:text-properties officeooo:rsid="48a60f51"/>
    </style:style>
    <style:style style:name="T71" style:family="text">
      <style:text-properties officeooo:rsid="48aca0b5"/>
    </style:style>
    <style:style style:name="T72" style:family="text">
      <style:text-properties officeooo:rsid="4ac81abc"/>
    </style:style>
    <style:style style:name="T73" style:family="text">
      <style:text-properties officeooo:rsid="48ab3449"/>
    </style:style>
    <style:style style:name="T74" style:family="text">
      <style:text-properties officeooo:rsid="48ad9b38"/>
    </style:style>
    <style:style style:name="T75" style:family="text">
      <style:text-properties officeooo:rsid="48b1fd88"/>
    </style:style>
    <style:style style:name="T76" style:family="text">
      <style:text-properties officeooo:rsid="48b201e4"/>
    </style:style>
    <style:style style:name="T77" style:family="text">
      <style:text-properties officeooo:rsid="48b25fcc"/>
    </style:style>
    <style:style style:name="T78" style:family="text">
      <style:text-properties officeooo:rsid="48b601cb"/>
    </style:style>
    <style:style style:name="T79" style:family="text">
      <style:text-properties officeooo:rsid="48b8e59a"/>
    </style:style>
    <style:style style:name="T80" style:family="text">
      <style:text-properties officeooo:rsid="48bc0a6b"/>
    </style:style>
    <style:style style:name="T81" style:family="text">
      <style:text-properties officeooo:rsid="4acbfa64"/>
    </style:style>
    <style:style style:name="T82" style:family="text">
      <style:text-properties officeooo:rsid="4acd3169"/>
    </style:style>
    <style:style style:name="T83" style:family="text">
      <style:text-properties officeooo:rsid="48d35fd2"/>
    </style:style>
    <style:style style:name="T84" style:family="text">
      <style:text-properties officeooo:rsid="48d50e30"/>
    </style:style>
    <style:style style:name="T85" style:family="text">
      <style:text-properties officeooo:rsid="4908f8c0"/>
    </style:style>
    <style:style style:name="T86" style:family="text">
      <style:text-properties officeooo:rsid="48d517e3"/>
    </style:style>
    <style:style style:name="T87" style:family="text">
      <style:text-properties officeooo:rsid="4aca8049"/>
    </style:style>
    <style:style style:name="T88" style:family="text">
      <style:text-properties officeooo:rsid="48d556a8"/>
    </style:style>
    <style:style style:name="T89" style:family="text">
      <style:text-properties officeooo:rsid="48d6f6da"/>
    </style:style>
    <style:style style:name="T90" style:family="text">
      <style:text-properties officeooo:rsid="48d7ca56"/>
    </style:style>
    <style:style style:name="T91" style:family="text">
      <style:text-properties officeooo:rsid="48d8aeae"/>
    </style:style>
    <style:style style:name="T92" style:family="text">
      <style:text-properties officeooo:rsid="48df34bf"/>
    </style:style>
    <style:style style:name="T93" style:family="text">
      <style:text-properties officeooo:rsid="4ace005b"/>
    </style:style>
    <style:style style:name="T94" style:family="text">
      <style:text-properties officeooo:rsid="48c10327"/>
    </style:style>
    <style:style style:name="T95" style:family="text">
      <style:text-properties officeooo:rsid="4acffa65"/>
    </style:style>
    <style:style style:name="T96" style:family="text">
      <style:text-properties officeooo:rsid="4ad03cae"/>
    </style:style>
    <style:style style:name="T97" style:family="text">
      <style:text-properties officeooo:rsid="4ad05311"/>
    </style:style>
    <style:style style:name="T98" style:family="text">
      <style:text-properties officeooo:rsid="48c1dfb6"/>
    </style:style>
    <style:style style:name="T99" style:family="text">
      <style:text-properties officeooo:rsid="48c25250"/>
    </style:style>
    <style:style style:name="T100" style:family="text">
      <style:text-properties officeooo:rsid="4ad27dab"/>
    </style:style>
    <style:style style:name="T101" style:family="text">
      <style:text-properties officeooo:rsid="48c65a61"/>
    </style:style>
    <style:style style:name="T102" style:family="text">
      <style:text-properties officeooo:rsid="4ad73f7f"/>
    </style:style>
    <style:style style:name="T103" style:family="text">
      <style:text-properties officeooo:rsid="48c8301d"/>
    </style:style>
    <style:style style:name="T104" style:family="text">
      <style:text-properties officeooo:rsid="48cc1c5f"/>
    </style:style>
    <style:style style:name="T105" style:family="text">
      <style:text-properties officeooo:rsid="48cd787a"/>
    </style:style>
    <style:style style:name="T106" style:family="text">
      <style:text-properties officeooo:rsid="48dc7ac6"/>
    </style:style>
    <style:style style:name="T107" style:family="text">
      <style:text-properties officeooo:rsid="48dc88e3"/>
    </style:style>
    <style:style style:name="T108" style:family="text">
      <style:text-properties officeooo:rsid="48de7544"/>
    </style:style>
    <style:style style:name="T109" style:family="text">
      <style:text-properties officeooo:rsid="48dec0ad"/>
    </style:style>
    <style:style style:name="T110" style:family="text">
      <style:text-properties officeooo:rsid="48df630b"/>
    </style:style>
    <style:style style:name="T111" style:family="text">
      <style:text-properties officeooo:rsid="48df7aa2"/>
    </style:style>
    <style:style style:name="T112" style:family="text">
      <style:text-properties officeooo:rsid="48eefde7"/>
    </style:style>
    <style:style style:name="T113" style:family="text">
      <style:text-properties officeooo:rsid="48f0d50d"/>
    </style:style>
    <style:style style:name="T114" style:family="text">
      <style:text-properties officeooo:rsid="48f211b7"/>
    </style:style>
    <style:style style:name="T115" style:family="text">
      <style:text-properties officeooo:rsid="48f3819c"/>
    </style:style>
    <style:style style:name="T116" style:family="text">
      <style:text-properties officeooo:rsid="48f538b8"/>
    </style:style>
    <style:style style:name="T117" style:family="text">
      <style:text-properties officeooo:rsid="48f6732c"/>
    </style:style>
    <style:style style:name="T118" style:family="text">
      <style:text-properties officeooo:rsid="48f6d1eb"/>
    </style:style>
    <style:style style:name="T119" style:family="text">
      <style:text-properties officeooo:rsid="48e3942a"/>
    </style:style>
    <style:style style:name="T120" style:family="text">
      <style:text-properties officeooo:rsid="48f6ea38"/>
    </style:style>
    <style:style style:name="T121" style:family="text">
      <style:text-properties officeooo:rsid="48e689fd"/>
    </style:style>
    <style:style style:name="T122" style:family="text">
      <style:text-properties officeooo:rsid="48e7d1aa"/>
    </style:style>
    <style:style style:name="T123" style:family="text">
      <style:text-properties officeooo:rsid="48e8ac27"/>
    </style:style>
    <style:style style:name="T124" style:family="text">
      <style:text-properties officeooo:rsid="48e97378"/>
    </style:style>
    <style:style style:name="T125" style:family="text">
      <style:text-properties officeooo:rsid="48f814cc"/>
    </style:style>
    <style:style style:name="T126" style:family="text">
      <style:text-properties officeooo:rsid="48fbdbf5"/>
    </style:style>
    <style:style style:name="T127" style:family="text">
      <style:text-properties officeooo:rsid="48ff9171"/>
    </style:style>
    <style:style style:name="T128" style:family="text">
      <style:text-properties officeooo:rsid="4900d2f1"/>
    </style:style>
    <style:style style:name="T129" style:family="text">
      <style:text-properties officeooo:rsid="48ebca2c"/>
    </style:style>
    <style:style style:name="T130" style:family="text">
      <style:text-properties officeooo:rsid="46549c54"/>
    </style:style>
    <style:style style:name="T131" style:family="text">
      <style:text-properties officeooo:rsid="465594fc"/>
    </style:style>
    <style:style style:name="T132" style:family="text">
      <style:text-properties officeooo:rsid="46589931"/>
    </style:style>
    <style:style style:name="T133" style:family="text">
      <style:text-properties officeooo:rsid="465704d2"/>
    </style:style>
    <style:style style:name="T134" style:family="text">
      <style:text-properties officeooo:rsid="487b7f73"/>
    </style:style>
    <style:style style:name="T135" style:family="text">
      <style:text-properties officeooo:rsid="487cd1e0"/>
    </style:style>
    <style:style style:name="T136" style:family="text">
      <style:text-properties officeooo:rsid="487eb4a2"/>
    </style:style>
    <style:style style:name="T137" style:family="text">
      <style:text-properties officeooo:rsid="48807caf"/>
    </style:style>
    <style:style style:name="T138" style:family="text">
      <style:text-properties officeooo:rsid="48830c39"/>
    </style:style>
    <style:style style:name="T139" style:family="text">
      <style:text-properties officeooo:rsid="4901eb1b"/>
    </style:style>
    <style:style style:name="T140" style:family="text">
      <style:text-properties officeooo:rsid="4ac75df1"/>
    </style:style>
    <style:style style:name="T141" style:family="text">
      <style:text-properties officeooo:rsid="48730cc8"/>
    </style:style>
    <style:style style:name="T142" style:family="text">
      <style:text-properties officeooo:rsid="4ac80fb0"/>
    </style:style>
    <style:style style:name="T143" style:family="text">
      <style:text-properties officeooo:rsid="49ddbe82"/>
    </style:style>
    <style:style style:name="T144" style:family="text">
      <style:text-properties officeooo:rsid="48771521"/>
    </style:style>
    <style:style style:name="T145" style:family="text">
      <style:text-properties officeooo:rsid="48774787"/>
    </style:style>
    <style:style style:name="T146" style:family="text">
      <style:text-properties officeooo:rsid="48785a52"/>
    </style:style>
    <style:style style:name="T147" style:family="text">
      <style:text-properties style:text-position="super 58%"/>
    </style:style>
    <style:style style:name="T148" style:family="text">
      <style:text-properties officeooo:rsid="487b00e1"/>
    </style:style>
    <style:style style:name="T149" style:family="text">
      <style:text-properties officeooo:rsid="477d5c00"/>
    </style:style>
    <style:style style:name="T150" style:family="text">
      <style:text-properties officeooo:rsid="477e9855"/>
    </style:style>
    <style:style style:name="T151" style:family="text">
      <style:text-properties officeooo:rsid="2f2ab863"/>
    </style:style>
    <style:style style:name="T152" style:family="text">
      <style:text-properties officeooo:rsid="4665d3a7"/>
    </style:style>
    <style:style style:name="T153" style:family="text">
      <style:text-properties officeooo:rsid="42ad5a56"/>
    </style:style>
    <style:style style:name="T154" style:family="text">
      <style:text-properties officeooo:rsid="118edeab"/>
    </style:style>
    <style:style style:name="T155" style:family="text">
      <style:text-properties officeooo:rsid="12370198"/>
    </style:style>
    <style:style style:name="T156" style:family="text">
      <style:text-properties officeooo:rsid="2f5e25a9"/>
    </style:style>
    <style:style style:name="T157" style:family="text">
      <style:text-properties officeooo:rsid="2f5918e3"/>
    </style:style>
    <style:style style:name="T158" style:family="text">
      <style:text-properties officeooo:rsid="39c8919c"/>
    </style:style>
    <style:style style:name="T159" style:family="text">
      <style:text-properties officeooo:rsid="118f009e"/>
    </style:style>
    <style:style style:name="T160" style:family="text">
      <style:text-properties officeooo:rsid="118e8980"/>
    </style:style>
    <style:style style:name="T161" style:family="text">
      <style:text-properties officeooo:rsid="3a0fc36e"/>
    </style:style>
    <style:style style:name="T162" style:family="text">
      <style:text-properties officeooo:rsid="3a14a42f"/>
    </style:style>
    <style:style style:name="T163" style:family="text">
      <style:text-properties officeooo:rsid="3a10f212"/>
    </style:style>
    <style:style style:name="T164" style:family="text">
      <style:text-properties officeooo:rsid="3a12c3f2"/>
    </style:style>
    <style:style style:name="T165" style:family="text">
      <style:text-properties officeooo:rsid="4d2bff12"/>
    </style:style>
    <style:style style:name="T166" style:family="text">
      <style:text-properties officeooo:rsid="4d2a48bb"/>
    </style:style>
    <style:style style:name="T167" style:family="text">
      <style:text-properties officeooo:rsid="4751da57"/>
    </style:style>
    <style:style style:name="T168" style:family="text">
      <style:text-properties officeooo:rsid="47502cfa"/>
    </style:style>
    <style:style style:name="T169" style:family="text">
      <style:text-properties officeooo:rsid="47507328"/>
    </style:style>
    <style:style style:name="T170" style:family="text">
      <style:text-properties officeooo:rsid="2f5ec67b"/>
    </style:style>
    <style:style style:name="T171" style:family="text">
      <style:text-properties officeooo:rsid="2f5ab7e1"/>
    </style:style>
    <style:style style:name="T172" style:family="text">
      <style:text-properties officeooo:rsid="2f5c84b6"/>
    </style:style>
    <style:style style:name="T173" style:family="text">
      <style:text-properties officeooo:rsid="1190485e"/>
    </style:style>
    <style:style style:name="T174" style:family="text">
      <style:text-properties officeooo:rsid="4683cb7a"/>
    </style:style>
    <style:style style:name="T175" style:family="text">
      <style:text-properties officeooo:rsid="4d3fa796"/>
    </style:style>
    <style:style style:name="T176" style:family="text">
      <style:text-properties officeooo:rsid="475322f3"/>
    </style:style>
    <style:style style:name="T177" style:family="text">
      <style:text-properties officeooo:rsid="4d418c42"/>
    </style:style>
    <style:style style:name="T178" style:family="text">
      <style:text-properties officeooo:rsid="4cd0d807"/>
    </style:style>
    <style:style style:name="T179" style:family="text">
      <style:text-properties officeooo:rsid="46855b5b"/>
    </style:style>
    <style:style style:name="T180" style:family="text">
      <style:text-properties officeooo:rsid="4753d4cd"/>
    </style:style>
    <style:style style:name="T181" style:family="text">
      <style:text-properties officeooo:rsid="47549adb"/>
    </style:style>
    <style:style style:name="T182" style:family="text">
      <style:text-properties officeooo:rsid="4686fd78"/>
    </style:style>
    <style:style style:name="T183" style:family="text">
      <style:text-properties officeooo:rsid="475658ca"/>
    </style:style>
    <style:style style:name="T184" style:family="text">
      <style:text-properties officeooo:rsid="4ccc0cb2"/>
    </style:style>
    <style:style style:name="T185" style:family="text">
      <style:text-properties officeooo:rsid="468de3c7"/>
    </style:style>
    <style:style style:name="T186" style:family="text">
      <style:text-properties officeooo:rsid="4757a224"/>
    </style:style>
    <style:style style:name="T187" style:family="text">
      <style:text-properties officeooo:rsid="033b8e6c"/>
    </style:style>
    <style:style style:name="T188" style:family="text">
      <style:text-properties officeooo:rsid="12b6da91"/>
    </style:style>
    <style:style style:name="T189" style:family="text">
      <style:text-properties officeooo:rsid="39ce0536"/>
    </style:style>
    <style:style style:name="T190" style:family="text">
      <style:text-properties officeooo:rsid="12b8033a"/>
    </style:style>
    <style:style style:name="T191" style:family="text">
      <style:text-properties officeooo:rsid="0b6081e0"/>
    </style:style>
    <style:style style:name="T192" style:family="text">
      <style:text-properties officeooo:rsid="12bb7504"/>
    </style:style>
    <style:style style:name="T193" style:family="text">
      <style:text-properties officeooo:rsid="033dcffc"/>
    </style:style>
    <style:style style:name="T194" style:family="text">
      <style:text-properties officeooo:rsid="033de441"/>
    </style:style>
    <style:style style:name="T195" style:family="text">
      <style:text-properties officeooo:rsid="12b97f61"/>
    </style:style>
    <style:style style:name="T196" style:family="text">
      <style:text-properties officeooo:rsid="4cce6c9f"/>
    </style:style>
    <style:style style:name="T197" style:family="text">
      <style:text-properties officeooo:rsid="116e00af"/>
    </style:style>
    <style:style style:name="T198" style:family="text">
      <style:text-properties officeooo:rsid="0db7603f"/>
    </style:style>
    <style:style style:name="T199" style:family="text">
      <style:text-properties officeooo:rsid="12bbec35"/>
    </style:style>
    <style:style style:name="T200" style:family="text">
      <style:text-properties officeooo:rsid="12bd7a1a"/>
    </style:style>
    <style:style style:name="T201" style:family="text">
      <style:text-properties officeooo:rsid="23cf3857"/>
    </style:style>
    <style:style style:name="T202" style:family="text">
      <style:text-properties fo:background-color="transparent" loext:char-shading-value="0"/>
    </style:style>
    <style:style style:name="T203" style:family="text">
      <style:text-properties officeooo:rsid="0171d63e" fo:background-color="transparent" loext:char-shading-value="0"/>
    </style:style>
    <style:style style:name="T204" style:family="text">
      <style:text-properties officeooo:rsid="4d285f1b" fo:background-color="transparent" loext:char-shading-value="0"/>
    </style:style>
    <style:style style:name="T205" style:family="text">
      <style:text-properties officeooo:rsid="0d9cab80" fo:background-color="transparent" loext:char-shading-value="0"/>
    </style:style>
    <style:style style:name="T206" style:family="text">
      <style:text-properties officeooo:rsid="19c41855" fo:background-color="transparent" loext:char-shading-value="0"/>
    </style:style>
    <style:style style:name="T207" style:family="text">
      <style:text-properties officeooo:rsid="0fa88204" fo:background-color="transparent" loext:char-shading-value="0"/>
    </style:style>
    <style:style style:name="T208" style:family="text">
      <style:text-properties officeooo:rsid="17a43808" fo:background-color="transparent" loext:char-shading-value="0"/>
    </style:style>
    <style:style style:name="T209" style:family="text">
      <style:text-properties officeooo:rsid="22e76481" fo:background-color="transparent" loext:char-shading-value="0"/>
    </style:style>
    <style:style style:name="T210" style:family="text">
      <style:text-properties officeooo:rsid="22b9c43a" fo:background-color="transparent" loext:char-shading-value="0"/>
    </style:style>
    <style:style style:name="T211" style:family="text">
      <style:text-properties officeooo:rsid="22e80ef6" fo:background-color="transparent" loext:char-shading-value="0"/>
    </style:style>
    <style:style style:name="T212" style:family="text">
      <style:text-properties officeooo:rsid="22e612c2" fo:background-color="transparent" loext:char-shading-value="0"/>
    </style:style>
    <style:style style:name="T213" style:family="text">
      <style:text-properties officeooo:rsid="22b90e9b" fo:background-color="transparent" loext:char-shading-value="0"/>
    </style:style>
    <style:style style:name="T214" style:family="text">
      <style:text-properties officeooo:rsid="22eae525" fo:background-color="transparent" loext:char-shading-value="0"/>
    </style:style>
    <style:style style:name="T215" style:family="text">
      <style:text-properties officeooo:rsid="22e86733" fo:background-color="transparent" loext:char-shading-value="0"/>
    </style:style>
    <style:style style:name="T216" style:family="text">
      <style:text-properties officeooo:rsid="2307a449" fo:background-color="transparent" loext:char-shading-value="0"/>
    </style:style>
    <style:style style:name="T217" style:family="text">
      <style:text-properties officeooo:rsid="17a6a27f" fo:background-color="transparent" loext:char-shading-value="0"/>
    </style:style>
    <style:style style:name="T218" style:family="text">
      <style:text-properties officeooo:rsid="19eba86b" fo:background-color="transparent" loext:char-shading-value="0"/>
    </style:style>
    <style:style style:name="T219" style:family="text">
      <style:text-properties officeooo:rsid="23a94273" fo:background-color="transparent" loext:char-shading-value="0"/>
    </style:style>
    <style:style style:name="T220" style:family="text">
      <style:text-properties officeooo:rsid="4cd625ea" fo:background-color="transparent" loext:char-shading-value="0"/>
    </style:style>
    <style:style style:name="T221" style:family="text">
      <style:text-properties officeooo:rsid="2307a5b3" fo:background-color="transparent" loext:char-shading-value="0"/>
    </style:style>
    <style:style style:name="T222" style:family="text">
      <style:text-properties officeooo:rsid="19eb16bd" fo:background-color="transparent" loext:char-shading-value="0"/>
    </style:style>
    <style:style style:name="T223" style:family="text">
      <style:text-properties officeooo:rsid="23acf2e7" fo:background-color="transparent" loext:char-shading-value="0"/>
    </style:style>
    <style:style style:name="T224" style:family="text">
      <style:text-properties officeooo:rsid="19a76459" fo:background-color="transparent" loext:char-shading-value="0"/>
    </style:style>
    <style:style style:name="T225" style:family="text">
      <style:text-properties officeooo:rsid="23a9b95a" fo:background-color="transparent" loext:char-shading-value="0"/>
    </style:style>
    <style:style style:name="T226" style:family="text">
      <style:text-properties officeooo:rsid="22ee9d74" fo:background-color="transparent" loext:char-shading-value="0"/>
    </style:style>
    <style:style style:name="T227" style:family="text">
      <style:text-properties officeooo:rsid="1a68c937" fo:background-color="transparent" loext:char-shading-value="0"/>
    </style:style>
    <style:style style:name="T228" style:family="text">
      <style:text-properties officeooo:rsid="19a79887" fo:background-color="transparent" loext:char-shading-value="0"/>
    </style:style>
    <style:style style:name="T229" style:family="text">
      <style:text-properties officeooo:rsid="22bbc173" fo:background-color="transparent" loext:char-shading-value="0"/>
    </style:style>
    <style:style style:name="T230" style:family="text">
      <style:text-properties officeooo:rsid="19f0e30d" fo:background-color="transparent" loext:char-shading-value="0"/>
    </style:style>
    <style:style style:name="T231" style:family="text">
      <style:text-properties officeooo:rsid="3a298392" fo:background-color="transparent" loext:char-shading-value="0"/>
    </style:style>
    <style:style style:name="T232" style:family="text">
      <style:text-properties officeooo:rsid="4cd865c4" fo:background-color="transparent" loext:char-shading-value="0"/>
    </style:style>
    <style:style style:name="T233" style:family="text">
      <style:text-properties officeooo:rsid="4cdb4f3d" fo:background-color="transparent" loext:char-shading-value="0"/>
    </style:style>
    <style:style style:name="T234" style:family="text">
      <style:text-properties officeooo:rsid="230a925d" fo:background-color="transparent" loext:char-shading-value="0"/>
    </style:style>
    <style:style style:name="T235" style:family="text">
      <style:text-properties officeooo:rsid="4cda1607" fo:background-color="transparent" loext:char-shading-value="0"/>
    </style:style>
    <style:style style:name="T236" style:family="text">
      <style:text-properties officeooo:rsid="46a91e34" fo:background-color="transparent" loext:char-shading-value="0"/>
    </style:style>
    <style:style style:name="T237" style:family="text">
      <style:text-properties officeooo:rsid="3a2a56ff" fo:background-color="transparent" loext:char-shading-value="0"/>
    </style:style>
    <style:style style:name="T238" style:family="text">
      <style:text-properties officeooo:rsid="19f3c900" fo:background-color="transparent" loext:char-shading-value="0"/>
    </style:style>
    <style:style style:name="T239" style:family="text">
      <style:text-properties officeooo:rsid="46ab1897" fo:background-color="transparent" loext:char-shading-value="0"/>
    </style:style>
    <style:style style:name="T240" style:family="text">
      <style:text-properties officeooo:rsid="46aabd09" fo:background-color="transparent" loext:char-shading-value="0"/>
    </style:style>
    <style:style style:name="T241" style:family="text">
      <style:text-properties officeooo:rsid="19f5b4c9" fo:background-color="transparent" loext:char-shading-value="0"/>
    </style:style>
    <style:style style:name="T242" style:family="text">
      <style:text-properties officeooo:rsid="1a0edca1" fo:background-color="transparent" loext:char-shading-value="0"/>
    </style:style>
    <style:style style:name="T243" style:family="text">
      <style:text-properties officeooo:rsid="1a115e71" fo:background-color="transparent" loext:char-shading-value="0"/>
    </style:style>
    <style:style style:name="T244" style:family="text">
      <style:text-properties officeooo:rsid="1a6a2bcc" fo:background-color="transparent" loext:char-shading-value="0"/>
    </style:style>
    <style:style style:name="T245" style:family="text">
      <style:text-properties officeooo:rsid="1a13ae5b" fo:background-color="transparent" loext:char-shading-value="0"/>
    </style:style>
    <style:style style:name="T246" style:family="text">
      <style:text-properties officeooo:rsid="46ac5a9c" fo:background-color="transparent" loext:char-shading-value="0"/>
    </style:style>
    <style:style style:name="T247" style:family="text">
      <style:text-properties officeooo:rsid="22efbf01" fo:background-color="transparent" loext:char-shading-value="0"/>
    </style:style>
    <style:style style:name="T248" style:family="text">
      <style:text-properties officeooo:rsid="1a121c94" fo:background-color="transparent" loext:char-shading-value="0"/>
    </style:style>
    <style:style style:name="T249" style:family="text">
      <style:text-properties officeooo:rsid="22bf0862" fo:background-color="transparent" loext:char-shading-value="0"/>
    </style:style>
    <style:style style:name="T250" style:family="text">
      <style:text-properties officeooo:rsid="22f1656b" fo:background-color="transparent" loext:char-shading-value="0"/>
    </style:style>
    <style:style style:name="T251" style:family="text">
      <style:text-properties officeooo:rsid="22f32514" fo:background-color="transparent" loext:char-shading-value="0"/>
    </style:style>
    <style:style style:name="T252" style:family="text">
      <style:text-properties officeooo:rsid="2f7081d8" fo:background-color="transparent" loext:char-shading-value="0"/>
    </style:style>
    <style:style style:name="T253" style:family="text">
      <style:text-properties officeooo:rsid="23af118d" fo:background-color="transparent" loext:char-shading-value="0"/>
    </style:style>
    <style:style style:name="T254" style:family="text">
      <style:text-properties officeooo:rsid="3a2c2c08" fo:background-color="transparent" loext:char-shading-value="0"/>
    </style:style>
    <style:style style:name="T255" style:family="text">
      <style:text-properties officeooo:rsid="4cdd5ea9" fo:background-color="transparent" loext:char-shading-value="0"/>
    </style:style>
    <style:style style:name="T256" style:family="text">
      <style:text-properties officeooo:rsid="3a2de0e1" fo:background-color="transparent" loext:char-shading-value="0"/>
    </style:style>
    <style:style style:name="T257" style:family="text">
      <style:text-properties officeooo:rsid="22f2af19" fo:background-color="transparent" loext:char-shading-value="0"/>
    </style:style>
    <style:style style:name="T258" style:family="text">
      <style:text-properties officeooo:rsid="1a147dd5" fo:background-color="transparent" loext:char-shading-value="0"/>
    </style:style>
    <style:style style:name="T259" style:family="text">
      <style:text-properties officeooo:rsid="1a150318" fo:background-color="transparent" loext:char-shading-value="0"/>
    </style:style>
    <style:style style:name="T260" style:family="text">
      <style:text-properties officeooo:rsid="23b10d97" fo:background-color="transparent" loext:char-shading-value="0"/>
    </style:style>
    <style:style style:name="T261" style:family="text">
      <style:text-properties officeooo:rsid="23b244cc" fo:background-color="transparent" loext:char-shading-value="0"/>
    </style:style>
    <style:style style:name="T262" style:family="text">
      <style:text-properties officeooo:rsid="4ce27ad2" fo:background-color="transparent" loext:char-shading-value="0"/>
    </style:style>
    <style:style style:name="T263" style:family="text">
      <style:text-properties officeooo:rsid="4ce12fc7" fo:background-color="transparent" loext:char-shading-value="0"/>
    </style:style>
    <style:style style:name="T264" style:family="text">
      <style:text-properties officeooo:rsid="22d025b4" fo:background-color="transparent" loext:char-shading-value="0"/>
    </style:style>
    <style:style style:name="T265" style:family="text">
      <style:text-properties officeooo:rsid="42748ba9" fo:background-color="transparent" loext:char-shading-value="0"/>
    </style:style>
    <style:style style:name="T266" style:family="text">
      <style:text-properties officeooo:rsid="2f7337a2" fo:background-color="transparent" loext:char-shading-value="0"/>
    </style:style>
    <style:style style:name="T267" style:family="text">
      <style:text-properties officeooo:rsid="1a2215e9" fo:background-color="transparent" loext:char-shading-value="0"/>
    </style:style>
    <style:style style:name="T268" style:family="text">
      <style:text-properties officeooo:rsid="22c44304" fo:background-color="transparent" loext:char-shading-value="0"/>
    </style:style>
    <style:style style:name="T269" style:family="text">
      <style:text-properties officeooo:rsid="2f73ad5f" fo:background-color="transparent" loext:char-shading-value="0"/>
    </style:style>
    <style:style style:name="T270" style:family="text">
      <style:text-properties officeooo:rsid="22c5e130" fo:background-color="transparent" loext:char-shading-value="0"/>
    </style:style>
    <style:style style:name="T271" style:family="text">
      <style:text-properties officeooo:rsid="3a2e9384" fo:background-color="transparent" loext:char-shading-value="0"/>
    </style:style>
    <style:style style:name="T272" style:family="text">
      <style:text-properties officeooo:rsid="22d05d03" fo:background-color="transparent" loext:char-shading-value="0"/>
    </style:style>
    <style:style style:name="T273" style:family="text">
      <style:text-properties officeooo:rsid="22fa1993" fo:background-color="transparent" loext:char-shading-value="0"/>
    </style:style>
    <style:style style:name="T274" style:family="text">
      <style:text-properties officeooo:rsid="23b72bbd" fo:background-color="transparent" loext:char-shading-value="0"/>
    </style:style>
    <style:style style:name="T275" style:family="text">
      <style:text-properties officeooo:rsid="22fb0d78" fo:background-color="transparent" loext:char-shading-value="0"/>
    </style:style>
    <style:style style:name="T276" style:family="text">
      <style:text-properties officeooo:rsid="23069c12" fo:background-color="transparent" loext:char-shading-value="0"/>
    </style:style>
    <style:style style:name="T277" style:family="text">
      <style:text-properties officeooo:rsid="2f74df6b" fo:background-color="transparent" loext:char-shading-value="0"/>
    </style:style>
    <style:style style:name="T278" style:family="text">
      <style:text-properties officeooo:rsid="23b5358b" fo:background-color="transparent" loext:char-shading-value="0"/>
    </style:style>
    <style:style style:name="T279" style:family="text">
      <style:text-properties officeooo:rsid="46ace795" fo:background-color="transparent" loext:char-shading-value="0"/>
    </style:style>
    <style:style style:name="T280" style:family="text">
      <style:text-properties officeooo:rsid="22fc2170" fo:background-color="transparent" loext:char-shading-value="0"/>
    </style:style>
    <style:style style:name="T281" style:family="text">
      <style:text-properties officeooo:rsid="2f75d424" fo:background-color="transparent" loext:char-shading-value="0"/>
    </style:style>
    <style:style style:name="T282" style:family="text">
      <style:text-properties officeooo:rsid="230bee48" fo:background-color="transparent" loext:char-shading-value="0"/>
    </style:style>
    <style:style style:name="T283" style:family="text">
      <style:text-properties officeooo:rsid="22fdf51d" fo:background-color="transparent" loext:char-shading-value="0"/>
    </style:style>
    <style:style style:name="T284" style:family="text">
      <style:text-properties officeooo:rsid="427678aa" fo:background-color="transparent" loext:char-shading-value="0"/>
    </style:style>
    <style:style style:name="T285" style:family="text">
      <style:text-properties officeooo:rsid="469e0a7e" fo:background-color="transparent" loext:char-shading-value="0"/>
    </style:style>
    <style:style style:name="T286" style:family="text">
      <style:text-properties officeooo:rsid="2efceec0" fo:background-color="transparent" loext:char-shading-value="0"/>
    </style:style>
    <style:style style:name="T287" style:family="text">
      <style:text-properties officeooo:rsid="2f23789a" fo:background-color="transparent" loext:char-shading-value="0"/>
    </style:style>
    <style:style style:name="T288" style:family="text">
      <style:text-properties officeooo:rsid="39fde288" fo:background-color="transparent" loext:char-shading-value="0"/>
    </style:style>
    <style:style style:name="T289" style:family="text">
      <style:text-properties officeooo:rsid="2f247506" fo:background-color="transparent" loext:char-shading-value="0"/>
    </style:style>
    <style:style style:name="T290" style:family="text">
      <style:text-properties officeooo:rsid="47357174" fo:background-color="transparent" loext:char-shading-value="0"/>
    </style:style>
    <style:style style:name="T291" style:family="text">
      <style:text-properties officeooo:rsid="2f48b0ee" fo:background-color="transparent" loext:char-shading-value="0"/>
    </style:style>
    <style:style style:name="T292" style:family="text">
      <style:text-properties officeooo:rsid="473f7a21" fo:background-color="transparent" loext:char-shading-value="0"/>
    </style:style>
    <style:style style:name="T293" style:family="text">
      <style:text-properties officeooo:rsid="2f384f5c" fo:background-color="transparent" loext:char-shading-value="0"/>
    </style:style>
    <style:style style:name="T294" style:family="text">
      <style:text-properties officeooo:rsid="2f188132" fo:background-color="transparent" loext:char-shading-value="0"/>
    </style:style>
    <style:style style:name="T295" style:family="text">
      <style:text-properties officeooo:rsid="47224eff" fo:background-color="transparent" loext:char-shading-value="0"/>
    </style:style>
    <style:style style:name="T296" style:family="text">
      <style:text-properties officeooo:rsid="47326d44" fo:background-color="transparent" loext:char-shading-value="0"/>
    </style:style>
    <style:style style:name="T297" style:family="text">
      <style:text-properties officeooo:rsid="2f0f1012" fo:background-color="transparent" loext:char-shading-value="0"/>
    </style:style>
    <style:style style:name="T298" style:family="text">
      <style:text-properties officeooo:rsid="2ee7778c" fo:background-color="transparent" loext:char-shading-value="0"/>
    </style:style>
    <style:style style:name="T299" style:family="text">
      <style:text-properties officeooo:rsid="2ef5b3c2" fo:background-color="transparent" loext:char-shading-value="0"/>
    </style:style>
    <style:style style:name="T300" style:family="text">
      <style:text-properties officeooo:rsid="2f27ca6a" fo:background-color="transparent" loext:char-shading-value="0"/>
    </style:style>
    <style:style style:name="T301" style:family="text">
      <style:text-properties officeooo:rsid="2ef0c567" fo:background-color="transparent" loext:char-shading-value="0"/>
    </style:style>
    <style:style style:name="T302" style:family="text">
      <style:text-properties officeooo:rsid="2f20c6b1" fo:background-color="transparent" loext:char-shading-value="0"/>
    </style:style>
    <style:style style:name="T303" style:family="text">
      <style:text-properties officeooo:rsid="2f1abc92" fo:background-color="transparent" loext:char-shading-value="0"/>
    </style:style>
    <style:style style:name="T304" style:family="text">
      <style:text-properties officeooo:rsid="39d5545c" fo:background-color="transparent" loext:char-shading-value="0"/>
    </style:style>
    <style:style style:name="T305" style:family="text">
      <style:text-properties officeooo:rsid="12a63723" fo:background-color="transparent" loext:char-shading-value="0"/>
    </style:style>
    <style:style style:name="T306" style:family="text">
      <style:text-properties officeooo:rsid="463ceb4a" fo:background-color="transparent" loext:char-shading-value="0"/>
    </style:style>
    <style:style style:name="T307" style:family="text">
      <style:text-properties officeooo:rsid="115d7daf" fo:background-color="transparent" loext:char-shading-value="0"/>
    </style:style>
    <style:style style:name="T308" style:family="text">
      <style:text-properties officeooo:rsid="463104a5" fo:background-color="transparent" loext:char-shading-value="0"/>
    </style:style>
    <style:style style:name="T309" style:family="text">
      <style:text-properties officeooo:rsid="4cb3f0b7" fo:background-color="transparent" loext:char-shading-value="0"/>
    </style:style>
    <style:style style:name="T310" style:family="text">
      <style:text-properties officeooo:rsid="46720975" fo:background-color="transparent" loext:char-shading-value="0"/>
    </style:style>
    <style:style style:name="T311" style:family="text">
      <style:text-properties officeooo:rsid="463bb85a" fo:background-color="transparent" loext:char-shading-value="0"/>
    </style:style>
    <style:style style:name="T312" style:family="text">
      <style:text-properties officeooo:rsid="0171d63e"/>
    </style:style>
    <style:style style:name="T313" style:family="text">
      <style:text-properties officeooo:rsid="4cd2a21c"/>
    </style:style>
    <style:style style:name="T314" style:family="text">
      <style:text-properties officeooo:rsid="083be16e"/>
    </style:style>
    <style:style style:name="T315" style:family="text">
      <style:text-properties officeooo:rsid="22aa0476"/>
    </style:style>
    <style:style style:name="T316" style:family="text">
      <style:text-properties officeooo:rsid="083c302f"/>
    </style:style>
    <style:style style:name="T317" style:family="text">
      <style:text-properties officeooo:rsid="109836b2"/>
    </style:style>
    <style:style style:name="T318" style:family="text">
      <style:text-properties officeooo:rsid="178404cf"/>
    </style:style>
    <style:style style:name="T319" style:family="text">
      <style:text-properties officeooo:rsid="1788fa17"/>
    </style:style>
    <style:style style:name="T320" style:family="text">
      <style:text-properties officeooo:rsid="19c97680"/>
    </style:style>
    <style:style style:name="T321" style:family="text">
      <style:text-properties officeooo:rsid="19c98136"/>
    </style:style>
    <style:style style:name="T322" style:family="text">
      <style:text-properties officeooo:rsid="19cafc43"/>
    </style:style>
    <style:style style:name="T323" style:family="text">
      <style:text-properties officeooo:rsid="19ca472c"/>
    </style:style>
    <style:style style:name="T324" style:family="text">
      <style:text-properties officeooo:rsid="2396eaed"/>
    </style:style>
    <style:style style:name="T325" style:family="text">
      <style:text-properties officeooo:rsid="238ff50e"/>
    </style:style>
    <style:style style:name="T326" style:family="text">
      <style:text-properties officeooo:rsid="23957e47"/>
    </style:style>
    <style:style style:name="T327" style:family="text">
      <style:text-properties officeooo:rsid="239114cb"/>
    </style:style>
    <style:style style:name="T328" style:family="text">
      <style:text-properties officeooo:rsid="440ccb1c"/>
    </style:style>
    <style:style style:name="T329" style:family="text">
      <style:text-properties officeooo:rsid="2397606e"/>
    </style:style>
    <style:style style:name="T330" style:family="text">
      <style:text-properties officeooo:rsid="46a4fa86"/>
    </style:style>
    <style:style style:name="T331" style:family="text">
      <style:text-properties officeooo:rsid="23918adc"/>
    </style:style>
    <style:style style:name="T332" style:family="text">
      <style:text-properties officeooo:rsid="2399627c"/>
    </style:style>
    <style:style style:name="T333" style:family="text">
      <style:text-properties officeooo:rsid="239aecaa"/>
    </style:style>
    <style:style style:name="T334" style:family="text">
      <style:text-properties officeooo:rsid="239b80c3"/>
    </style:style>
    <style:style style:name="T335" style:family="text">
      <style:text-properties officeooo:rsid="239bef7c"/>
    </style:style>
    <style:style style:name="T336" style:family="text">
      <style:text-properties officeooo:rsid="23930686"/>
    </style:style>
    <style:style style:name="T337" style:family="text">
      <style:text-properties officeooo:rsid="239cc9b0"/>
    </style:style>
    <style:style style:name="T338" style:family="text">
      <style:text-properties officeooo:rsid="23021ade"/>
    </style:style>
    <style:style style:name="T339" style:family="text">
      <style:text-properties officeooo:rsid="230406e1"/>
    </style:style>
    <style:style style:name="T340" style:family="text">
      <style:text-properties officeooo:rsid="239518df"/>
    </style:style>
    <style:style style:name="T341" style:family="text">
      <style:text-properties officeooo:rsid="239d5565"/>
    </style:style>
    <style:style style:name="T342" style:family="text">
      <style:text-properties officeooo:rsid="23049ef3"/>
    </style:style>
    <style:style style:name="T343" style:family="text">
      <style:text-properties officeooo:rsid="239e7698"/>
    </style:style>
    <style:style style:name="T344" style:family="text">
      <style:text-properties officeooo:rsid="23069c12"/>
    </style:style>
    <style:style style:name="T345" style:family="text">
      <style:text-properties officeooo:rsid="22ae796c"/>
    </style:style>
    <style:style style:name="T346" style:family="text">
      <style:text-properties officeooo:rsid="22af66fd"/>
    </style:style>
    <style:style style:name="T347" style:family="text">
      <style:text-properties officeooo:rsid="19cd0fb6"/>
    </style:style>
    <style:style style:name="T348" style:family="text">
      <style:text-properties officeooo:rsid="23a36a23"/>
    </style:style>
    <style:style style:name="T349" style:family="text">
      <style:text-properties officeooo:rsid="22da6eb4"/>
    </style:style>
    <style:style style:name="T350" style:family="text">
      <style:text-properties officeooo:rsid="22d9f353"/>
    </style:style>
    <style:style style:name="T351" style:family="text">
      <style:text-properties officeooo:rsid="22dad173"/>
    </style:style>
    <style:style style:name="T352" style:family="text">
      <style:text-properties officeooo:rsid="22df50b7"/>
    </style:style>
    <style:style style:name="T353" style:family="text">
      <style:text-properties officeooo:rsid="19ce7b04"/>
    </style:style>
    <style:style style:name="T354" style:family="text">
      <style:text-properties officeooo:rsid="0fa8c407"/>
    </style:style>
    <style:style style:name="T355" style:family="text">
      <style:text-properties officeooo:rsid="19d05e50"/>
    </style:style>
    <style:style style:name="T356" style:family="text">
      <style:text-properties officeooo:rsid="0fa88204"/>
    </style:style>
    <style:style style:name="T357" style:family="text">
      <style:text-properties officeooo:rsid="178425f9"/>
    </style:style>
    <style:style style:name="T358" style:family="text">
      <style:text-properties officeooo:rsid="1789f1fd"/>
    </style:style>
    <style:style style:name="T359" style:family="text">
      <style:text-properties officeooo:rsid="440f082c"/>
    </style:style>
    <style:style style:name="T360" style:family="text">
      <style:text-properties officeooo:rsid="23aafeed"/>
    </style:style>
    <style:style style:name="T361" style:family="text">
      <style:text-properties officeooo:rsid="178b9f59"/>
    </style:style>
    <style:style style:name="T362" style:family="text">
      <style:text-properties officeooo:rsid="19d244bc"/>
    </style:style>
    <style:style style:name="T363" style:family="text">
      <style:text-properties officeooo:rsid="19d35df8"/>
    </style:style>
    <style:style style:name="T364" style:family="text">
      <style:text-properties officeooo:rsid="1791af75"/>
    </style:style>
    <style:style style:name="T365" style:family="text">
      <style:text-properties officeooo:rsid="19a2af93"/>
    </style:style>
    <style:style style:name="T366" style:family="text">
      <style:text-properties officeooo:rsid="19a2f852"/>
    </style:style>
    <style:style style:name="T367" style:family="text">
      <style:text-properties officeooo:rsid="17952d4b"/>
    </style:style>
    <style:style style:name="T368" style:family="text">
      <style:text-properties officeooo:rsid="19d83101"/>
    </style:style>
    <style:style style:name="T369" style:family="text">
      <style:text-properties officeooo:rsid="3a214b26"/>
    </style:style>
    <style:style style:name="T370" style:family="text">
      <style:text-properties officeooo:rsid="19dbfc9c"/>
    </style:style>
    <style:style style:name="T371" style:family="text">
      <style:text-properties officeooo:rsid="19d98cbb"/>
    </style:style>
    <style:style style:name="T372" style:family="text">
      <style:text-properties officeooo:rsid="19db85f5"/>
    </style:style>
    <style:style style:name="T373" style:family="text">
      <style:text-properties officeooo:rsid="19ddb50f"/>
    </style:style>
    <style:style style:name="T374" style:family="text">
      <style:text-properties officeooo:rsid="46a594d6"/>
    </style:style>
    <style:style style:name="T375" style:family="text">
      <style:text-properties officeooo:rsid="1a56ed2e"/>
    </style:style>
    <style:style style:name="T376" style:family="text">
      <style:text-properties officeooo:rsid="19df18a5"/>
    </style:style>
    <style:style style:name="T377" style:family="text">
      <style:text-properties officeooo:rsid="19df65d5"/>
    </style:style>
    <style:style style:name="T378" style:family="text">
      <style:text-properties officeooo:rsid="19dfae63"/>
    </style:style>
    <style:style style:name="T379" style:family="text">
      <style:text-properties officeooo:rsid="1a579dc4"/>
    </style:style>
    <style:style style:name="T380" style:family="text">
      <style:text-properties officeooo:rsid="1a59bf9e"/>
    </style:style>
    <style:style style:name="T381" style:family="text">
      <style:text-properties officeooo:rsid="22b1e5b2"/>
    </style:style>
    <style:style style:name="T382" style:family="text">
      <style:text-properties officeooo:rsid="1a5b8de1"/>
    </style:style>
    <style:style style:name="T383" style:family="text">
      <style:text-properties officeooo:rsid="22de6d8c"/>
    </style:style>
    <style:style style:name="T384" style:family="text">
      <style:text-properties officeooo:rsid="19e28359"/>
    </style:style>
    <style:style style:name="T385" style:family="text">
      <style:text-properties officeooo:rsid="1a5db877"/>
    </style:style>
    <style:style style:name="T386" style:family="text">
      <style:text-properties officeooo:rsid="17970749"/>
    </style:style>
    <style:style style:name="T387" style:family="text">
      <style:text-properties officeooo:rsid="17982552"/>
    </style:style>
    <style:style style:name="T388" style:family="text">
      <style:text-properties officeooo:rsid="178d1619"/>
    </style:style>
    <style:style style:name="T389" style:family="text">
      <style:text-properties officeooo:rsid="4410d184"/>
    </style:style>
    <style:style style:name="T390" style:family="text">
      <style:text-properties officeooo:rsid="1a5ff3e0"/>
    </style:style>
    <style:style style:name="T391" style:family="text">
      <style:text-properties officeooo:rsid="1a62484b"/>
    </style:style>
    <style:style style:name="T392" style:family="text">
      <style:text-properties officeooo:rsid="1a615a5b"/>
    </style:style>
    <style:style style:name="T393" style:family="text">
      <style:text-properties officeooo:rsid="19e47f0e"/>
    </style:style>
    <style:style style:name="T394" style:family="text">
      <style:text-properties officeooo:rsid="1a5f7722"/>
    </style:style>
    <style:style style:name="T395" style:family="text">
      <style:text-properties officeooo:rsid="23a56ecb"/>
    </style:style>
    <style:style style:name="T396" style:family="text">
      <style:text-properties officeooo:rsid="1a62a8ee"/>
    </style:style>
    <style:style style:name="T397" style:family="text">
      <style:text-properties officeooo:rsid="2f688138"/>
    </style:style>
    <style:style style:name="T398" style:family="text">
      <style:text-properties officeooo:rsid="3a22717e"/>
    </style:style>
    <style:style style:name="T399" style:family="text">
      <style:text-properties officeooo:rsid="3a23ca06"/>
    </style:style>
    <style:style style:name="T400" style:family="text">
      <style:text-properties officeooo:rsid="19e4dc0e"/>
    </style:style>
    <style:style style:name="T401" style:family="text">
      <style:text-properties officeooo:rsid="1799646c"/>
    </style:style>
    <style:style style:name="T402" style:family="text">
      <style:text-properties officeooo:rsid="22b6711f"/>
    </style:style>
    <style:style style:name="T403" style:family="text">
      <style:text-properties officeooo:rsid="1a65901a"/>
    </style:style>
    <style:style style:name="T404" style:family="text">
      <style:text-properties officeooo:rsid="179c6dbd"/>
    </style:style>
    <style:style style:name="T405" style:family="text">
      <style:text-properties officeooo:rsid="19e60890"/>
    </style:style>
    <style:style style:name="T406" style:family="text">
      <style:text-properties officeooo:rsid="1a667d87"/>
    </style:style>
    <style:style style:name="T407" style:family="text">
      <style:text-properties officeooo:rsid="23a63e0e"/>
    </style:style>
    <style:style style:name="T408" style:family="text">
      <style:text-properties officeooo:rsid="179b4d06"/>
    </style:style>
    <style:style style:name="T409" style:family="text">
      <style:text-properties officeooo:rsid="19e7d6a5"/>
    </style:style>
    <style:style style:name="T410" style:family="text">
      <style:text-properties officeooo:rsid="46a64fba"/>
    </style:style>
    <style:style style:name="T411" style:family="text">
      <style:text-properties officeooo:rsid="2f6a76ba"/>
    </style:style>
    <style:style style:name="T412" style:family="text">
      <style:text-properties officeooo:rsid="2f6bb9f2"/>
    </style:style>
    <style:style style:name="T413" style:family="text">
      <style:text-properties officeooo:rsid="3a272d8d"/>
    </style:style>
    <style:style style:name="T414" style:family="text">
      <style:text-properties officeooo:rsid="2f6de8d5"/>
    </style:style>
    <style:style style:name="T415" style:family="text">
      <style:text-properties officeooo:rsid="2f6c07dc"/>
    </style:style>
    <style:style style:name="T416" style:family="text">
      <style:text-properties officeooo:rsid="3a259753"/>
    </style:style>
    <style:style style:name="T417" style:family="text">
      <style:text-properties officeooo:rsid="22b4adb2"/>
    </style:style>
    <style:style style:name="T418" style:family="text">
      <style:text-properties officeooo:rsid="22e149d1"/>
    </style:style>
    <style:style style:name="T419" style:family="text">
      <style:text-properties officeooo:rsid="22e49a0d"/>
    </style:style>
    <style:style style:name="T420" style:family="text">
      <style:text-properties officeooo:rsid="22e2c980"/>
    </style:style>
    <style:style style:name="T421" style:family="text">
      <style:text-properties officeooo:rsid="46a78d80"/>
    </style:style>
    <style:style style:name="T422" style:family="text">
      <style:text-properties officeooo:rsid="4cd4bff1"/>
    </style:style>
    <style:style style:name="T423" style:family="text">
      <style:text-properties officeooo:rsid="109b12cb"/>
    </style:style>
    <style:style style:name="T424" style:family="text">
      <style:text-properties officeooo:rsid="178f2ad5"/>
    </style:style>
    <style:style style:name="T425" style:family="text">
      <style:text-properties officeooo:rsid="22b76dfe"/>
    </style:style>
    <style:style style:name="T426" style:family="text">
      <style:text-properties officeooo:rsid="23a6d9ef"/>
    </style:style>
    <style:style style:name="T427" style:family="text">
      <style:text-properties officeooo:rsid="0fa92dcb"/>
    </style:style>
    <style:style style:name="T428" style:family="text">
      <style:text-properties officeooo:rsid="2306de9b"/>
    </style:style>
    <style:style style:name="T429" style:family="text">
      <style:text-properties officeooo:rsid="23a8a350"/>
    </style:style>
    <style:style style:name="T430" style:family="text">
      <style:text-properties officeooo:rsid="0fab6f62"/>
    </style:style>
    <style:style style:name="T431" style:family="text">
      <style:text-properties officeooo:rsid="0fa9dcb9"/>
    </style:style>
    <style:style style:name="T432" style:family="text">
      <style:text-properties officeooo:rsid="23b93080"/>
    </style:style>
    <style:style style:name="T433" style:family="text">
      <style:text-properties officeooo:rsid="23b8821b"/>
    </style:style>
    <style:style style:name="T434" style:family="text">
      <style:text-properties officeooo:rsid="3a3082d8"/>
    </style:style>
    <style:style style:name="T435" style:family="text">
      <style:text-properties officeooo:rsid="4411c31c"/>
    </style:style>
    <style:style style:name="T436" style:family="text">
      <style:text-properties officeooo:rsid="23bc78c8"/>
    </style:style>
    <style:style style:name="T437" style:family="text">
      <style:text-properties officeooo:rsid="3a326114"/>
    </style:style>
    <style:style style:name="T438" style:family="text">
      <style:text-properties officeooo:rsid="2f75d4df"/>
    </style:style>
    <style:style style:name="T439" style:family="text">
      <style:text-properties officeooo:rsid="2f76e7ee"/>
    </style:style>
    <style:style style:name="T440" style:family="text">
      <style:text-properties officeooo:rsid="23c1a36e"/>
    </style:style>
    <style:style style:name="T441" style:family="text">
      <style:text-properties officeooo:rsid="4276fb13"/>
    </style:style>
    <style:style style:name="T442" style:family="text">
      <style:text-properties officeooo:rsid="4ce5077b"/>
    </style:style>
    <style:style style:name="T443" style:family="text">
      <style:text-properties officeooo:rsid="4413a34f"/>
    </style:style>
    <style:style style:name="T444" style:family="text">
      <style:text-properties officeooo:rsid="46ae5037"/>
    </style:style>
    <style:style style:name="T445" style:family="text">
      <style:text-properties officeooo:rsid="42774fc1"/>
    </style:style>
    <style:style style:name="T446" style:family="text">
      <style:text-properties officeooo:rsid="4413d2cf"/>
    </style:style>
    <style:style style:name="T447" style:family="text">
      <style:text-properties officeooo:rsid="46af39d7"/>
    </style:style>
    <style:style style:name="T448" style:family="text">
      <style:text-properties officeooo:rsid="46b352df"/>
    </style:style>
    <style:style style:name="T449" style:family="text">
      <style:text-properties officeooo:rsid="4ce8bdd8"/>
    </style:style>
    <style:style style:name="T450" style:family="text">
      <style:text-properties officeooo:rsid="46afd6c8"/>
    </style:style>
    <style:style style:name="T451" style:family="text">
      <style:text-properties officeooo:rsid="46af57d0"/>
    </style:style>
    <style:style style:name="T452" style:family="text">
      <style:text-properties officeooo:rsid="46b162cb"/>
    </style:style>
    <style:style style:name="T453" style:family="text">
      <style:text-properties officeooo:rsid="46b4c8c1"/>
    </style:style>
    <style:style style:name="T454" style:family="text">
      <style:text-properties officeooo:rsid="46b678d1"/>
    </style:style>
    <style:style style:name="T455" style:family="text">
      <style:text-properties officeooo:rsid="4cecd846"/>
    </style:style>
    <style:style style:name="T456" style:family="text">
      <style:text-properties officeooo:rsid="4ceaa07c"/>
    </style:style>
    <style:style style:name="T457" style:family="text">
      <style:text-properties officeooo:rsid="4cedc89f"/>
    </style:style>
    <style:style style:name="T458" style:family="text">
      <style:text-properties officeooo:rsid="4cec56a6"/>
    </style:style>
    <style:style style:name="T459" style:family="text">
      <style:text-properties officeooo:rsid="4cef7873"/>
    </style:style>
    <style:style style:name="T460" style:family="text">
      <style:text-properties officeooo:rsid="46b7a206"/>
    </style:style>
    <style:style style:name="T461" style:family="text">
      <style:text-properties officeooo:rsid="46b91980"/>
    </style:style>
    <style:style style:name="T462" style:family="text">
      <style:text-properties officeooo:rsid="4cf15d33"/>
    </style:style>
    <style:style style:name="T463" style:family="text">
      <style:text-properties officeooo:rsid="46ba290f"/>
    </style:style>
    <style:style style:name="T464" style:family="text">
      <style:text-properties officeooo:rsid="46c0c60b"/>
    </style:style>
    <style:style style:name="T465" style:family="text">
      <style:text-properties officeooo:rsid="46bdc260"/>
    </style:style>
    <style:style style:name="T466" style:family="text">
      <style:text-properties officeooo:rsid="46be93ee"/>
    </style:style>
    <style:style style:name="T467" style:family="text">
      <style:text-properties officeooo:rsid="46bc0275"/>
    </style:style>
    <style:style style:name="T468" style:family="text">
      <style:text-properties officeooo:rsid="46bcdf4d"/>
    </style:style>
    <style:style style:name="T469" style:family="text">
      <style:text-properties officeooo:rsid="46c2782e"/>
    </style:style>
    <style:style style:name="T470" style:family="text">
      <style:text-properties officeooo:rsid="46c28caf"/>
    </style:style>
    <style:style style:name="T471" style:family="text">
      <style:text-properties officeooo:rsid="46bfee56"/>
    </style:style>
    <style:style style:name="T472" style:family="text">
      <style:text-properties officeooo:rsid="46c30326"/>
    </style:style>
    <style:style style:name="T473" style:family="text">
      <style:text-properties officeooo:rsid="4cf3bbb5"/>
    </style:style>
    <style:style style:name="T474" style:family="text">
      <style:text-properties officeooo:rsid="2f78dd10"/>
    </style:style>
    <style:style style:name="T475" style:family="text">
      <style:text-properties officeooo:rsid="1a0215d2"/>
    </style:style>
    <style:style style:name="T476" style:family="text">
      <style:text-properties officeooo:rsid="1a03a995"/>
    </style:style>
    <style:style style:name="T477" style:family="text">
      <style:text-properties officeooo:rsid="22d25d23"/>
    </style:style>
    <style:style style:name="T478" style:family="text">
      <style:text-properties officeooo:rsid="230cd656"/>
    </style:style>
    <style:style style:name="T479" style:family="text">
      <style:text-properties officeooo:rsid="22d2ce17"/>
    </style:style>
    <style:style style:name="T480" style:family="text">
      <style:text-properties officeooo:rsid="1a0bfe25"/>
    </style:style>
    <style:style style:name="T481" style:family="text">
      <style:text-properties officeooo:rsid="3a351c0d"/>
    </style:style>
    <style:style style:name="T482" style:family="text">
      <style:text-properties officeooo:rsid="22d4abe6"/>
    </style:style>
    <style:style style:name="T483" style:family="text">
      <style:text-properties officeooo:rsid="22f43b80"/>
    </style:style>
    <style:style style:name="T484" style:family="text">
      <style:text-properties officeooo:rsid="1a237595"/>
    </style:style>
    <style:style style:name="T485" style:family="text">
      <style:text-properties officeooo:rsid="4279b3ab"/>
    </style:style>
    <style:style style:name="T486" style:family="text">
      <style:text-properties officeooo:rsid="22d600c7"/>
    </style:style>
    <style:style style:name="T487" style:family="text">
      <style:text-properties officeooo:rsid="2f7ab864"/>
    </style:style>
    <style:style style:name="T488" style:family="text">
      <style:text-properties officeooo:rsid="427ac7b7"/>
    </style:style>
    <style:style style:name="T489" style:family="text">
      <style:text-properties officeooo:rsid="230f6487"/>
    </style:style>
    <style:style style:name="T490" style:family="text">
      <style:text-properties officeooo:rsid="427bc59d"/>
    </style:style>
    <style:style style:name="T491" style:family="text">
      <style:text-properties officeooo:rsid="1a03e45f"/>
    </style:style>
    <style:style style:name="T492" style:family="text">
      <style:text-properties officeooo:rsid="1a05c394"/>
    </style:style>
    <style:style style:name="T493" style:family="text">
      <style:text-properties officeooo:rsid="3a375af7"/>
    </style:style>
    <style:style style:name="T494" style:family="text">
      <style:text-properties officeooo:rsid="3a3981d2"/>
    </style:style>
    <style:style style:name="T495" style:family="text">
      <style:text-properties fo:font-variant="normal" fo:text-transform="none" fo:color="#111111" loext:opacity="100%" style:font-name="Garamond"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96" style:family="text">
      <style:text-properties fo:font-variant="normal" fo:text-transform="none" fo:color="#111111" loext:opacity="100%" style:font-name="Garamond" fo:font-size="10pt" fo:letter-spacing="normal" fo:font-style="normal" style:text-underline-style="none" fo:font-weight="normal" officeooo:rsid="231966dc" style:font-size-asian="10pt" style:font-style-asian="normal" style:font-weight-asian="normal" style:font-size-complex="10pt" style:font-style-complex="normal" style:font-weight-complex="normal"/>
    </style:style>
    <style:style style:name="T497" style:family="text">
      <style:text-properties fo:font-variant="normal" fo:text-transform="none" fo:color="#111111" loext:opacity="100%" style:font-name="Garamond" fo:font-size="10pt" fo:letter-spacing="normal" fo:font-style="normal" style:text-underline-style="none" fo:font-weight="normal" officeooo:rsid="46c3814a" style:font-size-asian="10pt" style:font-style-asian="normal" style:font-weight-asian="normal" style:font-size-complex="10pt" style:font-style-complex="normal" style:font-weight-complex="normal"/>
    </style:style>
    <style:style style:name="T498" style:family="text">
      <style:text-properties fo:font-variant="normal" fo:text-transform="none" fo:color="#111111" loext:opacity="100%" style:font-name="Garamond" fo:font-size="10pt" fo:letter-spacing="normal" fo:font-style="normal" style:text-underline-style="none" fo:font-weight="normal" officeooo:rsid="23c6c811" style:font-size-asian="10pt" style:font-style-asian="normal" style:font-weight-asian="normal" style:font-size-complex="10pt" style:font-style-complex="normal" style:font-weight-complex="normal"/>
    </style:style>
    <style:style style:name="T499" style:family="text">
      <style:text-properties fo:font-variant="normal" fo:text-transform="none" fo:color="#111111" loext:opacity="100%" style:font-name="Garamond" fo:font-size="10pt" fo:letter-spacing="normal" fo:font-style="normal" style:text-underline-style="none" fo:font-weight="normal" officeooo:rsid="46c4dff1" style:font-size-asian="10pt" style:font-style-asian="normal" style:font-weight-asian="normal" style:font-size-complex="10pt" style:font-style-complex="normal" style:font-weight-complex="normal"/>
    </style:style>
    <style:style style:name="T500" style:family="text">
      <style:text-properties fo:font-variant="normal" fo:text-transform="none" fo:color="#111111" loext:opacity="100%" style:font-name="Garamond" fo:font-size="10pt" fo:letter-spacing="normal" fo:font-style="normal" style:text-underline-style="none" fo:font-weight="normal" officeooo:rsid="46c4e452" style:font-size-asian="10pt" style:font-style-asian="normal" style:font-weight-asian="normal" style:font-size-complex="10pt" style:font-style-complex="normal" style:font-weight-complex="normal"/>
    </style:style>
    <style:style style:name="T501" style:family="text">
      <style:text-properties fo:font-variant="normal" fo:text-transform="none" fo:color="#111111" loext:opacity="100%" style:font-name="Garamond" fo:font-size="10pt" fo:letter-spacing="normal" fo:font-style="normal" style:text-underline-style="none" fo:font-weight="normal" officeooo:rsid="46c45195" style:font-size-asian="10pt" style:font-style-asian="normal" style:font-weight-asian="normal" style:font-size-complex="10pt" style:font-style-complex="normal" style:font-weight-complex="normal"/>
    </style:style>
    <style:style style:name="T502" style:family="text">
      <style:text-properties fo:font-variant="normal" fo:text-transform="none" fo:color="#111111" loext:opacity="100%" style:font-name="Garamond" fo:font-size="10pt" fo:letter-spacing="normal" fo:font-style="normal" style:text-underline-style="none" fo:font-weight="normal" officeooo:rsid="23c3ed65" style:font-size-asian="10pt" style:font-style-asian="normal" style:font-weight-asian="normal" style:font-size-complex="10pt" style:font-style-complex="normal" style:font-weight-complex="normal"/>
    </style:style>
    <style:style style:name="T503" style:family="text">
      <style:text-properties fo:font-variant="normal" fo:text-transform="none" fo:color="#111111" loext:opacity="100%" style:font-name="Garamond" fo:font-size="10pt" fo:letter-spacing="normal" fo:font-style="normal" style:text-underline-style="none" fo:font-weight="normal" officeooo:rsid="23c9fb3a" style:font-size-asian="10pt" style:font-style-asian="normal" style:font-weight-asian="normal" style:font-size-complex="10pt" style:font-style-complex="normal" style:font-weight-complex="normal"/>
    </style:style>
    <style:style style:name="T504" style:family="text">
      <style:text-properties fo:font-variant="normal" fo:text-transform="none" fo:color="#111111" loext:opacity="100%" style:font-name="Garamond" fo:font-size="10pt" fo:letter-spacing="normal" fo:font-style="normal" style:text-underline-style="none" fo:font-weight="normal" officeooo:rsid="23d5172c" style:font-size-asian="10pt" style:font-style-asian="normal" style:font-weight-asian="normal" style:font-size-complex="10pt" style:font-style-complex="normal" style:font-weight-complex="normal"/>
    </style:style>
    <style:style style:name="T505" style:family="text">
      <style:text-properties fo:font-variant="normal" fo:text-transform="none" fo:color="#111111" loext:opacity="100%" style:font-name="Garamond" fo:font-size="10pt" fo:letter-spacing="normal" fo:font-style="normal" style:text-underline-style="none" fo:font-weight="normal" officeooo:rsid="46c5be4c" style:font-size-asian="10pt" style:font-style-asian="normal" style:font-weight-asian="normal" style:font-size-complex="10pt" style:font-style-complex="normal" style:font-weight-complex="normal"/>
    </style:style>
    <style:style style:name="T506" style:family="text">
      <style:text-properties fo:font-variant="normal" fo:text-transform="none" fo:color="#111111" loext:opacity="100%" style:font-name="Garamond" fo:font-size="10pt" fo:letter-spacing="normal" fo:font-style="normal" style:text-underline-style="none" fo:font-weight="normal" officeooo:rsid="23cac9f2" style:font-size-asian="10pt" style:font-style-asian="normal" style:font-weight-asian="normal" style:font-size-complex="10pt" style:font-style-complex="normal" style:font-weight-complex="normal"/>
    </style:style>
    <style:style style:name="T507" style:family="text">
      <style:text-properties fo:font-variant="normal" fo:text-transform="none" fo:color="#111111" loext:opacity="100%" style:font-name="Garamond" fo:font-size="10pt" fo:letter-spacing="normal" fo:font-style="normal" style:text-underline-style="none" fo:font-weight="normal" officeooo:rsid="42b8161b" style:font-size-asian="10pt" style:font-style-asian="normal" style:font-weight-asian="normal" style:font-size-complex="10pt" style:font-style-complex="normal" style:font-weight-complex="normal"/>
    </style:style>
    <style:style style:name="T508" style:family="text">
      <style:text-properties fo:font-variant="normal" fo:text-transform="none" fo:color="#111111" loext:opacity="100%" style:font-name="Garamond" fo:font-size="10pt" fo:letter-spacing="normal" fo:font-style="normal" style:text-underline-style="none" fo:font-weight="normal" officeooo:rsid="2f7f8c38" style:font-size-asian="10pt" style:font-style-asian="normal" style:font-weight-asian="normal" style:font-size-complex="10pt" style:font-style-complex="normal" style:font-weight-complex="normal"/>
    </style:style>
    <style:style style:name="T509" style:family="text">
      <style:text-properties fo:font-variant="normal" fo:text-transform="none" fo:color="#111111" loext:opacity="100%" style:font-name="Garamond" fo:font-size="10pt" fo:letter-spacing="normal" fo:font-style="normal" style:text-underline-style="none" fo:font-weight="normal" officeooo:rsid="2f897d2f" style:font-size-asian="10pt" style:font-style-asian="normal" style:font-weight-asian="normal" style:font-size-complex="10pt" style:font-style-complex="normal" style:font-weight-complex="normal"/>
    </style:style>
    <style:style style:name="T510" style:family="text">
      <style:text-properties fo:font-variant="normal" fo:text-transform="none" fo:color="#111111" loext:opacity="100%" style:font-name="Garamond" fo:font-size="10pt" fo:letter-spacing="normal" fo:font-style="normal" style:text-underline-style="none" fo:font-weight="normal" officeooo:rsid="2f85fc65" style:font-size-asian="10pt" style:font-style-asian="normal" style:font-weight-asian="normal" style:font-size-complex="10pt" style:font-style-complex="normal" style:font-weight-complex="normal"/>
    </style:style>
    <style:style style:name="T511" style:family="text">
      <style:text-properties fo:font-variant="normal" fo:text-transform="none" fo:color="#111111" loext:opacity="100%" style:font-name="Garamond" fo:font-size="10pt" fo:letter-spacing="normal" fo:font-style="normal" style:text-underline-style="none" fo:font-weight="normal" officeooo:rsid="2f8aa575" style:font-size-asian="10pt" style:font-style-asian="normal" style:font-weight-asian="normal" style:font-size-complex="10pt" style:font-style-complex="normal" style:font-weight-complex="normal"/>
    </style:style>
    <style:style style:name="T512" style:family="text">
      <style:text-properties fo:font-variant="normal" fo:text-transform="none" fo:color="#111111" loext:opacity="100%" style:font-name="Garamond" fo:font-size="10pt" fo:letter-spacing="normal" fo:font-style="normal" style:text-underline-style="none" fo:font-weight="normal" officeooo:rsid="23d3be39" style:font-size-asian="10pt" style:font-style-asian="normal" style:font-weight-asian="normal" style:font-size-complex="10pt" style:font-style-complex="normal" style:font-weight-complex="normal"/>
    </style:style>
    <style:style style:name="T513" style:family="text">
      <style:text-properties fo:font-variant="normal" fo:text-transform="none" fo:color="#111111" loext:opacity="100%" style:font-name="Garamond" fo:font-size="10pt" fo:letter-spacing="normal" fo:font-style="normal" style:text-underline-style="none" fo:font-weight="normal" officeooo:rsid="2f7e0b0e" style:font-size-asian="10pt" style:font-style-asian="normal" style:font-weight-asian="normal" style:font-size-complex="10pt" style:font-style-complex="normal" style:font-weight-complex="normal"/>
    </style:style>
    <style:style style:name="T514" style:family="text">
      <style:text-properties fo:font-variant="normal" fo:text-transform="none" fo:color="#111111" loext:opacity="100%" style:font-name="Garamond" fo:font-size="10pt" fo:letter-spacing="normal" fo:font-style="normal" style:text-underline-style="none" fo:font-weight="normal" officeooo:rsid="2f7d202e" style:font-size-asian="10pt" style:font-style-asian="normal" style:font-weight-asian="normal" style:font-size-complex="10pt" style:font-style-complex="normal" style:font-weight-complex="normal"/>
    </style:style>
    <style:style style:name="T515" style:family="text">
      <style:text-properties fo:font-variant="normal" fo:text-transform="none" fo:color="#111111" loext:opacity="100%" style:font-name="Garamond" fo:font-size="10pt" fo:letter-spacing="normal" fo:font-style="normal" style:text-underline-style="none" fo:font-weight="normal" officeooo:rsid="2f808f22" style:font-size-asian="10pt" style:font-style-asian="normal" style:font-weight-asian="normal" style:font-size-complex="10pt" style:font-style-complex="normal" style:font-weight-complex="normal"/>
    </style:style>
    <style:style style:name="T516" style:family="text">
      <style:text-properties fo:font-variant="normal" fo:text-transform="none" fo:color="#111111" loext:opacity="100%" style:font-name="Garamond" fo:font-size="10pt" fo:letter-spacing="normal" fo:font-style="normal" style:text-underline-style="none" fo:font-weight="normal" officeooo:rsid="2f9a59a4" style:font-size-asian="10pt" style:font-style-asian="normal" style:font-weight-asian="normal" style:font-size-complex="10pt" style:font-style-complex="normal" style:font-weight-complex="normal"/>
    </style:style>
    <style:style style:name="T517" style:family="text">
      <style:text-properties fo:font-variant="normal" fo:text-transform="none" fo:color="#111111" loext:opacity="100%" style:font-name="Garamond" fo:font-size="10pt" fo:letter-spacing="normal" fo:font-style="normal" style:text-underline-style="none" fo:font-weight="normal" officeooo:rsid="2f7db802" style:font-size-asian="10pt" style:font-style-asian="normal" style:font-weight-asian="normal" style:font-size-complex="10pt" style:font-style-complex="normal" style:font-weight-complex="normal"/>
    </style:style>
    <style:style style:name="T518" style:family="text">
      <style:text-properties fo:font-variant="normal" fo:text-transform="none" fo:color="#111111" loext:opacity="100%" style:font-name="Garamond" fo:font-size="10pt" fo:letter-spacing="normal" fo:font-style="normal" style:text-underline-style="none" fo:font-weight="normal" officeooo:rsid="3a4b49e5" style:font-size-asian="10pt" style:font-style-asian="normal" style:font-weight-asian="normal" style:font-size-complex="10pt" style:font-style-complex="normal" style:font-weight-complex="normal"/>
    </style:style>
    <style:style style:name="T519" style:family="text">
      <style:text-properties fo:font-variant="normal" fo:text-transform="none" fo:color="#111111" loext:opacity="100%" style:font-name="Garamond" fo:font-size="10pt" fo:letter-spacing="normal" fo:font-style="normal" style:text-underline-style="none" fo:font-weight="normal" officeooo:rsid="4cf6b2f3" style:font-size-asian="10pt" style:font-style-asian="normal" style:font-weight-asian="normal" style:font-size-complex="10pt" style:font-style-complex="normal" style:font-weight-complex="normal"/>
    </style:style>
    <style:style style:name="T520" style:family="text">
      <style:text-properties fo:font-variant="normal" fo:text-transform="none" fo:color="#111111" loext:opacity="100%" style:font-name="Garamond" fo:font-size="10pt" fo:letter-spacing="normal" fo:font-style="normal" style:text-underline-style="none" fo:font-weight="normal" officeooo:rsid="4cf8366a" style:font-size-asian="10pt" style:font-style-asian="normal" style:font-weight-asian="normal" style:font-size-complex="10pt" style:font-style-complex="normal" style:font-weight-complex="normal"/>
    </style:style>
    <style:style style:name="T521" style:family="text">
      <style:text-properties fo:font-variant="normal" fo:text-transform="none" fo:color="#111111" loext:opacity="100%" style:font-name="Garamond" fo:font-size="10pt" fo:letter-spacing="normal" fo:font-style="normal" style:text-underline-style="none" fo:font-weight="normal" officeooo:rsid="42b9ad96" style:font-size-asian="10pt" style:font-style-asian="normal" style:font-weight-asian="normal" style:font-size-complex="10pt" style:font-style-complex="normal" style:font-weight-complex="normal"/>
    </style:style>
    <style:style style:name="T522" style:family="text">
      <style:text-properties fo:font-variant="normal" fo:text-transform="none" fo:color="#111111" loext:opacity="100%" style:font-name="Garamond" fo:font-size="10pt" fo:letter-spacing="normal" fo:font-style="normal" style:text-underline-style="none" fo:font-weight="normal" officeooo:rsid="3a4b68a3" style:font-size-asian="10pt" style:font-style-asian="normal" style:font-weight-asian="normal" style:font-size-complex="10pt" style:font-style-complex="normal" style:font-weight-complex="normal"/>
    </style:style>
    <style:style style:name="T523" style:family="text">
      <style:text-properties fo:font-variant="normal" fo:text-transform="none" fo:color="#111111" loext:opacity="100%" style:font-name="Garamond" fo:font-size="10pt" fo:letter-spacing="normal" fo:font-style="normal" style:text-underline-style="none" fo:font-weight="normal" officeooo:rsid="427cfff5" style:font-size-asian="10pt" style:font-style-asian="normal" style:font-weight-asian="normal" style:font-size-complex="10pt" style:font-style-complex="normal" style:font-weight-complex="normal"/>
    </style:style>
    <style:style style:name="T524" style:family="text">
      <style:text-properties fo:font-variant="normal" fo:text-transform="none" fo:color="#111111" loext:opacity="100%" style:font-name="Garamond" fo:font-size="10pt" fo:letter-spacing="normal" fo:font-style="normal" style:text-underline-style="none" fo:font-weight="normal" officeooo:rsid="42bcf14b" style:font-size-asian="10pt" style:font-style-asian="normal" style:font-weight-asian="normal" style:font-size-complex="10pt" style:font-style-complex="normal" style:font-weight-complex="normal"/>
    </style:style>
    <style:style style:name="T525" style:family="text">
      <style:text-properties fo:font-variant="normal" fo:text-transform="none" fo:color="#111111" loext:opacity="100%" style:font-name="Garamond" fo:font-size="10pt" fo:letter-spacing="normal" fo:font-style="normal" style:text-underline-style="none" fo:font-weight="normal" officeooo:rsid="42809734" style:font-size-asian="10pt" style:font-style-asian="normal" style:font-weight-asian="normal" style:font-size-complex="10pt" style:font-style-complex="normal" style:font-weight-complex="normal"/>
    </style:style>
    <style:style style:name="T526" style:family="text">
      <style:text-properties fo:font-variant="normal" fo:text-transform="none" fo:color="#111111" loext:opacity="100%" style:font-name="Garamond" fo:font-size="10pt" fo:letter-spacing="normal" fo:font-style="normal" style:text-underline-style="none" fo:font-weight="normal" officeooo:rsid="42847d83" style:font-size-asian="10pt" style:font-style-asian="normal" style:font-weight-asian="normal" style:font-size-complex="10pt" style:font-style-complex="normal" style:font-weight-complex="normal"/>
    </style:style>
    <style:style style:name="T527" style:family="text">
      <style:text-properties fo:font-variant="normal" fo:text-transform="none" fo:color="#111111" loext:opacity="100%" style:font-name="Garamond" fo:font-size="10pt" fo:letter-spacing="normal" fo:font-style="normal" style:text-underline-style="none" fo:font-weight="normal" officeooo:rsid="4284870d" style:font-size-asian="10pt" style:font-style-asian="normal" style:font-weight-asian="normal" style:font-size-complex="10pt" style:font-style-complex="normal" style:font-weight-complex="normal"/>
    </style:style>
    <style:style style:name="T528" style:family="text">
      <style:text-properties fo:font-variant="normal" fo:text-transform="none" fo:color="#111111" loext:opacity="100%" style:font-name="Garamond" fo:font-size="10pt" fo:letter-spacing="normal" fo:font-style="normal" style:text-underline-style="none" fo:font-weight="normal" officeooo:rsid="42bda0fd" style:font-size-asian="10pt" style:font-style-asian="normal" style:font-weight-asian="normal" style:font-size-complex="10pt" style:font-style-complex="normal" style:font-weight-complex="normal"/>
    </style:style>
    <style:style style:name="T529" style:family="text">
      <style:text-properties fo:font-variant="normal" fo:text-transform="none" fo:color="#111111" loext:opacity="100%" style:font-name="Garamond" fo:font-size="10pt" fo:letter-spacing="normal" fo:font-style="normal" style:text-underline-style="none" fo:font-weight="normal" officeooo:rsid="3a3ac34f" style:font-size-asian="10pt" style:font-style-asian="normal" style:font-weight-asian="normal" style:font-size-complex="10pt" style:font-style-complex="normal" style:font-weight-complex="normal"/>
    </style:style>
    <style:style style:name="T530" style:family="text">
      <style:text-properties fo:font-variant="normal" fo:text-transform="none" fo:color="#111111" loext:opacity="100%" style:font-name="Garamond" fo:font-size="10pt" fo:letter-spacing="normal" fo:font-style="normal" style:text-underline-style="none" fo:font-weight="normal" officeooo:rsid="42856c1e" style:font-size-asian="10pt" style:font-style-asian="normal" style:font-weight-asian="normal" style:font-size-complex="10pt" style:font-style-complex="normal" style:font-weight-complex="normal"/>
    </style:style>
    <style:style style:name="T531" style:family="text">
      <style:text-properties fo:font-variant="normal" fo:text-transform="none" fo:color="#111111" loext:opacity="100%" style:font-name="Garamond" fo:font-size="10pt" fo:letter-spacing="normal" fo:font-style="normal" style:text-underline-style="none" fo:font-weight="normal" officeooo:rsid="427d4dd0" style:font-size-asian="10pt" style:font-style-asian="normal" style:font-weight-asian="normal" style:font-size-complex="10pt" style:font-style-complex="normal" style:font-weight-complex="normal"/>
    </style:style>
    <style:style style:name="T532" style:family="text">
      <style:text-properties fo:font-variant="normal" fo:text-transform="none" fo:color="#111111" loext:opacity="100%" style:font-name="Garamond" fo:font-size="10pt" fo:letter-spacing="normal" fo:font-style="normal" style:text-underline-style="none" fo:font-weight="normal" officeooo:rsid="46c92fbd" style:font-size-asian="10pt" style:font-style-asian="normal" style:font-weight-asian="normal" style:font-size-complex="10pt" style:font-style-complex="normal" style:font-weight-complex="normal"/>
    </style:style>
    <style:style style:name="T533" style:family="text">
      <style:text-properties fo:font-variant="normal" fo:text-transform="none" fo:color="#111111" loext:opacity="100%" style:font-name="Garamond" fo:font-size="10pt" fo:letter-spacing="normal" fo:font-style="normal" style:text-underline-style="none" fo:font-weight="normal" officeooo:rsid="3a3b8303" style:font-size-asian="10pt" style:font-style-asian="normal" style:font-weight-asian="normal" style:font-size-complex="10pt" style:font-style-complex="normal" style:font-weight-complex="normal"/>
    </style:style>
    <style:style style:name="T534" style:family="text">
      <style:text-properties fo:font-variant="normal" fo:text-transform="none" fo:color="#111111" loext:opacity="100%" style:font-name="Garamond" fo:font-size="10pt" fo:letter-spacing="normal" fo:font-style="normal" style:text-underline-style="none" fo:font-weight="normal" officeooo:rsid="4281a591" style:font-size-asian="10pt" style:font-style-asian="normal" style:font-weight-asian="normal" style:font-size-complex="10pt" style:font-style-complex="normal" style:font-weight-complex="normal"/>
    </style:style>
    <style:style style:name="T535" style:family="text">
      <style:text-properties fo:font-variant="normal" fo:text-transform="none" fo:color="#111111" loext:opacity="100%" style:font-name="Garamond" fo:font-size="10pt" fo:letter-spacing="normal" fo:font-style="normal" style:text-underline-style="none" fo:font-weight="normal" officeooo:rsid="3a3dadd2" style:font-size-asian="10pt" style:font-style-asian="normal" style:font-weight-asian="normal" style:font-size-complex="10pt" style:font-style-complex="normal" style:font-weight-complex="normal"/>
    </style:style>
    <style:style style:name="T536" style:family="text">
      <style:text-properties fo:font-variant="normal" fo:text-transform="none" fo:color="#111111" loext:opacity="100%" style:font-name="Garamond" fo:font-size="10pt" fo:letter-spacing="normal" fo:font-style="normal" style:text-underline-style="none" fo:font-weight="normal" officeooo:rsid="3a4c38ff" style:font-size-asian="10pt" style:font-style-asian="normal" style:font-weight-asian="normal" style:font-size-complex="10pt" style:font-style-complex="normal" style:font-weight-complex="normal"/>
    </style:style>
    <style:style style:name="T537" style:family="text">
      <style:text-properties fo:font-variant="normal" fo:text-transform="none" fo:color="#111111" loext:opacity="100%" style:font-name="Garamond" fo:font-size="10pt" fo:letter-spacing="normal" fo:font-style="normal" style:text-underline-style="none" fo:font-weight="normal" officeooo:rsid="4cf9abd9" style:font-size-asian="10pt" style:font-style-asian="normal" style:font-weight-asian="normal" style:font-size-complex="10pt" style:font-style-complex="normal" style:font-weight-complex="normal"/>
    </style:style>
    <style:style style:name="T538" style:family="text">
      <style:text-properties fo:font-variant="normal" fo:text-transform="none" fo:color="#111111" loext:opacity="100%" style:font-name="Garamond" fo:font-size="10pt" fo:letter-spacing="normal" fo:font-style="normal" style:text-underline-style="none" fo:font-weight="normal" officeooo:rsid="42c26a8b" style:font-size-asian="10pt" style:font-style-asian="normal" style:font-weight-asian="normal" style:font-size-complex="10pt" style:font-style-complex="normal" style:font-weight-complex="normal"/>
    </style:style>
    <style:style style:name="T539" style:family="text">
      <style:text-properties fo:font-variant="normal" fo:text-transform="none" fo:color="#111111" loext:opacity="100%" style:font-name="Garamond" fo:font-size="10pt" fo:letter-spacing="normal" fo:font-style="normal" style:text-underline-style="none" fo:font-weight="normal" officeooo:rsid="46caa53d" style:font-size-asian="10pt" style:font-style-asian="normal" style:font-weight-asian="normal" style:font-size-complex="10pt" style:font-style-complex="normal" style:font-weight-complex="normal"/>
    </style:style>
    <style:style style:name="T540" style:family="text">
      <style:text-properties fo:font-variant="normal" fo:text-transform="none" fo:color="#111111" loext:opacity="100%" style:font-name="Garamond" fo:font-size="10pt" fo:letter-spacing="normal" fo:font-style="normal" style:text-underline-style="none" fo:font-weight="normal" officeooo:rsid="42c3c45a" style:font-size-asian="10pt" style:font-style-asian="normal" style:font-weight-asian="normal" style:font-size-complex="10pt" style:font-style-complex="normal" style:font-weight-complex="normal"/>
    </style:style>
    <style:style style:name="T541" style:family="text">
      <style:text-properties fo:font-variant="normal" fo:text-transform="none" fo:color="#111111" loext:opacity="100%" style:font-name="Garamond" fo:font-size="10pt" fo:letter-spacing="normal" fo:font-style="normal" style:text-underline-style="none" fo:font-weight="normal" officeooo:rsid="441a8d97" style:font-size-asian="10pt" style:font-style-asian="normal" style:font-weight-asian="normal" style:font-size-complex="10pt" style:font-style-complex="normal" style:font-weight-complex="normal"/>
    </style:style>
    <style:style style:name="T542" style:family="text">
      <style:text-properties fo:font-variant="normal" fo:text-transform="none" fo:color="#111111" loext:opacity="100%" style:font-name="Garamond" fo:font-size="10pt" fo:letter-spacing="normal" fo:font-style="normal" style:text-underline-style="none" fo:font-weight="normal" officeooo:rsid="46cc02be" style:font-size-asian="10pt" style:font-style-asian="normal" style:font-weight-asian="normal" style:font-size-complex="10pt" style:font-style-complex="normal" style:font-weight-complex="normal"/>
    </style:style>
    <style:style style:name="T543" style:family="text">
      <style:text-properties fo:font-variant="normal" fo:text-transform="none" fo:color="#111111" loext:opacity="100%" style:font-name="Garamond" fo:font-size="10pt" fo:letter-spacing="normal" fo:font-style="normal" style:text-underline-style="none" fo:font-weight="normal" officeooo:rsid="3a4d260e" style:font-size-asian="10pt" style:font-style-asian="normal" style:font-weight-asian="normal" style:font-size-complex="10pt" style:font-style-complex="normal" style:font-weight-complex="normal"/>
    </style:style>
    <style:style style:name="T544" style:family="text">
      <style:text-properties fo:font-variant="normal" fo:text-transform="none" fo:color="#111111" loext:opacity="100%" style:font-name="Garamond" fo:font-size="10pt" fo:letter-spacing="normal" fo:font-style="normal" style:text-underline-style="none" fo:font-weight="normal" officeooo:rsid="4286b8a3" style:font-size-asian="10pt" style:font-style-asian="normal" style:font-weight-asian="normal" style:font-size-complex="10pt" style:font-style-complex="normal" style:font-weight-complex="normal"/>
    </style:style>
    <style:style style:name="T545" style:family="text">
      <style:text-properties fo:font-variant="normal" fo:text-transform="none" fo:color="#111111" loext:opacity="100%" style:font-name="Garamond" fo:font-size="10pt" fo:letter-spacing="normal" fo:font-style="normal" style:text-underline-style="none" fo:font-weight="normal" officeooo:rsid="3a3e94b4" style:font-size-asian="10pt" style:font-style-asian="normal" style:font-weight-asian="normal" style:font-size-complex="10pt" style:font-style-complex="normal" style:font-weight-complex="normal"/>
    </style:style>
    <style:style style:name="T546" style:family="text">
      <style:text-properties fo:font-variant="normal" fo:text-transform="none" fo:color="#111111" loext:opacity="100%" style:font-name="Garamond" fo:font-size="10pt" fo:letter-spacing="normal" fo:font-style="normal" style:text-underline-style="none" fo:font-weight="normal" officeooo:rsid="3a40bc99" style:font-size-asian="10pt" style:font-style-asian="normal" style:font-weight-asian="normal" style:font-size-complex="10pt" style:font-style-complex="normal" style:font-weight-complex="normal"/>
    </style:style>
    <style:style style:name="T547" style:family="text">
      <style:text-properties fo:font-variant="normal" fo:text-transform="none" fo:color="#111111" loext:opacity="100%" style:font-name="Garamond" fo:font-size="10pt" fo:letter-spacing="normal" fo:font-style="normal" style:text-underline-style="none" fo:font-weight="normal" officeooo:rsid="4282d7c8" style:font-size-asian="10pt" style:font-style-asian="normal" style:font-weight-asian="normal" style:font-size-complex="10pt" style:font-style-complex="normal" style:font-weight-complex="normal"/>
    </style:style>
    <style:style style:name="T548" style:family="text">
      <style:text-properties fo:font-variant="normal" fo:text-transform="none" fo:color="#111111" loext:opacity="100%" style:font-name="Garamond" fo:font-size="10pt" fo:letter-spacing="normal" fo:font-style="normal" style:text-underline-style="none" fo:font-weight="normal" officeooo:rsid="42bf6dd5" style:font-size-asian="10pt" style:font-style-asian="normal" style:font-weight-asian="normal" style:font-size-complex="10pt" style:font-style-complex="normal" style:font-weight-complex="normal"/>
    </style:style>
    <style:style style:name="T549" style:family="text">
      <style:text-properties fo:font-variant="normal" fo:text-transform="none" fo:color="#111111" loext:opacity="100%" style:font-name="Garamond" fo:font-size="10pt" fo:letter-spacing="normal" fo:font-style="normal" style:text-underline-style="none" fo:font-weight="normal" officeooo:rsid="42c6c2b2" style:font-size-asian="10pt" style:font-style-asian="normal" style:font-weight-asian="normal" style:font-size-complex="10pt" style:font-style-complex="normal" style:font-weight-complex="normal"/>
    </style:style>
    <style:style style:name="T550" style:family="text">
      <style:text-properties fo:font-variant="normal" fo:text-transform="none" fo:color="#111111" loext:opacity="100%" style:font-name="Garamond" fo:font-size="10pt" fo:letter-spacing="normal" fo:font-style="normal" style:text-underline-style="none" fo:font-weight="normal" officeooo:rsid="46cdfdd1" style:font-size-asian="10pt" style:font-style-asian="normal" style:font-weight-asian="normal" style:font-size-complex="10pt" style:font-style-complex="normal" style:font-weight-complex="normal"/>
    </style:style>
    <style:style style:name="T551" style:family="text">
      <style:text-properties fo:font-variant="normal" fo:text-transform="none" fo:color="#111111" loext:opacity="100%" style:font-name="Garamond" fo:font-size="10pt" fo:letter-spacing="normal" fo:font-style="normal" style:text-underline-style="none" fo:font-weight="normal" officeooo:rsid="4cfb109e" style:font-size-asian="10pt" style:font-style-asian="normal" style:font-weight-asian="normal" style:font-size-complex="10pt" style:font-style-complex="normal" style:font-weight-complex="normal"/>
    </style:style>
    <style:style style:name="T552" style:family="text">
      <style:text-properties fo:font-variant="normal" fo:text-transform="none" fo:color="#111111" loext:opacity="100%" style:font-name="Garamond" fo:font-size="10pt" fo:letter-spacing="normal" fo:font-style="normal" style:text-underline-style="none" fo:font-weight="normal" officeooo:rsid="4cfc4aee" style:font-size-asian="10pt" style:font-style-asian="normal" style:font-weight-asian="normal" style:font-size-complex="10pt" style:font-style-complex="normal" style:font-weight-complex="normal"/>
    </style:style>
    <style:style style:name="T553" style:family="text">
      <style:text-properties fo:font-variant="normal" fo:text-transform="none" fo:color="#111111" loext:opacity="100%" style:font-name="Garamond" fo:font-size="10pt" fo:letter-spacing="normal" fo:font-style="normal" style:text-underline-style="none" fo:font-weight="normal" officeooo:rsid="4cfebbd5" style:font-size-asian="10pt" style:font-style-asian="normal" style:font-weight-asian="normal" style:font-size-complex="10pt" style:font-style-complex="normal" style:font-weight-complex="normal"/>
    </style:style>
    <style:style style:name="T554" style:family="text">
      <style:text-properties fo:font-variant="normal" fo:text-transform="none" fo:color="#111111" loext:opacity="100%" style:font-name="Garamond" fo:font-size="10pt" fo:letter-spacing="normal" fo:font-style="normal" style:text-underline-style="none" fo:font-weight="normal" officeooo:rsid="4cfdb2f2" style:font-size-asian="10pt" style:font-style-asian="normal" style:font-weight-asian="normal" style:font-size-complex="10pt" style:font-style-complex="normal" style:font-weight-complex="normal"/>
    </style:style>
    <style:style style:name="T555" style:family="text">
      <style:text-properties fo:font-variant="normal" fo:text-transform="none" fo:color="#111111" loext:opacity="100%" style:font-name="Garamond" fo:font-size="10pt" fo:letter-spacing="normal" fo:font-style="normal" style:text-underline-style="none" fo:font-weight="normal" officeooo:rsid="46cfabd8" style:font-size-asian="10pt" style:font-style-asian="normal" style:font-weight-asian="normal" style:font-size-complex="10pt" style:font-style-complex="normal" style:font-weight-complex="normal"/>
    </style:style>
    <style:style style:name="T556" style:family="text">
      <style:text-properties fo:font-variant="normal" fo:text-transform="none" fo:color="#111111" loext:opacity="100%" style:font-name="Garamond" fo:font-size="10pt" fo:letter-spacing="normal" fo:font-style="normal" style:text-underline-style="none" fo:font-weight="normal" officeooo:rsid="4cffa09c" style:font-size-asian="10pt" style:font-style-asian="normal" style:font-weight-asian="normal" style:font-size-complex="10pt" style:font-style-complex="normal" style:font-weight-complex="normal"/>
    </style:style>
    <style:style style:name="T557" style:family="text">
      <style:text-properties fo:font-variant="normal" fo:text-transform="none" fo:color="#111111" loext:opacity="100%" style:font-name="Garamond" fo:font-size="10pt" fo:letter-spacing="normal" fo:font-style="normal" style:text-underline-style="none" fo:font-weight="normal" officeooo:rsid="42c7b1a5" style:font-size-asian="10pt" style:font-style-asian="normal" style:font-weight-asian="normal" style:font-size-complex="10pt" style:font-style-complex="normal" style:font-weight-complex="normal"/>
    </style:style>
    <style:style style:name="T558" style:family="text">
      <style:text-properties fo:font-variant="normal" fo:text-transform="none" fo:color="#111111" loext:opacity="100%" style:font-name="Garamond" fo:font-size="10pt" fo:letter-spacing="normal" fo:font-style="normal" style:text-underline-style="none" fo:font-weight="normal" officeooo:rsid="42845d01" style:font-size-asian="10pt" style:font-style-asian="normal" style:font-weight-asian="normal" style:font-size-complex="10pt" style:font-style-complex="normal" style:font-weight-complex="normal"/>
    </style:style>
    <style:style style:name="T559" style:family="text">
      <style:text-properties fo:font-variant="normal" fo:text-transform="none" fo:color="#111111" loext:opacity="100%" style:font-name="Garamond" fo:font-size="10pt" fo:letter-spacing="normal" fo:font-style="normal" style:text-underline-style="none" fo:font-weight="normal" officeooo:rsid="42c08a0f" style:font-size-asian="10pt" style:font-style-asian="normal" style:font-weight-asian="normal" style:font-size-complex="10pt" style:font-style-complex="normal" style:font-weight-complex="normal"/>
    </style:style>
    <style:style style:name="T560" style:family="text">
      <style:text-properties fo:font-variant="normal" fo:text-transform="none" fo:color="#111111" loext:opacity="100%" style:font-name="Garamond" fo:font-size="10pt" fo:letter-spacing="normal" fo:font-style="normal" style:text-underline-style="none" fo:font-weight="normal" officeooo:rsid="46d06444" style:font-size-asian="10pt" style:font-style-asian="normal" style:font-weight-asian="normal" style:font-size-complex="10pt" style:font-style-complex="normal" style:font-weight-complex="normal"/>
    </style:style>
    <style:style style:name="T561" style:family="text">
      <style:text-properties fo:font-variant="normal" fo:text-transform="none" fo:color="#111111" loext:opacity="100%" style:font-name="Garamond" fo:font-size="10pt" fo:letter-spacing="normal" fo:font-style="normal" style:text-underline-style="none" fo:font-weight="normal" officeooo:rsid="46d1cef1" style:font-size-asian="10pt" style:font-style-asian="normal" style:font-weight-asian="normal" style:font-size-complex="10pt" style:font-style-complex="normal" style:font-weight-complex="normal"/>
    </style:style>
    <style:style style:name="T562" style:family="text">
      <style:text-properties fo:font-variant="normal" fo:text-transform="none" fo:color="#111111" loext:opacity="100%" style:font-name="Garamond" fo:font-size="10pt" fo:letter-spacing="normal" fo:font-style="normal" style:text-underline-style="none" fo:font-weight="normal" officeooo:rsid="46d3b904" style:font-size-asian="10pt" style:font-style-asian="normal" style:font-weight-asian="normal" style:font-size-complex="10pt" style:font-style-complex="normal" style:font-weight-complex="normal"/>
    </style:style>
    <style:style style:name="T563" style:family="text">
      <style:text-properties fo:font-variant="normal" fo:text-transform="none" fo:color="#111111" loext:opacity="100%" style:font-name="Garamond" fo:font-size="10pt" fo:letter-spacing="normal" fo:font-style="normal" style:text-underline-style="none" fo:font-weight="normal" officeooo:rsid="46d526c6" style:font-size-asian="10pt" style:font-style-asian="normal" style:font-weight-asian="normal" style:font-size-complex="10pt" style:font-style-complex="normal" style:font-weight-complex="normal"/>
    </style:style>
    <style:style style:name="T564" style:family="text">
      <style:text-properties fo:font-variant="normal" fo:text-transform="none" fo:color="#111111" loext:opacity="100%" style:font-name="Garamond" fo:font-size="10pt" fo:letter-spacing="normal" fo:font-style="normal" style:text-underline-style="none" fo:font-weight="normal" officeooo:rsid="4cffce8c" style:font-size-asian="10pt" style:font-style-asian="normal" style:font-weight-asian="normal" style:font-size-complex="10pt" style:font-style-complex="normal" style:font-weight-complex="normal"/>
    </style:style>
    <style:style style:name="T565" style:family="text">
      <style:text-properties fo:font-variant="normal" fo:text-transform="none" fo:color="#111111" loext:opacity="100%" style:font-name="Garamond" fo:font-size="10pt" fo:letter-spacing="normal" fo:font-style="normal" style:text-underline-style="none" fo:font-weight="normal" officeooo:rsid="42846e06" style:font-size-asian="10pt" style:font-style-asian="normal" style:font-weight-asian="normal" style:font-size-complex="10pt" style:font-style-complex="normal" style:font-weight-complex="normal"/>
    </style:style>
    <style:style style:name="T566" style:family="text">
      <style:text-properties fo:font-variant="normal" fo:text-transform="none" fo:color="#111111" loext:opacity="100%" style:font-name="Garamond" fo:font-size="10pt" fo:letter-spacing="normal" fo:font-style="normal" style:text-underline-style="none" fo:font-weight="normal" officeooo:rsid="428ae40b" style:font-size-asian="10pt" style:font-style-asian="normal" style:font-weight-asian="normal" style:font-size-complex="10pt" style:font-style-complex="normal" style:font-weight-complex="normal"/>
    </style:style>
    <style:style style:name="T567" style:family="text">
      <style:text-properties fo:font-variant="normal" fo:text-transform="none" fo:color="#111111" loext:opacity="100%" style:font-name="Garamond" fo:font-size="10pt" fo:letter-spacing="normal" fo:font-style="normal" style:text-underline-style="none" fo:font-weight="normal" officeooo:rsid="42c7ffa3" style:font-size-asian="10pt" style:font-style-asian="normal" style:font-weight-asian="normal" style:font-size-complex="10pt" style:font-style-complex="normal" style:font-weight-complex="normal"/>
    </style:style>
    <style:style style:name="T568" style:family="text">
      <style:text-properties fo:font-variant="normal" fo:text-transform="none" fo:color="#111111" loext:opacity="100%" style:font-name="Garamond" fo:font-size="10pt" fo:letter-spacing="normal" fo:font-style="normal" style:text-underline-style="none" fo:font-weight="normal" officeooo:rsid="42c99151" style:font-size-asian="10pt" style:font-style-asian="normal" style:font-weight-asian="normal" style:font-size-complex="10pt" style:font-style-complex="normal" style:font-weight-complex="normal"/>
    </style:style>
    <style:style style:name="T569" style:family="text">
      <style:text-properties fo:font-variant="normal" fo:text-transform="none" fo:color="#111111" loext:opacity="100%" style:font-name="Garamond" fo:font-size="10pt" fo:letter-spacing="normal" fo:font-style="normal" style:text-underline-style="none" fo:font-weight="normal" officeooo:rsid="4d00a9c3" style:font-size-asian="10pt" style:font-style-asian="normal" style:font-weight-asian="normal" style:font-size-complex="10pt" style:font-style-complex="normal" style:font-weight-complex="normal"/>
    </style:style>
    <style:style style:name="T570" style:family="text">
      <style:text-properties fo:font-variant="normal" fo:text-transform="none" fo:color="#111111" loext:opacity="100%" style:font-name="Garamond" fo:font-size="10pt" fo:letter-spacing="normal" fo:font-style="normal" style:text-underline-style="none" fo:font-weight="normal" officeooo:rsid="46da401c" style:font-size-asian="10pt" style:font-style-asian="normal" style:font-weight-asian="normal" style:font-size-complex="10pt" style:font-style-complex="normal" style:font-weight-complex="normal"/>
    </style:style>
    <style:style style:name="T571" style:family="text">
      <style:text-properties fo:font-variant="normal" fo:text-transform="none" fo:color="#111111" loext:opacity="100%" style:font-name="Garamond" fo:font-size="10pt" fo:letter-spacing="normal" fo:font-style="normal" style:text-underline-style="none" fo:font-weight="normal" officeooo:rsid="46d699f4" style:font-size-asian="10pt" style:font-style-asian="normal" style:font-weight-asian="normal" style:font-size-complex="10pt" style:font-style-complex="normal" style:font-weight-complex="normal"/>
    </style:style>
    <style:style style:name="T572" style:family="text">
      <style:text-properties fo:font-variant="normal" fo:text-transform="none" fo:color="#111111" loext:opacity="100%" style:font-name="Garamond" fo:font-size="10pt" fo:letter-spacing="normal" fo:font-style="normal" style:text-underline-style="none" fo:font-weight="normal" officeooo:rsid="4288db41" style:font-size-asian="10pt" style:font-style-asian="normal" style:font-weight-asian="normal" style:font-size-complex="10pt" style:font-style-complex="normal" style:font-weight-complex="normal"/>
    </style:style>
    <style:style style:name="T573" style:family="text">
      <style:text-properties fo:font-variant="normal" fo:text-transform="none" fo:color="#111111" loext:opacity="100%" style:font-name="Garamond" fo:font-size="10pt" fo:letter-spacing="normal" fo:font-style="normal" style:text-underline-style="none" fo:font-weight="normal" officeooo:rsid="4289317d" style:font-size-asian="10pt" style:font-style-asian="normal" style:font-weight-asian="normal" style:font-size-complex="10pt" style:font-style-complex="normal" style:font-weight-complex="normal"/>
    </style:style>
    <style:style style:name="T574" style:family="text">
      <style:text-properties fo:font-variant="normal" fo:text-transform="none" fo:color="#111111" loext:opacity="100%" style:font-name="Garamond" fo:font-size="10pt" fo:letter-spacing="normal" fo:font-style="normal" style:text-underline-style="none" fo:font-weight="normal" officeooo:rsid="441f6317" style:font-size-asian="10pt" style:font-style-asian="normal" style:font-weight-asian="normal" style:font-size-complex="10pt" style:font-style-complex="normal" style:font-weight-complex="normal"/>
    </style:style>
    <style:style style:name="T575" style:family="text">
      <style:text-properties fo:font-variant="normal" fo:text-transform="none" fo:color="#111111" loext:opacity="100%" style:font-name="Garamond" fo:font-size="10pt" fo:letter-spacing="normal" fo:font-style="normal" style:text-underline-style="none" fo:font-weight="normal" officeooo:rsid="428be48a" style:font-size-asian="10pt" style:font-style-asian="normal" style:font-weight-asian="normal" style:font-size-complex="10pt" style:font-style-complex="normal" style:font-weight-complex="normal"/>
    </style:style>
    <style:style style:name="T576" style:family="text">
      <style:text-properties fo:font-variant="normal" fo:text-transform="none" fo:color="#111111" loext:opacity="100%" style:font-name="Garamond" fo:font-size="10pt" fo:letter-spacing="normal" fo:font-style="normal" style:text-underline-style="none" fo:font-weight="normal" officeooo:rsid="3a4de75c" style:font-size-asian="10pt" style:font-style-asian="normal" style:font-weight-asian="normal" style:font-size-complex="10pt" style:font-style-complex="normal" style:font-weight-complex="normal"/>
    </style:style>
    <style:style style:name="T577" style:family="text">
      <style:text-properties fo:font-variant="normal" fo:text-transform="none" fo:color="#111111" loext:opacity="100%" style:font-name="Garamond" fo:font-size="10pt" fo:letter-spacing="normal" fo:font-style="normal" style:text-underline-style="none" fo:font-weight="normal" officeooo:rsid="428ca100" style:font-size-asian="10pt" style:font-style-asian="normal" style:font-weight-asian="normal" style:font-size-complex="10pt" style:font-style-complex="normal" style:font-weight-complex="normal"/>
    </style:style>
    <style:style style:name="T578" style:family="text">
      <style:text-properties fo:font-variant="normal" fo:text-transform="none" fo:color="#111111" loext:opacity="100%" style:font-name="Garamond" fo:font-size="10pt" fo:letter-spacing="normal" fo:font-style="normal" style:text-underline-style="none" fo:font-weight="normal" officeooo:rsid="44221b72" style:font-size-asian="10pt" style:font-style-asian="normal" style:font-weight-asian="normal" style:font-size-complex="10pt" style:font-style-complex="normal" style:font-weight-complex="normal"/>
    </style:style>
    <style:style style:name="T579" style:family="text">
      <style:text-properties fo:font-variant="normal" fo:text-transform="none" fo:color="#111111" loext:opacity="100%" style:font-name="Garamond" fo:font-size="10pt" fo:letter-spacing="normal" fo:font-style="normal" style:text-underline-style="none" fo:font-weight="normal" officeooo:rsid="4423f9cb" style:font-size-asian="10pt" style:font-style-asian="normal" style:font-weight-asian="normal" style:font-size-complex="10pt" style:font-style-complex="normal" style:font-weight-complex="normal"/>
    </style:style>
    <style:style style:name="T580" style:family="text">
      <style:text-properties fo:font-variant="normal" fo:text-transform="none" fo:color="#111111" loext:opacity="100%" style:font-name="Garamond" fo:font-size="10pt" fo:letter-spacing="normal" fo:font-style="normal" style:text-underline-style="none" fo:font-weight="normal" officeooo:rsid="42cc73a3" style:font-size-asian="10pt" style:font-style-asian="normal" style:font-weight-asian="normal" style:font-size-complex="10pt" style:font-style-complex="normal" style:font-weight-complex="normal"/>
    </style:style>
    <style:style style:name="T581" style:family="text">
      <style:text-properties fo:font-variant="normal" fo:text-transform="none" fo:color="#111111" loext:opacity="100%" style:font-name="Garamond" fo:font-size="10pt" fo:letter-spacing="normal" fo:font-style="normal" style:text-underline-style="none" fo:font-weight="normal" officeooo:rsid="46db53b8" style:font-size-asian="10pt" style:font-style-asian="normal" style:font-weight-asian="normal" style:font-size-complex="10pt" style:font-style-complex="normal" style:font-weight-complex="normal"/>
    </style:style>
    <style:style style:name="T582" style:family="text">
      <style:text-properties fo:font-variant="normal" fo:text-transform="none" fo:color="#111111" loext:opacity="100%" style:font-name="Garamond" fo:font-size="10pt" fo:letter-spacing="normal" fo:font-style="normal" style:text-underline-style="none" fo:font-weight="normal" officeooo:rsid="3a455dab" style:font-size-asian="10pt" style:font-style-asian="normal" style:font-weight-asian="normal" style:font-size-complex="10pt" style:font-style-complex="normal" style:font-weight-complex="normal"/>
    </style:style>
    <style:style style:name="T583" style:family="text">
      <style:text-properties fo:font-variant="normal" fo:text-transform="none" fo:color="#111111" loext:opacity="100%" style:font-name="Garamond" fo:font-size="10pt" fo:letter-spacing="normal" fo:font-style="normal" style:text-underline-style="none" fo:font-weight="normal" officeooo:rsid="3a42b7e3" style:font-size-asian="10pt" style:font-style-asian="normal" style:font-weight-asian="normal" style:font-size-complex="10pt" style:font-style-complex="normal" style:font-weight-complex="normal"/>
    </style:style>
    <style:style style:name="T584" style:family="text">
      <style:text-properties fo:font-variant="normal" fo:text-transform="none" fo:color="#111111" loext:opacity="100%" style:font-name="Garamond" fo:font-size="10pt" fo:letter-spacing="normal" fo:font-style="normal" style:text-underline-style="none" fo:font-weight="normal" officeooo:rsid="44248211" style:font-size-asian="10pt" style:font-style-asian="normal" style:font-weight-asian="normal" style:font-size-complex="10pt" style:font-style-complex="normal" style:font-weight-complex="normal"/>
    </style:style>
    <style:style style:name="T585" style:family="text">
      <style:text-properties fo:font-variant="normal" fo:text-transform="none" fo:color="#111111" loext:opacity="100%" style:font-name="Garamond" fo:font-size="10pt" fo:letter-spacing="normal" fo:font-style="normal" style:text-underline-style="none" fo:font-weight="normal" officeooo:rsid="42ce2295" style:font-size-asian="10pt" style:font-style-asian="normal" style:font-weight-asian="normal" style:font-size-complex="10pt" style:font-style-complex="normal" style:font-weight-complex="normal"/>
    </style:style>
    <style:style style:name="T586" style:family="text">
      <style:text-properties fo:font-variant="normal" fo:text-transform="none" fo:color="#111111" loext:opacity="100%" style:font-name="Garamond" fo:font-size="10pt" fo:letter-spacing="normal" fo:font-style="normal" style:text-underline-style="none" fo:font-weight="normal" officeooo:rsid="3a4dfa57" style:font-size-asian="10pt" style:font-style-asian="normal" style:font-weight-asian="normal" style:font-size-complex="10pt" style:font-style-complex="normal" style:font-weight-complex="normal"/>
    </style:style>
    <style:style style:name="T587" style:family="text">
      <style:text-properties fo:font-variant="normal" fo:text-transform="none" fo:color="#111111" loext:opacity="100%" style:font-name="Garamond" fo:font-size="10pt" fo:letter-spacing="normal" fo:font-style="normal" style:text-underline-style="none" fo:font-weight="normal" officeooo:rsid="3a3bca14" style:font-size-asian="10pt" style:font-style-asian="normal" style:font-weight-asian="normal" style:font-size-complex="10pt" style:font-style-complex="normal" style:font-weight-complex="normal"/>
    </style:style>
    <style:style style:name="T588" style:family="text">
      <style:text-properties fo:font-variant="normal" fo:text-transform="none" fo:color="#111111" loext:opacity="100%" style:font-name="Garamond" fo:font-size="10pt" fo:letter-spacing="normal" fo:font-style="normal" style:text-underline-style="none" fo:font-weight="normal" officeooo:rsid="3a4f1550" style:font-size-asian="10pt" style:font-style-asian="normal" style:font-weight-asian="normal" style:font-size-complex="10pt" style:font-style-complex="normal" style:font-weight-complex="normal"/>
    </style:style>
    <style:style style:name="T589" style:family="text">
      <style:text-properties fo:font-variant="normal" fo:text-transform="none" fo:color="#111111" loext:opacity="100%" style:font-name="Garamond" fo:font-size="10pt" fo:letter-spacing="normal" fo:font-style="normal" style:text-underline-style="none" fo:font-weight="normal" officeooo:rsid="3a511008" style:font-size-asian="10pt" style:font-style-asian="normal" style:font-weight-asian="normal" style:font-size-complex="10pt" style:font-style-complex="normal" style:font-weight-complex="normal"/>
    </style:style>
    <style:style style:name="T590" style:family="text">
      <style:text-properties fo:font-variant="normal" fo:text-transform="none" fo:color="#111111" loext:opacity="100%" style:font-name="Garamond" fo:font-size="10pt" fo:letter-spacing="normal" fo:font-style="normal" style:text-underline-style="none" fo:font-weight="normal" officeooo:rsid="3a51ebe7" style:font-size-asian="10pt" style:font-style-asian="normal" style:font-weight-asian="normal" style:font-size-complex="10pt" style:font-style-complex="normal" style:font-weight-complex="normal"/>
    </style:style>
    <style:style style:name="T591" style:family="text">
      <style:text-properties fo:font-variant="normal" fo:text-transform="none" fo:color="#111111" loext:opacity="100%" style:font-name="Garamond" fo:font-size="10pt" fo:letter-spacing="normal" fo:font-style="normal" style:text-underline-style="none" fo:font-weight="normal" officeooo:rsid="442875e3" style:font-size-asian="10pt" style:font-style-asian="normal" style:font-weight-asian="normal" style:font-size-complex="10pt" style:font-style-complex="normal" style:font-weight-complex="normal"/>
    </style:style>
    <style:style style:name="T592" style:family="text">
      <style:text-properties fo:font-variant="normal" fo:text-transform="none" fo:color="#111111" loext:opacity="100%" style:font-name="Garamond" fo:font-size="10pt" fo:letter-spacing="normal" fo:font-style="normal" style:text-underline-style="none" fo:font-weight="normal" officeooo:rsid="3a52b854" style:font-size-asian="10pt" style:font-style-asian="normal" style:font-weight-asian="normal" style:font-size-complex="10pt" style:font-style-complex="normal" style:font-weight-complex="normal"/>
    </style:style>
    <style:style style:name="T593" style:family="text">
      <style:text-properties fo:font-variant="normal" fo:text-transform="none" fo:color="#111111" loext:opacity="100%" style:font-name="Garamond" fo:font-size="10pt" fo:letter-spacing="normal" fo:font-style="normal" style:text-underline-style="none" fo:font-weight="normal" officeooo:rsid="4293e151" style:font-size-asian="10pt" style:font-style-asian="normal" style:font-weight-asian="normal" style:font-size-complex="10pt" style:font-style-complex="normal" style:font-weight-complex="normal"/>
    </style:style>
    <style:style style:name="T594" style:family="text">
      <style:text-properties fo:font-variant="normal" fo:text-transform="none" fo:color="#111111" loext:opacity="100%" style:font-name="Garamond" fo:font-size="10pt" fo:letter-spacing="normal" fo:font-style="normal" style:text-underline-style="none" fo:font-weight="normal" officeooo:rsid="3a5618a7" style:font-size-asian="10pt" style:font-style-asian="normal" style:font-weight-asian="normal" style:font-size-complex="10pt" style:font-style-complex="normal" style:font-weight-complex="normal"/>
    </style:style>
    <style:style style:name="T595" style:family="text">
      <style:text-properties fo:font-variant="normal" fo:text-transform="none" fo:color="#111111" loext:opacity="100%" style:font-name="Garamond" fo:font-size="10pt" fo:letter-spacing="normal" fo:font-style="normal" style:text-underline-style="none" fo:font-weight="normal" officeooo:rsid="3a56496c" style:font-size-asian="10pt" style:font-style-asian="normal" style:font-weight-asian="normal" style:font-size-complex="10pt" style:font-style-complex="normal" style:font-weight-complex="normal"/>
    </style:style>
    <style:style style:name="T596" style:family="text">
      <style:text-properties fo:font-variant="normal" fo:text-transform="none" fo:color="#111111" loext:opacity="100%" style:font-name="Garamond" fo:font-size="10pt" fo:letter-spacing="normal" fo:font-style="normal" style:text-underline-style="none" fo:font-weight="normal" officeooo:rsid="4428b227" style:font-size-asian="10pt" style:font-style-asian="normal" style:font-weight-asian="normal" style:font-size-complex="10pt" style:font-style-complex="normal" style:font-weight-complex="normal"/>
    </style:style>
    <style:style style:name="T597" style:family="text">
      <style:text-properties fo:font-variant="normal" fo:text-transform="none" fo:color="#111111" loext:opacity="100%" style:font-name="Garamond" fo:font-size="10pt" fo:letter-spacing="normal" fo:font-style="normal" style:text-underline-style="none" fo:font-weight="normal" officeooo:rsid="3a59656b" style:font-size-asian="10pt" style:font-style-asian="normal" style:font-weight-asian="normal" style:font-size-complex="10pt" style:font-style-complex="normal" style:font-weight-complex="normal"/>
    </style:style>
    <style:style style:name="T598" style:family="text">
      <style:text-properties fo:font-variant="normal" fo:text-transform="none" fo:color="#111111" loext:opacity="100%" style:font-name="Garamond" fo:font-size="10pt" fo:letter-spacing="normal" fo:font-style="normal" style:text-underline-style="none" fo:font-weight="normal" officeooo:rsid="3a5a21ce" style:font-size-asian="10pt" style:font-style-asian="normal" style:font-weight-asian="normal" style:font-size-complex="10pt" style:font-style-complex="normal" style:font-weight-complex="normal"/>
    </style:style>
    <style:style style:name="T599" style:family="text">
      <style:text-properties fo:font-variant="normal" fo:text-transform="none" fo:color="#111111" loext:opacity="100%" style:font-name="Garamond" fo:font-size="10pt" fo:letter-spacing="normal" fo:font-style="normal" style:text-underline-style="none" fo:font-weight="normal" officeooo:rsid="3a5a6944" style:font-size-asian="10pt" style:font-style-asian="normal" style:font-weight-asian="normal" style:font-size-complex="10pt" style:font-style-complex="normal" style:font-weight-complex="normal"/>
    </style:style>
    <style:style style:name="T600" style:family="text">
      <style:text-properties fo:font-variant="normal" fo:text-transform="none" fo:color="#111111" loext:opacity="100%" style:font-name="Garamond" fo:font-size="10pt" fo:letter-spacing="normal" fo:font-style="normal" style:text-underline-style="none" fo:font-weight="normal" officeooo:rsid="3a57193b" style:font-size-asian="10pt" style:font-style-asian="normal" style:font-weight-asian="normal" style:font-size-complex="10pt" style:font-style-complex="normal" style:font-weight-complex="normal"/>
    </style:style>
    <style:style style:name="T601" style:family="text">
      <style:text-properties fo:font-variant="normal" fo:text-transform="none" fo:color="#111111" loext:opacity="100%" style:font-name="Garamond" fo:font-size="10pt" fo:letter-spacing="normal" fo:font-style="normal" style:text-underline-style="none" fo:font-weight="normal" officeooo:rsid="2f8cc8ff" style:font-size-asian="10pt" style:font-style-asian="normal" style:font-weight-asian="normal" style:font-size-complex="10pt" style:font-style-complex="normal" style:font-weight-complex="normal"/>
    </style:style>
    <style:style style:name="T602" style:family="text">
      <style:text-properties fo:font-variant="normal" fo:text-transform="none" fo:color="#111111" loext:opacity="100%" style:font-name="Garamond" fo:font-size="10pt" fo:letter-spacing="normal" fo:font-style="normal" style:text-underline-style="none" fo:font-weight="normal" officeooo:rsid="3a5bea2c" style:font-size-asian="10pt" style:font-style-asian="normal" style:font-weight-asian="normal" style:font-size-complex="10pt" style:font-style-complex="normal" style:font-weight-complex="normal"/>
    </style:style>
    <style:style style:name="T603" style:family="text">
      <style:text-properties fo:font-variant="normal" fo:text-transform="none" fo:color="#111111" loext:opacity="100%" style:font-name="Garamond" fo:font-size="10pt" fo:letter-spacing="normal" fo:font-style="normal" style:text-underline-style="none" fo:font-weight="normal" officeooo:rsid="42cf02f7" style:font-size-asian="10pt" style:font-style-asian="normal" style:font-weight-asian="normal" style:font-size-complex="10pt" style:font-style-complex="normal" style:font-weight-complex="normal"/>
    </style:style>
    <style:style style:name="T604" style:family="text">
      <style:text-properties fo:font-variant="normal" fo:text-transform="none" fo:color="#111111" loext:opacity="100%" style:font-name="Garamond" fo:font-size="10pt" fo:letter-spacing="normal" fo:font-style="normal" style:text-underline-style="none" fo:font-weight="normal" officeooo:rsid="46dd70a1" style:font-size-asian="10pt" style:font-style-asian="normal" style:font-weight-asian="normal" style:font-size-complex="10pt" style:font-style-complex="normal" style:font-weight-complex="normal"/>
    </style:style>
    <style:style style:name="T605" style:family="text">
      <style:text-properties fo:font-variant="normal" fo:text-transform="none" fo:color="#111111" loext:opacity="100%" style:font-name="Garamond" fo:font-size="10pt" fo:letter-spacing="normal" fo:font-style="normal" style:text-underline-style="none" fo:font-weight="normal" officeooo:rsid="46ddba25" style:font-size-asian="10pt" style:font-style-asian="normal" style:font-weight-asian="normal" style:font-size-complex="10pt" style:font-style-complex="normal" style:font-weight-complex="normal"/>
    </style:style>
    <style:style style:name="T606" style:family="text">
      <style:text-properties fo:font-variant="normal" fo:text-transform="none" fo:color="#111111" loext:opacity="100%" style:font-name="Garamond" fo:font-size="10pt" fo:letter-spacing="normal" fo:font-style="normal" style:text-underline-style="none" fo:font-weight="normal" officeooo:rsid="42cf903f" style:font-size-asian="10pt" style:font-style-asian="normal" style:font-weight-asian="normal" style:font-size-complex="10pt" style:font-style-complex="normal" style:font-weight-complex="normal"/>
    </style:style>
    <style:style style:name="T607" style:family="text">
      <style:text-properties fo:font-variant="normal" fo:text-transform="none" fo:color="#111111" loext:opacity="100%" style:font-name="Garamond" fo:font-size="10pt" fo:letter-spacing="normal" fo:font-style="normal" style:text-underline-style="none" fo:font-weight="normal" officeooo:rsid="42cfde2f" style:font-size-asian="10pt" style:font-style-asian="normal" style:font-weight-asian="normal" style:font-size-complex="10pt" style:font-style-complex="normal" style:font-weight-complex="normal"/>
    </style:style>
    <style:style style:name="T608" style:family="text">
      <style:text-properties fo:font-variant="normal" fo:text-transform="none" fo:color="#111111" loext:opacity="100%" style:font-name="Garamond" fo:font-size="10pt" fo:letter-spacing="normal" fo:font-style="normal" style:text-underline-style="none" fo:font-weight="normal" officeooo:rsid="3a5d95bb" style:font-size-asian="10pt" style:font-style-asian="normal" style:font-weight-asian="normal" style:font-size-complex="10pt" style:font-style-complex="normal" style:font-weight-complex="normal"/>
    </style:style>
    <style:style style:name="T609" style:family="text">
      <style:text-properties fo:font-variant="normal" fo:text-transform="none" fo:color="#111111" loext:opacity="100%" style:font-name="Garamond" fo:font-size="10pt" fo:letter-spacing="normal" fo:font-style="normal" style:text-underline-style="none" fo:font-weight="normal" officeooo:rsid="46e05b7e" style:font-size-asian="10pt" style:font-style-asian="normal" style:font-weight-asian="normal" style:font-size-complex="10pt" style:font-style-complex="normal" style:font-weight-complex="normal"/>
    </style:style>
    <style:style style:name="T610" style:family="text">
      <style:text-properties fo:font-variant="normal" fo:text-transform="none" fo:color="#111111" loext:opacity="100%" style:font-name="Garamond" fo:font-size="10pt" fo:letter-spacing="normal" fo:font-style="normal" style:text-underline-style="none" fo:font-weight="normal" officeooo:rsid="46e0a12a" style:font-size-asian="10pt" style:font-style-asian="normal" style:font-weight-asian="normal" style:font-size-complex="10pt" style:font-style-complex="normal" style:font-weight-complex="normal"/>
    </style:style>
    <style:style style:name="T611" style:family="text">
      <style:text-properties fo:font-variant="normal" fo:text-transform="none" fo:color="#111111" loext:opacity="100%" style:font-name="Garamond" fo:font-size="10pt" fo:letter-spacing="normal" fo:font-style="normal" style:text-underline-style="none" fo:font-weight="normal" officeooo:rsid="42d4274b" style:font-size-asian="10pt" style:font-style-asian="normal" style:font-weight-asian="normal" style:font-size-complex="10pt" style:font-style-complex="normal" style:font-weight-complex="normal"/>
    </style:style>
    <style:style style:name="T612" style:family="text">
      <style:text-properties fo:font-variant="normal" fo:text-transform="none" fo:color="#111111" loext:opacity="100%" style:font-name="Garamond" fo:font-size="10pt" fo:letter-spacing="normal" fo:font-style="normal" style:text-underline-style="none" fo:font-weight="normal" officeooo:rsid="3a5818d3" style:font-size-asian="10pt" style:font-style-asian="normal" style:font-weight-asian="normal" style:font-size-complex="10pt" style:font-style-complex="normal" style:font-weight-complex="normal"/>
    </style:style>
    <style:style style:name="T613" style:family="text">
      <style:text-properties fo:font-variant="normal" fo:text-transform="none" fo:color="#111111" loext:opacity="100%" style:font-name="Garamond" fo:font-size="10pt" fo:letter-spacing="normal" fo:font-style="normal" style:text-underline-style="none" fo:font-weight="normal" officeooo:rsid="2f8d0b85" style:font-size-asian="10pt" style:font-style-asian="normal" style:font-weight-asian="normal" style:font-size-complex="10pt" style:font-style-complex="normal" style:font-weight-complex="normal"/>
    </style:style>
    <style:style style:name="T614" style:family="text">
      <style:text-properties fo:font-variant="normal" fo:text-transform="none" fo:color="#111111" loext:opacity="100%" style:font-name="Garamond" fo:font-size="10pt" fo:letter-spacing="normal" fo:font-style="normal" style:text-underline-style="none" fo:font-weight="normal" officeooo:rsid="3a5deedd" style:font-size-asian="10pt" style:font-style-asian="normal" style:font-weight-asian="normal" style:font-size-complex="10pt" style:font-style-complex="normal" style:font-weight-complex="normal"/>
    </style:style>
    <style:style style:name="T615" style:family="text">
      <style:text-properties fo:font-variant="normal" fo:text-transform="none" fo:color="#111111" loext:opacity="100%" style:font-name="Garamond" fo:font-size="10pt" fo:letter-spacing="normal" fo:font-style="normal" style:text-underline-style="none" fo:font-weight="normal" officeooo:rsid="4d02f1ee" style:font-size-asian="10pt" style:font-style-asian="normal" style:font-weight-asian="normal" style:font-size-complex="10pt" style:font-style-complex="normal" style:font-weight-complex="normal"/>
    </style:style>
    <style:style style:name="T616" style:family="text">
      <style:text-properties fo:font-variant="normal" fo:text-transform="none" fo:color="#111111" loext:opacity="100%" style:font-name="Garamond" fo:font-size="10pt" fo:letter-spacing="normal" fo:font-style="normal" style:text-underline-style="none" fo:font-weight="normal" officeooo:rsid="42d1d16a" style:font-size-asian="10pt" style:font-style-asian="normal" style:font-weight-asian="normal" style:font-size-complex="10pt" style:font-style-complex="normal" style:font-weight-complex="normal"/>
    </style:style>
    <style:style style:name="T617" style:family="text">
      <style:text-properties fo:font-variant="normal" fo:text-transform="none" fo:color="#111111" loext:opacity="100%" style:font-name="Garamond" fo:font-size="10pt" fo:letter-spacing="normal" fo:font-style="normal" style:text-underline-style="none" fo:font-weight="normal" officeooo:rsid="46e1e702" style:font-size-asian="10pt" style:font-style-asian="normal" style:font-weight-asian="normal" style:font-size-complex="10pt" style:font-style-complex="normal" style:font-weight-complex="normal"/>
    </style:style>
    <style:style style:name="T618" style:family="text">
      <style:text-properties fo:font-variant="normal" fo:text-transform="none" fo:color="#111111" loext:opacity="100%" style:font-name="Garamond" fo:font-size="10pt" fo:letter-spacing="normal" fo:font-style="normal" style:text-underline-style="none" fo:font-weight="normal" officeooo:rsid="42d550d5" style:font-size-asian="10pt" style:font-style-asian="normal" style:font-weight-asian="normal" style:font-size-complex="10pt" style:font-style-complex="normal" style:font-weight-complex="normal"/>
    </style:style>
    <style:style style:name="T619" style:family="text">
      <style:text-properties fo:font-variant="normal" fo:text-transform="none" fo:color="#111111" loext:opacity="100%" style:font-name="Garamond" fo:font-size="10pt" fo:letter-spacing="normal" fo:font-style="normal" style:text-underline-style="none" fo:font-weight="normal" officeooo:rsid="46e337d7" style:font-size-asian="10pt" style:font-style-asian="normal" style:font-weight-asian="normal" style:font-size-complex="10pt" style:font-style-complex="normal" style:font-weight-complex="normal"/>
    </style:style>
    <style:style style:name="T620" style:family="text">
      <style:text-properties fo:font-variant="normal" fo:text-transform="none" fo:color="#111111" loext:opacity="100%" style:font-name="Garamond" fo:font-size="10pt" fo:letter-spacing="normal" fo:font-style="normal" style:text-underline-style="none" fo:font-weight="normal" officeooo:rsid="42d32aa8" style:font-size-asian="10pt" style:font-style-asian="normal" style:font-weight-asian="normal" style:font-size-complex="10pt" style:font-style-complex="normal" style:font-weight-complex="normal"/>
    </style:style>
    <style:style style:name="T621" style:family="text">
      <style:text-properties fo:font-variant="normal" fo:text-transform="none" fo:color="#111111" loext:opacity="100%" style:font-name="Garamond" fo:font-size="10pt" fo:letter-spacing="normal" fo:font-style="normal" style:text-underline-style="none" fo:font-weight="normal" officeooo:rsid="46e40005" style:font-size-asian="10pt" style:font-style-asian="normal" style:font-weight-asian="normal" style:font-size-complex="10pt" style:font-style-complex="normal" style:font-weight-complex="normal"/>
    </style:style>
    <style:style style:name="T622" style:family="text">
      <style:text-properties fo:font-variant="normal" fo:text-transform="none" fo:color="#111111" loext:opacity="100%" style:font-name="Garamond" fo:font-size="10pt" fo:letter-spacing="normal" fo:font-style="normal" style:text-underline-style="none" fo:font-weight="normal" officeooo:rsid="46e5acca" style:font-size-asian="10pt" style:font-style-asian="normal" style:font-weight-asian="normal" style:font-size-complex="10pt" style:font-style-complex="normal" style:font-weight-complex="normal"/>
    </style:style>
    <style:style style:name="T623" style:family="text">
      <style:text-properties fo:font-variant="normal" fo:text-transform="none" fo:color="#111111" loext:opacity="100%" style:font-name="Garamond" fo:font-size="10pt" fo:letter-spacing="normal" fo:font-style="normal" style:text-underline-style="none" fo:font-weight="normal" officeooo:rsid="46e45ca3" style:font-size-asian="10pt" style:font-style-asian="normal" style:font-weight-asian="normal" style:font-size-complex="10pt" style:font-style-complex="normal" style:font-weight-complex="normal"/>
    </style:style>
    <style:style style:name="T624" style:family="text">
      <style:text-properties fo:font-variant="normal" fo:text-transform="none" fo:color="#111111" loext:opacity="100%" style:font-name="Garamond" fo:font-size="10pt" fo:letter-spacing="normal" fo:font-style="normal" style:text-underline-style="none" fo:font-weight="normal" officeooo:rsid="46e79d30" style:font-size-asian="10pt" style:font-style-asian="normal" style:font-weight-asian="normal" style:font-size-complex="10pt" style:font-style-complex="normal" style:font-weight-complex="normal"/>
    </style:style>
    <style:style style:name="T625" style:family="text">
      <style:text-properties fo:font-variant="normal" fo:text-transform="none" fo:color="#111111" loext:opacity="100%" style:font-name="Garamond" fo:font-size="10pt" fo:letter-spacing="normal" fo:font-style="normal" style:text-underline-style="none" fo:font-weight="normal" officeooo:rsid="46e8c354" style:font-size-asian="10pt" style:font-style-asian="normal" style:font-weight-asian="normal" style:font-size-complex="10pt" style:font-style-complex="normal" style:font-weight-complex="normal"/>
    </style:style>
    <style:style style:name="T626" style:family="text">
      <style:text-properties fo:font-variant="normal" fo:text-transform="none" fo:color="#111111" loext:opacity="100%" style:font-name="Garamond" fo:font-size="10pt" fo:letter-spacing="normal" fo:font-style="normal" style:text-underline-style="none" fo:font-weight="normal" officeooo:rsid="46e92480" style:font-size-asian="10pt" style:font-style-asian="normal" style:font-weight-asian="normal" style:font-size-complex="10pt" style:font-style-complex="normal" style:font-weight-complex="normal"/>
    </style:style>
    <style:style style:name="T627" style:family="text">
      <style:text-properties fo:font-variant="normal" fo:text-transform="none" fo:color="#111111" loext:opacity="100%" style:font-name="Garamond" fo:font-size="10pt" fo:letter-spacing="normal" fo:font-style="normal" style:text-underline-style="none" fo:font-weight="normal" officeooo:rsid="46ea61dc" style:font-size-asian="10pt" style:font-style-asian="normal" style:font-weight-asian="normal" style:font-size-complex="10pt" style:font-style-complex="normal" style:font-weight-complex="normal"/>
    </style:style>
    <style:style style:name="T628" style:family="text">
      <style:text-properties fo:font-variant="normal" fo:text-transform="none" fo:color="#111111" loext:opacity="100%" style:font-name="Garamond" fo:font-size="10pt" fo:letter-spacing="normal" fo:font-style="normal" style:text-underline-style="none" fo:font-weight="normal" officeooo:rsid="46e4f253" style:font-size-asian="10pt" style:font-style-asian="normal" style:font-weight-asian="normal" style:font-size-complex="10pt" style:font-style-complex="normal" style:font-weight-complex="normal"/>
    </style:style>
    <style:style style:name="T629" style:family="text">
      <style:text-properties fo:font-variant="normal" fo:text-transform="none" fo:color="#111111" loext:opacity="100%" style:font-name="Garamond" fo:font-size="10pt" fo:letter-spacing="normal" fo:font-style="normal" style:text-underline-style="none" fo:font-weight="normal" officeooo:rsid="2f80b0ea" style:font-size-asian="10pt" style:font-style-asian="normal" style:font-weight-asian="normal" style:font-size-complex="10pt" style:font-style-complex="normal" style:font-weight-complex="normal"/>
    </style:style>
    <style:style style:name="T630" style:family="text">
      <style:text-properties fo:font-variant="normal" fo:text-transform="none" fo:color="#111111" loext:opacity="100%" style:font-name="Garamond" fo:font-size="10pt" fo:letter-spacing="normal" fo:font-style="normal" style:text-underline-style="none" fo:font-weight="normal" officeooo:rsid="42e57b95" style:font-size-asian="10pt" style:font-style-asian="normal" style:font-weight-asian="normal" style:font-size-complex="10pt" style:font-style-complex="normal" style:font-weight-complex="normal"/>
    </style:style>
    <style:style style:name="T631" style:family="text">
      <style:text-properties fo:font-variant="normal" fo:text-transform="none" fo:color="#111111" loext:opacity="100%" style:font-name="Garamond" fo:font-size="10pt" fo:letter-spacing="normal" fo:font-style="normal" style:text-underline-style="none" fo:font-weight="normal" officeooo:rsid="3a5df163" style:font-size-asian="10pt" style:font-style-asian="normal" style:font-weight-asian="normal" style:font-size-complex="10pt" style:font-style-complex="normal" style:font-weight-complex="normal"/>
    </style:style>
    <style:style style:name="T632" style:family="text">
      <style:text-properties fo:font-variant="normal" fo:text-transform="none" fo:color="#111111" loext:opacity="100%" style:font-name="Garamond" fo:font-size="10pt" fo:letter-spacing="normal" fo:font-style="normal" style:text-underline-style="none" fo:font-weight="normal" officeooo:rsid="42d6e4b6" style:font-size-asian="10pt" style:font-style-asian="normal" style:font-weight-asian="normal" style:font-size-complex="10pt" style:font-style-complex="normal" style:font-weight-complex="normal"/>
    </style:style>
    <style:style style:name="T633" style:family="text">
      <style:text-properties fo:font-variant="normal" fo:text-transform="none" fo:color="#111111" loext:opacity="100%" style:font-name="Garamond" fo:font-size="10pt" fo:letter-spacing="normal" fo:font-style="normal" style:text-underline-style="none" fo:font-weight="normal" officeooo:rsid="2fac3975" style:font-size-asian="10pt" style:font-style-asian="normal" style:font-weight-asian="normal" style:font-size-complex="10pt" style:font-style-complex="normal" style:font-weight-complex="normal"/>
    </style:style>
    <style:style style:name="T634" style:family="text">
      <style:text-properties fo:font-variant="normal" fo:text-transform="none" fo:color="#111111" loext:opacity="100%" style:font-name="Garamond" fo:font-size="10pt" fo:letter-spacing="normal" fo:font-style="normal" style:text-underline-style="none" fo:font-weight="normal" officeooo:rsid="42d7e911" style:font-size-asian="10pt" style:font-style-asian="normal" style:font-weight-asian="normal" style:font-size-complex="10pt" style:font-style-complex="normal" style:font-weight-complex="normal"/>
    </style:style>
    <style:style style:name="T635" style:family="text">
      <style:text-properties fo:font-variant="normal" fo:text-transform="none" fo:color="#111111" loext:opacity="100%" style:font-name="Garamond" fo:font-size="10pt" fo:letter-spacing="normal" fo:font-style="normal" style:text-underline-style="none" fo:font-weight="normal" officeooo:rsid="46eaa412" style:font-size-asian="10pt" style:font-style-asian="normal" style:font-weight-asian="normal" style:font-size-complex="10pt" style:font-style-complex="normal" style:font-weight-complex="normal"/>
    </style:style>
    <style:style style:name="T636" style:family="text">
      <style:text-properties fo:font-variant="normal" fo:text-transform="none" fo:color="#111111" loext:opacity="100%" style:font-name="Garamond" fo:font-size="10pt" fo:letter-spacing="normal" fo:font-style="normal" style:text-underline-style="none" fo:font-weight="normal" officeooo:rsid="46ec2fbf" style:font-size-asian="10pt" style:font-style-asian="normal" style:font-weight-asian="normal" style:font-size-complex="10pt" style:font-style-complex="normal" style:font-weight-complex="normal"/>
    </style:style>
    <style:style style:name="T637" style:family="text">
      <style:text-properties fo:font-variant="normal" fo:text-transform="none" fo:color="#111111" loext:opacity="100%" style:font-name="Garamond" fo:font-size="10pt" fo:letter-spacing="normal" fo:font-style="normal" style:text-underline-style="none" fo:font-weight="normal" officeooo:rsid="46ed1af1" style:font-size-asian="10pt" style:font-style-asian="normal" style:font-weight-asian="normal" style:font-size-complex="10pt" style:font-style-complex="normal" style:font-weight-complex="normal"/>
    </style:style>
    <style:style style:name="T638" style:family="text">
      <style:text-properties fo:font-variant="normal" fo:text-transform="none" fo:color="#111111" loext:opacity="100%" style:font-name="Garamond" fo:font-size="10pt" fo:letter-spacing="normal" fo:font-style="normal" style:text-underline-style="none" fo:font-weight="normal" officeooo:rsid="3a603745" style:font-size-asian="10pt" style:font-style-asian="normal" style:font-weight-asian="normal" style:font-size-complex="10pt" style:font-style-complex="normal" style:font-weight-complex="normal"/>
    </style:style>
    <style:style style:name="T639" style:family="text">
      <style:text-properties fo:font-variant="normal" fo:text-transform="none" fo:color="#111111" loext:opacity="100%" style:font-name="Garamond" fo:font-size="10pt" fo:letter-spacing="normal" fo:font-style="normal" style:text-underline-style="none" fo:font-weight="normal" officeooo:rsid="442b2b8a" style:font-size-asian="10pt" style:font-style-asian="normal" style:font-weight-asian="normal" style:font-size-complex="10pt" style:font-style-complex="normal" style:font-weight-complex="normal"/>
    </style:style>
    <style:style style:name="T640" style:family="text">
      <style:text-properties fo:font-variant="normal" fo:text-transform="none" fo:color="#111111" loext:opacity="100%" style:font-name="Garamond" fo:font-size="10pt" fo:letter-spacing="normal" fo:font-style="normal" style:text-underline-style="none" fo:font-weight="normal" officeooo:rsid="3a5f8b62" style:font-size-asian="10pt" style:font-style-asian="normal" style:font-weight-asian="normal" style:font-size-complex="10pt" style:font-style-complex="normal" style:font-weight-complex="normal"/>
    </style:style>
    <style:style style:name="T641" style:family="text">
      <style:text-properties fo:font-variant="normal" fo:text-transform="none" fo:color="#111111" loext:opacity="100%" style:font-name="Garamond" fo:font-size="10pt" fo:letter-spacing="normal" fo:font-style="normal" style:text-underline-style="none" fo:font-weight="normal" officeooo:rsid="42d90e73" style:font-size-asian="10pt" style:font-style-asian="normal" style:font-weight-asian="normal" style:font-size-complex="10pt" style:font-style-complex="normal" style:font-weight-complex="normal"/>
    </style:style>
    <style:style style:name="T642" style:family="text">
      <style:text-properties fo:font-variant="normal" fo:text-transform="none" fo:color="#111111" loext:opacity="100%" style:font-name="Garamond" fo:font-size="10pt" fo:letter-spacing="normal" fo:font-style="normal" style:text-underline-style="none" fo:font-weight="normal" officeooo:rsid="442cc1cb" style:font-size-asian="10pt" style:font-style-asian="normal" style:font-weight-asian="normal" style:font-size-complex="10pt" style:font-style-complex="normal" style:font-weight-complex="normal"/>
    </style:style>
    <style:style style:name="T643" style:family="text">
      <style:text-properties fo:font-variant="normal" fo:text-transform="none" fo:color="#111111" loext:opacity="100%" style:font-name="Garamond" fo:font-size="10pt" fo:letter-spacing="normal" fo:font-style="normal" style:text-underline-style="none" fo:font-weight="normal" officeooo:rsid="42dafe66" style:font-size-asian="10pt" style:font-style-asian="normal" style:font-weight-asian="normal" style:font-size-complex="10pt" style:font-style-complex="normal" style:font-weight-complex="normal"/>
    </style:style>
    <style:style style:name="T644" style:family="text">
      <style:text-properties fo:font-variant="normal" fo:text-transform="none" fo:color="#111111" loext:opacity="100%" style:font-name="Garamond" fo:font-size="10pt" fo:letter-spacing="normal" fo:font-style="normal" style:text-underline-style="none" fo:font-weight="normal" officeooo:rsid="442b844e" style:font-size-asian="10pt" style:font-style-asian="normal" style:font-weight-asian="normal" style:font-size-complex="10pt" style:font-style-complex="normal" style:font-weight-complex="normal"/>
    </style:style>
    <style:style style:name="T645" style:family="text">
      <style:text-properties fo:font-variant="normal" fo:text-transform="none" fo:color="#111111" loext:opacity="100%" style:font-name="Garamond" fo:font-size="10pt" fo:letter-spacing="normal" fo:font-style="normal" style:text-underline-style="none" fo:font-weight="normal" officeooo:rsid="46eed332" style:font-size-asian="10pt" style:font-style-asian="normal" style:font-weight-asian="normal" style:font-size-complex="10pt" style:font-style-complex="normal" style:font-weight-complex="normal"/>
    </style:style>
    <style:style style:name="T646" style:family="text">
      <style:text-properties fo:font-variant="normal" fo:text-transform="none" fo:color="#111111" loext:opacity="100%" style:font-name="Garamond" fo:font-size="10pt" fo:letter-spacing="normal" fo:font-style="normal" style:text-underline-style="none" fo:font-weight="normal" officeooo:rsid="46efa6cb" style:font-size-asian="10pt" style:font-style-asian="normal" style:font-weight-asian="normal" style:font-size-complex="10pt" style:font-style-complex="normal" style:font-weight-complex="normal"/>
    </style:style>
    <style:style style:name="T647" style:family="text">
      <style:text-properties fo:font-variant="normal" fo:text-transform="none" fo:color="#111111" loext:opacity="100%" style:font-name="Garamond" fo:font-size="10pt" fo:letter-spacing="normal" fo:font-style="normal" style:text-underline-style="none" fo:font-weight="normal" officeooo:rsid="46f2413c" style:font-size-asian="10pt" style:font-style-asian="normal" style:font-weight-asian="normal" style:font-size-complex="10pt" style:font-style-complex="normal" style:font-weight-complex="normal"/>
    </style:style>
    <style:style style:name="T648" style:family="text">
      <style:text-properties fo:font-variant="normal" fo:text-transform="none" fo:color="#111111" loext:opacity="100%" style:font-name="Garamond" fo:font-size="10pt" fo:letter-spacing="normal" fo:font-style="normal" style:text-underline-style="none" fo:font-weight="normal" officeooo:rsid="46f3b3bd" style:font-size-asian="10pt" style:font-style-asian="normal" style:font-weight-asian="normal" style:font-size-complex="10pt" style:font-style-complex="normal" style:font-weight-complex="normal"/>
    </style:style>
    <style:style style:name="T649" style:family="text">
      <style:text-properties fo:font-variant="normal" fo:text-transform="none" fo:color="#111111" loext:opacity="100%" style:font-name="Garamond" fo:font-size="10pt" fo:letter-spacing="normal" fo:font-style="normal" style:text-underline-style="none" fo:font-weight="normal" officeooo:rsid="46f3ce6c" style:font-size-asian="10pt" style:font-style-asian="normal" style:font-weight-asian="normal" style:font-size-complex="10pt" style:font-style-complex="normal" style:font-weight-complex="normal"/>
    </style:style>
    <style:style style:name="T650" style:family="text">
      <style:text-properties fo:font-variant="normal" fo:text-transform="none" fo:color="#111111" loext:opacity="100%" style:font-name="Garamond" fo:font-size="10pt" fo:letter-spacing="normal" fo:font-style="normal" style:text-underline-style="none" fo:font-weight="normal" officeooo:rsid="442cfbe7" style:font-size-asian="10pt" style:font-style-asian="normal" style:font-weight-asian="normal" style:font-size-complex="10pt" style:font-style-complex="normal" style:font-weight-complex="normal"/>
    </style:style>
    <style:style style:name="T651" style:family="text">
      <style:text-properties fo:font-variant="normal" fo:text-transform="none" fo:color="#111111" loext:opacity="100%" style:font-name="Garamond" fo:font-size="10pt" fo:letter-spacing="normal" fo:font-style="normal" style:text-underline-style="none" fo:font-weight="normal" officeooo:rsid="46f04844" style:font-size-asian="10pt" style:font-style-asian="normal" style:font-weight-asian="normal" style:font-size-complex="10pt" style:font-style-complex="normal" style:font-weight-complex="normal"/>
    </style:style>
    <style:style style:name="T652" style:family="text">
      <style:text-properties fo:font-variant="normal" fo:text-transform="none" fo:color="#111111" loext:opacity="100%" style:font-name="Garamond" fo:font-size="10pt" fo:letter-spacing="normal" fo:font-style="normal" style:text-underline-style="none" fo:font-weight="normal" officeooo:rsid="4d05e9cb" style:font-size-asian="10pt" style:font-style-asian="normal" style:font-weight-asian="normal" style:font-size-complex="10pt" style:font-style-complex="normal" style:font-weight-complex="normal"/>
    </style:style>
    <style:style style:name="T653" style:family="text">
      <style:text-properties fo:font-variant="normal" fo:text-transform="none" fo:color="#111111" loext:opacity="100%" style:font-name="Garamond" fo:font-size="10pt" fo:letter-spacing="normal" fo:font-style="normal" style:text-underline-style="none" fo:font-weight="normal" officeooo:rsid="46f5025f" style:font-size-asian="10pt" style:font-style-asian="normal" style:font-weight-asian="normal" style:font-size-complex="10pt" style:font-style-complex="normal" style:font-weight-complex="normal"/>
    </style:style>
    <style:style style:name="T654" style:family="text">
      <style:text-properties fo:font-variant="normal" fo:text-transform="none" fo:color="#111111" loext:opacity="100%" style:font-name="Garamond" fo:font-size="10pt" fo:letter-spacing="normal" fo:font-style="normal" style:text-underline-style="none" fo:font-weight="normal" officeooo:rsid="442d927e" style:font-size-asian="10pt" style:font-style-asian="normal" style:font-weight-asian="normal" style:font-size-complex="10pt" style:font-style-complex="normal" style:font-weight-complex="normal"/>
    </style:style>
    <style:style style:name="T655" style:family="text">
      <style:text-properties fo:font-variant="normal" fo:text-transform="none" fo:color="#111111" loext:opacity="100%" style:font-name="Garamond" fo:font-size="10pt" fo:letter-spacing="normal" fo:font-style="normal" style:text-underline-style="none" fo:font-weight="normal" officeooo:rsid="42ddb659" style:font-size-asian="10pt" style:font-style-asian="normal" style:font-weight-asian="normal" style:font-size-complex="10pt" style:font-style-complex="normal" style:font-weight-complex="normal"/>
    </style:style>
    <style:style style:name="T656" style:family="text">
      <style:text-properties fo:font-variant="normal" fo:text-transform="none" fo:color="#111111" loext:opacity="100%" style:font-name="Garamond" fo:font-size="10pt" fo:letter-spacing="normal" fo:font-style="normal" style:text-underline-style="none" fo:font-weight="normal" officeooo:rsid="42df9dbf" style:font-size-asian="10pt" style:font-style-asian="normal" style:font-weight-asian="normal" style:font-size-complex="10pt" style:font-style-complex="normal" style:font-weight-complex="normal"/>
    </style:style>
    <style:style style:name="T657" style:family="text">
      <style:text-properties fo:font-variant="normal" fo:text-transform="none" fo:color="#111111" loext:opacity="100%" style:font-name="Garamond" fo:font-size="10pt" fo:letter-spacing="normal" fo:font-style="normal" style:text-underline-style="none" fo:font-weight="normal" officeooo:rsid="46f7acb7" style:font-size-asian="10pt" style:font-style-asian="normal" style:font-weight-asian="normal" style:font-size-complex="10pt" style:font-style-complex="normal" style:font-weight-complex="normal"/>
    </style:style>
    <style:style style:name="T658" style:family="text">
      <style:text-properties fo:font-variant="normal" fo:text-transform="none" fo:color="#111111" loext:opacity="100%" style:font-name="Garamond" fo:font-size="10pt" fo:letter-spacing="normal" fo:font-style="normal" style:text-underline-style="none" fo:font-weight="normal" officeooo:rsid="46f66d1e" style:font-size-asian="10pt" style:font-style-asian="normal" style:font-weight-asian="normal" style:font-size-complex="10pt" style:font-style-complex="normal" style:font-weight-complex="normal"/>
    </style:style>
    <style:style style:name="T659" style:family="text">
      <style:text-properties fo:font-variant="normal" fo:text-transform="none" fo:color="#111111" loext:opacity="100%" style:font-name="Garamond" fo:font-size="10pt" fo:letter-spacing="normal" fo:font-style="normal" style:text-underline-style="none" fo:font-weight="normal" officeooo:rsid="46f51f32" style:font-size-asian="10pt" style:font-style-asian="normal" style:font-weight-asian="normal" style:font-size-complex="10pt" style:font-style-complex="normal" style:font-weight-complex="normal"/>
    </style:style>
    <style:style style:name="T660" style:family="text">
      <style:text-properties fo:font-variant="normal" fo:text-transform="none" fo:color="#111111" loext:opacity="100%" style:font-name="Garamond" fo:font-size="10pt" fo:letter-spacing="normal" fo:font-style="normal" style:text-underline-style="none" fo:font-weight="normal" officeooo:rsid="4d05ebce" style:font-size-asian="10pt" style:font-style-asian="normal" style:font-weight-asian="normal" style:font-size-complex="10pt" style:font-style-complex="normal" style:font-weight-complex="normal"/>
    </style:style>
    <style:style style:name="T661" style:family="text">
      <style:text-properties fo:font-variant="normal" fo:text-transform="none" fo:color="#111111" loext:opacity="100%" style:font-name="Garamond" fo:font-size="10pt" fo:letter-spacing="normal" fo:font-style="normal" style:text-underline-style="none" fo:font-weight="normal" officeooo:rsid="46f98fb7" style:font-size-asian="10pt" style:font-style-asian="normal" style:font-weight-asian="normal" style:font-size-complex="10pt" style:font-style-complex="normal" style:font-weight-complex="normal"/>
    </style:style>
    <style:style style:name="T662" style:family="text">
      <style:text-properties fo:font-variant="normal" fo:text-transform="none" fo:color="#111111" loext:opacity="100%" style:font-name="Garamond" fo:font-size="10pt" fo:letter-spacing="normal" fo:font-style="normal" style:text-underline-style="none" fo:font-weight="normal" officeooo:rsid="46f8bd96" style:font-size-asian="10pt" style:font-style-asian="normal" style:font-weight-asian="normal" style:font-size-complex="10pt" style:font-style-complex="normal" style:font-weight-complex="normal"/>
    </style:style>
    <style:style style:name="T663" style:family="text">
      <style:text-properties fo:font-variant="normal" fo:text-transform="none" fo:color="#111111" loext:opacity="100%" style:font-name="Garamond" fo:font-size="10pt" fo:letter-spacing="normal" fo:font-style="normal" style:text-underline-style="none" fo:font-weight="normal" officeooo:rsid="42e14156" style:font-size-asian="10pt" style:font-style-asian="normal" style:font-weight-asian="normal" style:font-size-complex="10pt" style:font-style-complex="normal" style:font-weight-complex="normal"/>
    </style:style>
    <style:style style:name="T664" style:family="text">
      <style:text-properties fo:font-variant="normal" fo:text-transform="none" fo:color="#111111" loext:opacity="100%" style:font-name="Garamond" fo:font-size="10pt" fo:letter-spacing="normal" fo:font-style="normal" style:text-underline-style="none" fo:font-weight="normal" officeooo:rsid="442e9df3" style:font-size-asian="10pt" style:font-style-asian="normal" style:font-weight-asian="normal" style:font-size-complex="10pt" style:font-style-complex="normal" style:font-weight-complex="normal"/>
    </style:style>
    <style:style style:name="T665" style:family="text">
      <style:text-properties fo:font-variant="normal" fo:text-transform="none" fo:color="#111111" loext:opacity="100%" style:font-name="Garamond" fo:font-size="10pt" fo:letter-spacing="normal" fo:font-style="normal" style:text-underline-style="none" fo:font-weight="normal" officeooo:rsid="442ea8a3" style:font-size-asian="10pt" style:font-style-asian="normal" style:font-weight-asian="normal" style:font-size-complex="10pt" style:font-style-complex="normal" style:font-weight-complex="normal"/>
    </style:style>
    <style:style style:name="T666" style:family="text">
      <style:text-properties fo:font-variant="normal" fo:text-transform="none" fo:color="#111111" loext:opacity="100%" style:font-name="Garamond" fo:font-size="10pt" fo:letter-spacing="normal" fo:font-style="normal" style:text-underline-style="none" fo:font-weight="normal" officeooo:rsid="42e43aab" style:font-size-asian="10pt" style:font-style-asian="normal" style:font-weight-asian="normal" style:font-size-complex="10pt" style:font-style-complex="normal" style:font-weight-complex="normal"/>
    </style:style>
    <style:style style:name="T667" style:family="text">
      <style:text-properties fo:font-variant="normal" fo:text-transform="none" fo:color="#111111" loext:opacity="100%" style:font-name="Garamond" fo:font-size="10pt" fo:letter-spacing="normal" fo:font-style="normal" style:text-underline-style="none" fo:font-weight="normal" officeooo:rsid="42e55e26" style:font-size-asian="10pt" style:font-style-asian="normal" style:font-weight-asian="normal" style:font-size-complex="10pt" style:font-style-complex="normal" style:font-weight-complex="normal"/>
    </style:style>
    <style:style style:name="T668" style:family="text">
      <style:text-properties fo:font-variant="normal" fo:text-transform="none" fo:color="#111111" loext:opacity="100%" style:font-name="Garamond" fo:font-size="10pt" fo:letter-spacing="normal" fo:font-style="normal" style:text-underline-style="none" fo:font-weight="normal" officeooo:rsid="42e21e4d" style:font-size-asian="10pt" style:font-style-asian="normal" style:font-weight-asian="normal" style:font-size-complex="10pt" style:font-style-complex="normal" style:font-weight-complex="normal"/>
    </style:style>
    <style:style style:name="T669" style:family="text">
      <style:text-properties fo:font-variant="normal" fo:text-transform="none" fo:color="#111111" loext:opacity="100%" style:font-name="Garamond" fo:font-size="10pt" fo:letter-spacing="normal" fo:font-style="normal" style:text-underline-style="none" fo:font-weight="normal" officeooo:rsid="46f9b26e" style:font-size-asian="10pt" style:font-style-asian="normal" style:font-weight-asian="normal" style:font-size-complex="10pt" style:font-style-complex="normal" style:font-weight-complex="normal"/>
    </style:style>
    <style:style style:name="T670" style:family="text">
      <style:text-properties fo:font-variant="normal" fo:text-transform="none" fo:color="#111111" loext:opacity="100%" style:font-name="Garamond" fo:font-size="10pt" fo:letter-spacing="normal" fo:font-style="normal" style:text-underline-style="none" fo:font-weight="normal" officeooo:rsid="442f3c89" style:font-size-asian="10pt" style:font-style-asian="normal" style:font-weight-asian="normal" style:font-size-complex="10pt" style:font-style-complex="normal" style:font-weight-complex="normal"/>
    </style:style>
    <style:style style:name="T671" style:family="text">
      <style:text-properties fo:font-variant="normal" fo:text-transform="none" fo:color="#111111" loext:opacity="100%" style:font-name="Garamond" fo:font-size="10pt" fo:letter-spacing="normal" fo:font-style="normal" style:text-underline-style="none" fo:font-weight="normal" officeooo:rsid="44305b5c" style:font-size-asian="10pt" style:font-style-asian="normal" style:font-weight-asian="normal" style:font-size-complex="10pt" style:font-style-complex="normal" style:font-weight-complex="normal"/>
    </style:style>
    <style:style style:name="T672" style:family="text">
      <style:text-properties fo:font-variant="normal" fo:text-transform="none" fo:color="#111111" loext:opacity="100%" style:font-name="Garamond" fo:font-size="10pt" fo:letter-spacing="normal" fo:font-style="normal" style:text-underline-style="none" fo:font-weight="normal" officeooo:rsid="2fa0b0c2" style:font-size-asian="10pt" style:font-style-asian="normal" style:font-weight-asian="normal" style:font-size-complex="10pt" style:font-style-complex="normal" style:font-weight-complex="normal"/>
    </style:style>
    <style:style style:name="T673" style:family="text">
      <style:text-properties fo:font-variant="normal" fo:text-transform="none" fo:color="#111111" loext:opacity="100%" style:font-name="Garamond" fo:font-size="10pt" fo:letter-spacing="normal" fo:font-style="normal" style:text-underline-style="none" fo:font-weight="normal" officeooo:rsid="2fa0be31" style:font-size-asian="10pt" style:font-style-asian="normal" style:font-weight-asian="normal" style:font-size-complex="10pt" style:font-style-complex="normal" style:font-weight-complex="normal"/>
    </style:style>
    <style:style style:name="T674" style:family="text">
      <style:text-properties fo:font-variant="normal" fo:text-transform="none" fo:color="#111111" loext:opacity="100%" style:font-name="Garamond" fo:font-size="10pt" fo:letter-spacing="normal" fo:font-style="normal" style:text-underline-style="none" fo:font-weight="normal" officeooo:rsid="3a605601" style:font-size-asian="10pt" style:font-style-asian="normal" style:font-weight-asian="normal" style:font-size-complex="10pt" style:font-style-complex="normal" style:font-weight-complex="normal"/>
    </style:style>
    <style:style style:name="T675" style:family="text">
      <style:text-properties fo:font-variant="normal" fo:text-transform="none" fo:color="#111111" loext:opacity="100%" style:font-name="Garamond" fo:font-size="10pt" fo:letter-spacing="normal" fo:font-style="normal" style:text-underline-style="none" fo:font-weight="normal" officeooo:rsid="42dbc00e" style:font-size-asian="10pt" style:font-style-asian="normal" style:font-weight-asian="normal" style:font-size-complex="10pt" style:font-style-complex="normal" style:font-weight-complex="normal"/>
    </style:style>
    <style:style style:name="T676" style:family="text">
      <style:text-properties fo:font-variant="normal" fo:text-transform="none" fo:color="#111111" loext:opacity="100%" style:font-name="Garamond" fo:font-size="10pt" fo:letter-spacing="normal" fo:font-style="normal" style:text-underline-style="none" fo:font-weight="normal" officeooo:rsid="42dd0812" style:font-size-asian="10pt" style:font-style-asian="normal" style:font-weight-asian="normal" style:font-size-complex="10pt" style:font-style-complex="normal" style:font-weight-complex="normal"/>
    </style:style>
    <style:style style:name="T677" style:family="text">
      <style:text-properties fo:font-variant="normal" fo:text-transform="none" fo:color="#111111" loext:opacity="100%" style:font-name="Garamond" fo:font-size="10pt" fo:letter-spacing="normal" fo:font-style="normal" style:text-underline-style="none" fo:font-weight="normal" officeooo:rsid="44322bb9" style:font-size-asian="10pt" style:font-style-asian="normal" style:font-weight-asian="normal" style:font-size-complex="10pt" style:font-style-complex="normal" style:font-weight-complex="normal"/>
    </style:style>
    <style:style style:name="T678" style:family="text">
      <style:text-properties fo:font-variant="normal" fo:text-transform="none" fo:color="#111111" loext:opacity="100%" style:font-name="Garamond" fo:font-size="10pt" fo:letter-spacing="normal" fo:font-style="normal" style:text-underline-style="none" fo:font-weight="normal" officeooo:rsid="42ea34f7" style:font-size-asian="10pt" style:font-style-asian="normal" style:font-weight-asian="normal" style:font-size-complex="10pt" style:font-style-complex="normal" style:font-weight-complex="normal"/>
    </style:style>
    <style:style style:name="T679" style:family="text">
      <style:text-properties fo:font-variant="normal" fo:text-transform="none" fo:color="#111111" loext:opacity="100%" style:font-name="Garamond" fo:font-size="10pt" fo:letter-spacing="normal" fo:font-style="normal" style:text-underline-style="none" fo:font-weight="normal" officeooo:rsid="3a635d85" style:font-size-asian="10pt" style:font-style-asian="normal" style:font-weight-asian="normal" style:font-size-complex="10pt" style:font-style-complex="normal" style:font-weight-complex="normal"/>
    </style:style>
    <style:style style:name="T680" style:family="text">
      <style:text-properties fo:font-variant="normal" fo:text-transform="none" fo:color="#111111" loext:opacity="100%" style:font-name="Garamond" fo:font-size="10pt" fo:letter-spacing="normal" fo:font-style="normal" style:text-underline-style="none" fo:font-weight="normal" officeooo:rsid="2f8eeec3" style:font-size-asian="10pt" style:font-style-asian="normal" style:font-weight-asian="normal" style:font-size-complex="10pt" style:font-style-complex="normal" style:font-weight-complex="normal"/>
    </style:style>
    <style:style style:name="T681" style:family="text">
      <style:text-properties fo:font-variant="normal" fo:text-transform="none" fo:color="#111111" loext:opacity="100%" style:font-name="Garamond" fo:font-size="10pt" fo:letter-spacing="normal" fo:font-style="normal" style:text-underline-style="none" fo:font-weight="normal" officeooo:rsid="3a64e19d" style:font-size-asian="10pt" style:font-style-asian="normal" style:font-weight-asian="normal" style:font-size-complex="10pt" style:font-style-complex="normal" style:font-weight-complex="normal"/>
    </style:style>
    <style:style style:name="T682" style:family="text">
      <style:text-properties fo:font-variant="normal" fo:text-transform="none" fo:color="#111111" loext:opacity="100%" style:font-name="Garamond" fo:font-size="10pt" fo:letter-spacing="normal" fo:font-style="normal" style:text-underline-style="none" fo:font-weight="normal" officeooo:rsid="3a65a6ae" style:font-size-asian="10pt" style:font-style-asian="normal" style:font-weight-asian="normal" style:font-size-complex="10pt" style:font-style-complex="normal" style:font-weight-complex="normal"/>
    </style:style>
    <style:style style:name="T683" style:family="text">
      <style:text-properties fo:font-variant="normal" fo:text-transform="none" fo:color="#111111" loext:opacity="100%" style:font-name="Garamond" fo:font-size="10pt" fo:letter-spacing="normal" fo:font-style="normal" style:text-underline-style="none" fo:font-weight="normal" officeooo:rsid="47003552" style:font-size-asian="10pt" style:font-style-asian="normal" style:font-weight-asian="normal" style:font-size-complex="10pt" style:font-style-complex="normal" style:font-weight-complex="normal"/>
    </style:style>
    <style:style style:name="T684" style:family="text">
      <style:text-properties fo:font-variant="normal" fo:text-transform="none" fo:color="#111111" loext:opacity="100%" style:font-name="Garamond" fo:font-size="10pt" fo:letter-spacing="normal" fo:font-style="normal" style:text-underline-style="none" fo:font-weight="normal" officeooo:rsid="47021ca8" style:font-size-asian="10pt" style:font-style-asian="normal" style:font-weight-asian="normal" style:font-size-complex="10pt" style:font-style-complex="normal" style:font-weight-complex="normal"/>
    </style:style>
    <style:style style:name="T685" style:family="text">
      <style:text-properties fo:font-variant="normal" fo:text-transform="none" fo:color="#111111" loext:opacity="100%" style:font-name="Garamond" fo:font-size="10pt" fo:letter-spacing="normal" fo:font-style="normal" style:text-underline-style="none" fo:font-weight="normal" officeooo:rsid="4704129d" style:font-size-asian="10pt" style:font-style-asian="normal" style:font-weight-asian="normal" style:font-size-complex="10pt" style:font-style-complex="normal" style:font-weight-complex="normal"/>
    </style:style>
    <style:style style:name="T686" style:family="text">
      <style:text-properties fo:font-variant="normal" fo:text-transform="none" fo:color="#111111" loext:opacity="100%" style:font-name="Garamond" fo:font-size="10pt" fo:letter-spacing="normal" fo:font-style="normal" style:text-underline-style="none" fo:font-weight="normal" officeooo:rsid="2f8fc09f" style:font-size-asian="10pt" style:font-style-asian="normal" style:font-weight-asian="normal" style:font-size-complex="10pt" style:font-style-complex="normal" style:font-weight-complex="normal"/>
    </style:style>
    <style:style style:name="T687" style:family="text">
      <style:text-properties fo:font-variant="normal" fo:text-transform="none" fo:color="#111111" loext:opacity="100%" style:font-name="Garamond" fo:font-size="10pt" fo:letter-spacing="normal" fo:font-style="normal" style:text-underline-style="none" fo:font-weight="normal" officeooo:rsid="2fa2011b" style:font-size-asian="10pt" style:font-style-asian="normal" style:font-weight-asian="normal" style:font-size-complex="10pt" style:font-style-complex="normal" style:font-weight-complex="normal"/>
    </style:style>
    <style:style style:name="T688" style:family="text">
      <style:text-properties fo:font-variant="normal" fo:text-transform="none" fo:color="#111111" loext:opacity="100%" style:font-name="Garamond" fo:font-size="10pt" fo:letter-spacing="normal" fo:font-style="normal" style:text-underline-style="none" fo:font-weight="normal" officeooo:rsid="2fa22366" style:font-size-asian="10pt" style:font-style-asian="normal" style:font-weight-asian="normal" style:font-size-complex="10pt" style:font-style-complex="normal" style:font-weight-complex="normal"/>
    </style:style>
    <style:style style:name="T689" style:family="text">
      <style:text-properties fo:font-variant="normal" fo:text-transform="none" fo:color="#111111" loext:opacity="100%" style:font-name="Garamond" fo:font-size="10pt" fo:letter-spacing="normal" fo:font-style="normal" style:text-underline-style="none" fo:font-weight="normal" officeooo:rsid="2f915c7d" style:font-size-asian="10pt" style:font-style-asian="normal" style:font-weight-asian="normal" style:font-size-complex="10pt" style:font-style-complex="normal" style:font-weight-complex="normal"/>
    </style:style>
    <style:style style:name="T690" style:family="text">
      <style:text-properties fo:font-variant="normal" fo:text-transform="none" fo:color="#111111" loext:opacity="100%" style:font-name="Garamond" fo:font-size="10pt" fo:letter-spacing="normal" fo:font-style="normal" style:text-underline-style="none" fo:font-weight="normal" officeooo:rsid="42ebd8df" style:font-size-asian="10pt" style:font-style-asian="normal" style:font-weight-asian="normal" style:font-size-complex="10pt" style:font-style-complex="normal" style:font-weight-complex="normal"/>
    </style:style>
    <style:style style:name="T691" style:family="text">
      <style:text-properties fo:font-variant="normal" fo:text-transform="none" fo:color="#111111" loext:opacity="100%" style:font-name="Garamond" fo:font-size="10pt" fo:letter-spacing="normal" fo:font-style="normal" style:text-underline-style="none" fo:font-weight="normal" officeooo:rsid="2fa3dc55" style:font-size-asian="10pt" style:font-style-asian="normal" style:font-weight-asian="normal" style:font-size-complex="10pt" style:font-style-complex="normal" style:font-weight-complex="normal"/>
    </style:style>
    <style:style style:name="T692" style:family="text">
      <style:text-properties fo:font-variant="normal" fo:text-transform="none" fo:color="#111111" loext:opacity="100%" style:font-name="Garamond" fo:font-size="10pt" fo:letter-spacing="normal" fo:font-style="normal" style:text-underline-style="none" fo:font-weight="normal" officeooo:rsid="2f9404d2" style:font-size-asian="10pt" style:font-style-asian="normal" style:font-weight-asian="normal" style:font-size-complex="10pt" style:font-style-complex="normal" style:font-weight-complex="normal"/>
    </style:style>
    <style:style style:name="T693" style:family="text">
      <style:text-properties fo:font-variant="normal" fo:text-transform="none" fo:color="#111111" loext:opacity="100%" style:font-name="Garamond" fo:font-size="10pt" fo:letter-spacing="normal" fo:font-style="normal" style:text-underline-style="none" fo:font-weight="normal" officeooo:rsid="2fa48d92" style:font-size-asian="10pt" style:font-style-asian="normal" style:font-weight-asian="normal" style:font-size-complex="10pt" style:font-style-complex="normal" style:font-weight-complex="normal"/>
    </style:style>
    <style:style style:name="T694" style:family="text">
      <style:text-properties fo:font-variant="normal" fo:text-transform="none" fo:color="#111111" loext:opacity="100%" style:font-name="Garamond" fo:font-size="10pt" fo:letter-spacing="normal" fo:font-style="normal" style:text-underline-style="none" fo:font-weight="normal" officeooo:rsid="2f926c8b" style:font-size-asian="10pt" style:font-style-asian="normal" style:font-weight-asian="normal" style:font-size-complex="10pt" style:font-style-complex="normal" style:font-weight-complex="normal"/>
    </style:style>
    <style:style style:name="T695" style:family="text">
      <style:text-properties fo:font-variant="normal" fo:text-transform="none" fo:color="#111111" loext:opacity="100%" style:font-name="Garamond" fo:font-size="10pt" fo:letter-spacing="normal" fo:font-style="normal" style:text-underline-style="none" fo:font-weight="normal" officeooo:rsid="3a66d9f4" style:font-size-asian="10pt" style:font-style-asian="normal" style:font-weight-asian="normal" style:font-size-complex="10pt" style:font-style-complex="normal" style:font-weight-complex="normal"/>
    </style:style>
    <style:style style:name="T696" style:family="text">
      <style:text-properties fo:font-variant="normal" fo:text-transform="none" fo:color="#111111" loext:opacity="100%" style:font-name="Garamond" fo:font-size="10pt" fo:letter-spacing="normal" fo:font-style="normal" style:text-underline-style="none" fo:font-weight="normal" officeooo:rsid="4d075e43" style:font-size-asian="10pt" style:font-style-asian="normal" style:font-weight-asian="normal" style:font-size-complex="10pt" style:font-style-complex="normal" style:font-weight-complex="normal"/>
    </style:style>
    <style:style style:name="T697" style:family="text">
      <style:text-properties fo:font-variant="normal" fo:text-transform="none" fo:color="#111111" loext:opacity="100%" style:font-name="Garamond" fo:font-size="10pt" fo:letter-spacing="normal" fo:font-style="normal" style:text-underline-style="none" fo:font-weight="normal" officeooo:rsid="2fa61366" style:font-size-asian="10pt" style:font-style-asian="normal" style:font-weight-asian="normal" style:font-size-complex="10pt" style:font-style-complex="normal" style:font-weight-complex="normal"/>
    </style:style>
    <style:style style:name="T698" style:family="text">
      <style:text-properties fo:font-variant="normal" fo:text-transform="none" fo:color="#111111" loext:opacity="100%" style:font-name="Garamond" fo:font-size="10pt" fo:letter-spacing="normal" fo:font-style="normal" style:text-underline-style="none" fo:font-weight="normal" officeooo:rsid="2fa7e8fc" style:font-size-asian="10pt" style:font-style-asian="normal" style:font-weight-asian="normal" style:font-size-complex="10pt" style:font-style-complex="normal" style:font-weight-complex="normal"/>
    </style:style>
    <style:style style:name="T699" style:family="text">
      <style:text-properties fo:font-variant="normal" fo:text-transform="none" fo:color="#111111" loext:opacity="100%" style:font-name="Garamond" fo:font-size="10pt" fo:letter-spacing="normal" fo:font-style="normal" style:text-underline-style="none" fo:font-weight="normal" officeooo:rsid="443424b3" style:font-size-asian="10pt" style:font-style-asian="normal" style:font-weight-asian="normal" style:font-size-complex="10pt" style:font-style-complex="normal" style:font-weight-complex="normal"/>
    </style:style>
    <style:style style:name="T700" style:family="text">
      <style:text-properties fo:font-variant="normal" fo:text-transform="none" fo:color="#111111" loext:opacity="100%" style:font-name="Garamond" fo:font-size="10pt" fo:letter-spacing="normal" fo:font-style="normal" style:text-underline-style="none" fo:font-weight="normal" officeooo:rsid="4707ae5f" style:font-size-asian="10pt" style:font-style-asian="normal" style:font-weight-asian="normal" style:font-size-complex="10pt" style:font-style-complex="normal" style:font-weight-complex="normal"/>
    </style:style>
    <style:style style:name="T701" style:family="text">
      <style:text-properties fo:font-variant="normal" fo:text-transform="none" fo:color="#111111" loext:opacity="100%" style:font-name="Garamond" fo:font-size="10pt" fo:letter-spacing="normal" fo:font-style="normal" style:text-underline-style="none" fo:font-weight="normal" officeooo:rsid="2fa915af" style:font-size-asian="10pt" style:font-style-asian="normal" style:font-weight-asian="normal" style:font-size-complex="10pt" style:font-style-complex="normal" style:font-weight-complex="normal"/>
    </style:style>
    <style:style style:name="T702" style:family="text">
      <style:text-properties fo:font-variant="normal" fo:text-transform="none" fo:color="#111111" loext:opacity="100%" style:font-name="Garamond" fo:font-size="10pt" fo:letter-spacing="normal" fo:font-style="normal" style:text-underline-style="none" fo:font-weight="normal" officeooo:rsid="3a68c1d8" style:font-size-asian="10pt" style:font-style-asian="normal" style:font-weight-asian="normal" style:font-size-complex="10pt" style:font-style-complex="normal" style:font-weight-complex="normal"/>
    </style:style>
    <style:style style:name="T703" style:family="text">
      <style:text-properties fo:font-variant="normal" fo:text-transform="none" fo:color="#111111" loext:opacity="100%" style:font-name="Garamond" fo:font-size="10pt" fo:letter-spacing="normal" fo:font-style="normal" style:text-underline-style="none" fo:font-weight="normal" officeooo:rsid="3a6b949f" style:font-size-asian="10pt" style:font-style-asian="normal" style:font-weight-asian="normal" style:font-size-complex="10pt" style:font-style-complex="normal" style:font-weight-complex="normal"/>
    </style:style>
    <style:style style:name="T704" style:family="text">
      <style:text-properties fo:font-variant="normal" fo:text-transform="none" fo:color="#111111" loext:opacity="100%" style:font-name="Garamond" fo:font-size="10pt" fo:letter-spacing="normal" fo:font-style="normal" style:text-underline-style="none" fo:font-weight="normal" officeooo:rsid="4d090880" style:font-size-asian="10pt" style:font-style-asian="normal" style:font-weight-asian="normal" style:font-size-complex="10pt" style:font-style-complex="normal" style:font-weight-complex="normal"/>
    </style:style>
    <style:style style:name="T705" style:family="text">
      <style:text-properties fo:font-variant="normal" fo:text-transform="none" fo:color="#111111" loext:opacity="100%" style:font-name="Garamond" fo:font-size="10pt" fo:letter-spacing="normal" fo:font-style="normal" style:text-underline-style="none" fo:font-weight="normal" officeooo:rsid="44351188" style:font-size-asian="10pt" style:font-style-asian="normal" style:font-weight-asian="normal" style:font-size-complex="10pt" style:font-style-complex="normal" style:font-weight-complex="normal"/>
    </style:style>
    <style:style style:name="T706" style:family="text">
      <style:text-properties fo:font-variant="normal" fo:text-transform="none" fo:color="#111111" loext:opacity="100%" style:font-name="Garamond" fo:font-size="10pt" fo:letter-spacing="normal" fo:font-style="normal" style:text-underline-style="none" fo:font-weight="normal" officeooo:rsid="2f94172d" style:font-size-asian="10pt" style:font-style-asian="normal" style:font-weight-asian="normal" style:font-size-complex="10pt" style:font-style-complex="normal" style:font-weight-complex="normal"/>
    </style:style>
    <style:style style:name="T707" style:family="text">
      <style:text-properties fo:font-variant="normal" fo:text-transform="none" fo:color="#111111" loext:opacity="100%" style:font-name="Garamond" fo:font-size="10pt" fo:letter-spacing="normal" fo:font-style="normal" style:text-underline-style="none" fo:font-weight="normal" officeooo:rsid="2f94e6f5" style:font-size-asian="10pt" style:font-style-asian="normal" style:font-weight-asian="normal" style:font-size-complex="10pt" style:font-style-complex="normal" style:font-weight-complex="normal"/>
    </style:style>
    <style:style style:name="T708" style:family="text">
      <style:text-properties fo:font-variant="normal" fo:text-transform="none" fo:color="#111111" loext:opacity="100%" style:font-name="Garamond" fo:font-size="10pt" fo:letter-spacing="normal" fo:font-style="normal" style:text-underline-style="none" fo:font-weight="normal" officeooo:rsid="2f97c77f" style:font-size-asian="10pt" style:font-style-asian="normal" style:font-weight-asian="normal" style:font-size-complex="10pt" style:font-style-complex="normal" style:font-weight-complex="normal"/>
    </style:style>
    <style:style style:name="T709" style:family="text">
      <style:text-properties fo:font-variant="normal" fo:text-transform="none" fo:color="#111111" loext:opacity="100%" style:font-name="Garamond" fo:font-size="10pt" fo:letter-spacing="normal" fo:font-style="normal" style:text-underline-style="none" fo:font-weight="normal" officeooo:rsid="2f977d96" style:font-size-asian="10pt" style:font-style-asian="normal" style:font-weight-asian="normal" style:font-size-complex="10pt" style:font-style-complex="normal" style:font-weight-complex="normal"/>
    </style:style>
    <style:style style:name="T710" style:family="text">
      <style:text-properties fo:font-variant="normal" fo:text-transform="none" fo:color="#111111" loext:opacity="100%" style:font-name="Garamond" fo:font-size="10pt" fo:letter-spacing="normal" fo:font-style="normal" style:text-underline-style="none" fo:font-weight="normal" officeooo:rsid="3a6de29a" style:font-size-asian="10pt" style:font-style-asian="normal" style:font-weight-asian="normal" style:font-size-complex="10pt" style:font-style-complex="normal" style:font-weight-complex="normal"/>
    </style:style>
    <style:style style:name="T711" style:family="text">
      <style:text-properties fo:font-variant="normal" fo:text-transform="none" fo:color="#111111" loext:opacity="100%" style:font-name="Garamond" fo:font-size="10pt" fo:letter-spacing="normal" fo:font-style="normal" style:text-underline-style="none" fo:font-weight="normal" officeooo:rsid="470a2abb" style:font-size-asian="10pt" style:font-style-asian="normal" style:font-weight-asian="normal" style:font-size-complex="10pt" style:font-style-complex="normal" style:font-weight-complex="normal"/>
    </style:style>
    <style:style style:name="T712" style:family="text">
      <style:text-properties fo:font-variant="normal" fo:text-transform="none" fo:color="#111111" loext:opacity="100%" style:font-name="Garamond" fo:font-size="10pt" fo:letter-spacing="normal" fo:font-style="normal" style:text-underline-style="none" fo:font-weight="normal" officeooo:rsid="4d09c8e3" style:font-size-asian="10pt" style:font-style-asian="normal" style:font-weight-asian="normal" style:font-size-complex="10pt" style:font-style-complex="normal" style:font-weight-complex="normal"/>
    </style:style>
    <style:style style:name="T713" style:family="text">
      <style:text-properties fo:font-variant="normal" fo:text-transform="none" fo:color="#111111" loext:opacity="100%" style:font-name="Garamond" fo:font-size="10pt" fo:letter-spacing="normal" fo:font-style="normal" style:text-underline-style="none" fo:font-weight="normal" officeooo:rsid="3a6f4b72" style:font-size-asian="10pt" style:font-style-asian="normal" style:font-weight-asian="normal" style:font-size-complex="10pt" style:font-style-complex="normal" style:font-weight-complex="normal"/>
    </style:style>
    <style:style style:name="T714" style:family="text">
      <style:text-properties fo:font-variant="normal" fo:text-transform="none" fo:color="#111111" loext:opacity="100%" style:font-name="Garamond" fo:font-size="10pt" fo:letter-spacing="normal" fo:font-style="normal" style:text-underline-style="none" fo:font-weight="normal" officeooo:rsid="42edc802" style:font-size-asian="10pt" style:font-style-asian="normal" style:font-weight-asian="normal" style:font-size-complex="10pt" style:font-style-complex="normal" style:font-weight-complex="normal"/>
    </style:style>
    <style:style style:name="T715" style:family="text">
      <style:text-properties fo:font-variant="normal" fo:text-transform="none" fo:color="#111111" loext:opacity="100%" style:font-name="Garamond" fo:font-size="10pt" fo:letter-spacing="normal" fo:font-style="normal" style:text-underline-style="none" fo:font-weight="normal" officeooo:rsid="42ae2c2f" style:font-size-asian="10pt" style:font-style-asian="normal" style:font-weight-asian="normal" style:font-size-complex="10pt" style:font-style-complex="normal" style:font-weight-complex="normal"/>
    </style:style>
    <style:style style:name="T716" style:family="text">
      <style:text-properties fo:font-variant="normal" fo:text-transform="none" fo:color="#111111" loext:opacity="100%" style:font-name="Garamond" fo:font-size="10pt" fo:letter-spacing="normal" fo:font-style="normal" style:text-underline-style="none" fo:font-weight="normal" officeooo:rsid="429e31a5" style:font-size-asian="10pt" style:font-style-asian="normal" style:font-weight-asian="normal" style:font-size-complex="10pt" style:font-style-complex="normal" style:font-weight-complex="normal"/>
    </style:style>
    <style:style style:name="T717" style:family="text">
      <style:text-properties fo:font-variant="normal" fo:text-transform="none" fo:color="#111111" loext:opacity="100%" style:font-name="Garamond" fo:font-size="10pt" fo:letter-spacing="normal" fo:font-style="normal" style:text-underline-style="none" fo:font-weight="normal" officeooo:rsid="42942767" style:font-size-asian="10pt" style:font-style-asian="normal" style:font-weight-asian="normal" style:font-size-complex="10pt" style:font-style-complex="normal" style:font-weight-complex="normal"/>
    </style:style>
    <style:style style:name="T718" style:family="text">
      <style:text-properties fo:font-variant="normal" fo:text-transform="none" fo:color="#111111" loext:opacity="100%" style:font-name="Garamond" fo:font-size="10pt" fo:letter-spacing="normal" fo:font-style="normal" style:text-underline-style="none" fo:font-weight="normal" officeooo:rsid="429abc1b" style:font-size-asian="10pt" style:font-style-asian="normal" style:font-weight-asian="normal" style:font-size-complex="10pt" style:font-style-complex="normal" style:font-weight-complex="normal"/>
    </style:style>
    <style:style style:name="T719" style:family="text">
      <style:text-properties fo:font-variant="normal" fo:text-transform="none" fo:color="#111111" loext:opacity="100%" style:font-name="Garamond" fo:font-size="10pt" fo:letter-spacing="normal" fo:font-style="normal" style:text-underline-style="none" fo:font-weight="normal" officeooo:rsid="428f0981" style:font-size-asian="10pt" style:font-style-asian="normal" style:font-weight-asian="normal" style:font-size-complex="10pt" style:font-style-complex="normal" style:font-weight-complex="normal"/>
    </style:style>
    <style:style style:name="T720" style:family="text">
      <style:text-properties fo:font-variant="normal" fo:text-transform="none" fo:color="#111111" loext:opacity="100%" style:font-name="Garamond" fo:font-size="10pt" fo:letter-spacing="normal" fo:font-style="normal" style:text-underline-style="none" fo:font-weight="normal" officeooo:rsid="42ee8b62" style:font-size-asian="10pt" style:font-style-asian="normal" style:font-weight-asian="normal" style:font-size-complex="10pt" style:font-style-complex="normal" style:font-weight-complex="normal"/>
    </style:style>
    <style:style style:name="T721" style:family="text">
      <style:text-properties fo:font-variant="normal" fo:text-transform="none" fo:color="#111111" loext:opacity="100%" style:font-name="Garamond" fo:font-size="10pt" fo:letter-spacing="normal" fo:font-style="normal" style:text-underline-style="none" fo:font-weight="normal" officeooo:rsid="470f5b1f" style:font-size-asian="10pt" style:font-style-asian="normal" style:font-weight-asian="normal" style:font-size-complex="10pt" style:font-style-complex="normal" style:font-weight-complex="normal"/>
    </style:style>
    <style:style style:name="T722" style:family="text">
      <style:text-properties fo:font-variant="normal" fo:text-transform="none" fo:color="#111111" loext:opacity="100%" style:font-name="Garamond" fo:font-size="10pt" fo:letter-spacing="normal" fo:font-style="normal" style:text-underline-style="none" fo:font-weight="normal" officeooo:rsid="470f860b" style:font-size-asian="10pt" style:font-style-asian="normal" style:font-weight-asian="normal" style:font-size-complex="10pt" style:font-style-complex="normal" style:font-weight-complex="normal"/>
    </style:style>
    <style:style style:name="T723" style:family="text">
      <style:text-properties fo:font-variant="normal" fo:text-transform="none" fo:color="#111111" loext:opacity="100%" style:font-name="Garamond" fo:font-size="10pt" fo:letter-spacing="normal" fo:font-style="normal" style:text-underline-style="none" fo:font-weight="normal" officeooo:rsid="42b34e45" style:font-size-asian="10pt" style:font-style-asian="normal" style:font-weight-asian="normal" style:font-size-complex="10pt" style:font-style-complex="normal" style:font-weight-complex="normal"/>
    </style:style>
    <style:style style:name="T724" style:family="text">
      <style:text-properties fo:font-variant="normal" fo:text-transform="none" fo:color="#111111" loext:opacity="100%" style:font-name="Garamond" fo:font-size="10pt" fo:letter-spacing="normal" fo:font-style="normal" style:text-underline-style="none" fo:font-weight="normal" officeooo:rsid="42b6af06" style:font-size-asian="10pt" style:font-style-asian="normal" style:font-weight-asian="normal" style:font-size-complex="10pt" style:font-style-complex="normal" style:font-weight-complex="normal"/>
    </style:style>
    <style:style style:name="T725" style:family="text">
      <style:text-properties fo:font-variant="normal" fo:text-transform="none" fo:color="#111111" loext:opacity="100%" style:font-name="Garamond" fo:font-size="10pt" fo:letter-spacing="normal" fo:font-style="normal" style:text-underline-style="none" fo:font-weight="normal" officeooo:rsid="4710a065" style:font-size-asian="10pt" style:font-style-asian="normal" style:font-weight-asian="normal" style:font-size-complex="10pt" style:font-style-complex="normal" style:font-weight-complex="normal"/>
    </style:style>
    <style:style style:name="T726" style:family="text">
      <style:text-properties fo:font-variant="normal" fo:text-transform="none" fo:color="#111111" loext:opacity="100%" style:font-name="Garamond" fo:font-size="10pt" fo:letter-spacing="normal" fo:font-style="normal" style:text-underline-style="none" fo:font-weight="normal" officeooo:rsid="4d12fd7a" style:font-size-asian="10pt" style:font-style-asian="normal" style:font-weight-asian="normal" style:font-size-complex="10pt" style:font-style-complex="normal" style:font-weight-complex="normal"/>
    </style:style>
    <style:style style:name="T727" style:family="text">
      <style:text-properties fo:font-variant="normal" fo:text-transform="none" fo:color="#111111" loext:opacity="100%" style:font-name="Garamond" fo:font-size="10pt" fo:letter-spacing="normal" fo:font-style="normal" style:text-underline-style="none" fo:font-weight="normal" officeooo:rsid="42a02661" style:font-size-asian="10pt" style:font-style-asian="normal" style:font-weight-asian="normal" style:font-size-complex="10pt" style:font-style-complex="normal" style:font-weight-complex="normal"/>
    </style:style>
    <style:style style:name="T728" style:family="text">
      <style:text-properties fo:font-variant="normal" fo:text-transform="none" fo:color="#111111" loext:opacity="100%" style:font-name="Garamond" fo:font-size="10pt" fo:letter-spacing="normal" fo:font-style="normal" style:text-underline-style="none" fo:font-weight="normal" officeooo:rsid="429ae009" style:font-size-asian="10pt" style:font-style-asian="normal" style:font-weight-asian="normal" style:font-size-complex="10pt" style:font-style-complex="normal" style:font-weight-complex="normal"/>
    </style:style>
    <style:style style:name="T729" style:family="text">
      <style:text-properties fo:font-variant="normal" fo:text-transform="none" fo:color="#111111" loext:opacity="100%" style:font-name="Garamond" fo:font-size="10pt" fo:letter-spacing="normal" fo:font-style="normal" style:text-underline-style="none" fo:font-weight="normal" officeooo:rsid="47117e69" style:font-size-asian="10pt" style:font-style-asian="normal" style:font-weight-asian="normal" style:font-size-complex="10pt" style:font-style-complex="normal" style:font-weight-complex="normal"/>
    </style:style>
    <style:style style:name="T730" style:family="text">
      <style:text-properties fo:font-variant="normal" fo:text-transform="none" fo:color="#111111" loext:opacity="100%" style:font-name="Garamond" fo:font-size="10pt" fo:letter-spacing="normal" fo:font-style="normal" style:text-underline-style="none" fo:font-weight="normal" officeooo:rsid="443b33e3" style:font-size-asian="10pt" style:font-style-asian="normal" style:font-weight-asian="normal" style:font-size-complex="10pt" style:font-style-complex="normal" style:font-weight-complex="normal"/>
    </style:style>
    <style:style style:name="T731" style:family="text">
      <style:text-properties fo:font-variant="normal" fo:text-transform="none" fo:color="#111111" loext:opacity="100%" style:font-name="Garamond" fo:font-size="10pt" fo:letter-spacing="normal" fo:font-style="normal" style:text-underline-style="none" fo:font-weight="normal" officeooo:rsid="4295bb2a" style:font-size-asian="10pt" style:font-style-asian="normal" style:font-weight-asian="normal" style:font-size-complex="10pt" style:font-style-complex="normal" style:font-weight-complex="normal"/>
    </style:style>
    <style:style style:name="T732" style:family="text">
      <style:text-properties fo:font-variant="normal" fo:text-transform="none" fo:color="#111111" loext:opacity="100%" style:font-name="Garamond" fo:font-size="10pt" fo:letter-spacing="normal" fo:font-style="normal" style:text-underline-style="none" fo:font-weight="normal" officeooo:rsid="42981e9a" style:font-size-asian="10pt" style:font-style-asian="normal" style:font-weight-asian="normal" style:font-size-complex="10pt" style:font-style-complex="normal" style:font-weight-complex="normal"/>
    </style:style>
    <style:style style:name="T733" style:family="text">
      <style:text-properties fo:font-variant="normal" fo:text-transform="none" fo:color="#111111" loext:opacity="100%" style:font-name="Garamond" fo:font-size="10pt" fo:letter-spacing="normal" fo:font-style="normal" style:text-underline-style="none" fo:font-weight="normal" officeooo:rsid="4296eb1f" style:font-size-asian="10pt" style:font-style-asian="normal" style:font-weight-asian="normal" style:font-size-complex="10pt" style:font-style-complex="normal" style:font-weight-complex="normal"/>
    </style:style>
    <style:style style:name="T734" style:family="text">
      <style:text-properties fo:font-variant="normal" fo:text-transform="none" fo:color="#111111" loext:opacity="100%" style:font-name="Garamond" fo:font-size="10pt" fo:letter-spacing="normal" fo:font-style="normal" style:text-underline-style="none" fo:font-weight="normal" officeooo:rsid="443c2c51" style:font-size-asian="10pt" style:font-style-asian="normal" style:font-weight-asian="normal" style:font-size-complex="10pt" style:font-style-complex="normal" style:font-weight-complex="normal"/>
    </style:style>
    <style:style style:name="T735" style:family="text">
      <style:text-properties fo:font-variant="normal" fo:text-transform="none" fo:color="#111111" loext:opacity="100%" style:font-name="Garamond" fo:font-size="10pt" fo:letter-spacing="normal" fo:font-style="normal" style:text-underline-style="none" fo:font-weight="normal" officeooo:rsid="4711d255" style:font-size-asian="10pt" style:font-style-asian="normal" style:font-weight-asian="normal" style:font-size-complex="10pt" style:font-style-complex="normal" style:font-weight-complex="normal"/>
    </style:style>
    <style:style style:name="T736" style:family="text">
      <style:text-properties fo:font-variant="normal" fo:text-transform="none" fo:color="#111111" loext:opacity="100%" style:font-name="Garamond" fo:font-size="10pt" fo:letter-spacing="normal" fo:font-style="normal" style:text-underline-style="none" fo:font-weight="normal" officeooo:rsid="42924dfb" style:font-size-asian="10pt" style:font-style-asian="normal" style:font-weight-asian="normal" style:font-size-complex="10pt" style:font-style-complex="normal" style:font-weight-complex="normal"/>
    </style:style>
    <style:style style:name="T737" style:family="text">
      <style:text-properties fo:font-variant="normal" fo:text-transform="none" fo:color="#111111" loext:opacity="100%" style:font-name="Garamond" fo:font-size="10pt" fo:letter-spacing="normal" fo:font-style="normal" style:text-underline-style="none" fo:font-weight="normal" officeooo:rsid="42ee9697" style:font-size-asian="10pt" style:font-style-asian="normal" style:font-weight-asian="normal" style:font-size-complex="10pt" style:font-style-complex="normal" style:font-weight-complex="normal"/>
    </style:style>
    <style:style style:name="T738" style:family="text">
      <style:text-properties fo:font-variant="normal" fo:text-transform="none" fo:color="#111111" loext:opacity="100%" style:font-name="Garamond" fo:font-size="10pt" fo:letter-spacing="normal" fo:font-style="normal" style:text-underline-style="none" fo:font-weight="normal" officeooo:rsid="4714e822" style:font-size-asian="10pt" style:font-style-asian="normal" style:font-weight-asian="normal" style:font-size-complex="10pt" style:font-style-complex="normal" style:font-weight-complex="normal"/>
    </style:style>
    <style:style style:name="T739" style:family="text">
      <style:text-properties fo:font-variant="normal" fo:text-transform="none" fo:color="#111111" loext:opacity="100%" style:font-name="Garamond" fo:font-size="10pt" fo:letter-spacing="normal" fo:font-style="normal" style:text-underline-style="none" fo:font-weight="normal" officeooo:rsid="42ef1ad9" style:font-size-asian="10pt" style:font-style-asian="normal" style:font-weight-asian="normal" style:font-size-complex="10pt" style:font-style-complex="normal" style:font-weight-complex="normal"/>
    </style:style>
    <style:style style:name="T740" style:family="text">
      <style:text-properties fo:font-variant="normal" fo:text-transform="none" fo:color="#111111" loext:opacity="100%" style:font-name="Garamond" fo:font-size="10pt" fo:letter-spacing="normal" fo:font-style="normal" style:text-underline-style="none" fo:font-weight="normal" officeooo:rsid="47171c64" style:font-size-asian="10pt" style:font-style-asian="normal" style:font-weight-asian="normal" style:font-size-complex="10pt" style:font-style-complex="normal" style:font-weight-complex="normal"/>
    </style:style>
    <style:style style:name="T741" style:family="text">
      <style:text-properties fo:font-variant="normal" fo:text-transform="none" fo:color="#111111" loext:opacity="100%" style:font-name="Garamond" fo:font-size="10pt" fo:letter-spacing="normal" fo:font-style="normal" style:text-underline-style="none" fo:font-weight="normal" officeooo:rsid="47188644" style:font-size-asian="10pt" style:font-style-asian="normal" style:font-weight-asian="normal" style:font-size-complex="10pt" style:font-style-complex="normal" style:font-weight-complex="normal"/>
    </style:style>
    <style:style style:name="T742" style:family="text">
      <style:text-properties fo:font-variant="normal" fo:text-transform="none" fo:color="#111111" loext:opacity="100%" style:font-name="Garamond" fo:font-size="10pt" fo:letter-spacing="normal" fo:font-style="normal" style:text-underline-style="none" fo:font-weight="normal" officeooo:rsid="42f0012f" style:font-size-asian="10pt" style:font-style-asian="normal" style:font-weight-asian="normal" style:font-size-complex="10pt" style:font-style-complex="normal" style:font-weight-complex="normal"/>
    </style:style>
    <style:style style:name="T743" style:family="text">
      <style:text-properties fo:font-variant="normal" fo:text-transform="none" fo:color="#111111" loext:opacity="100%" style:font-name="Garamond" fo:font-size="10pt" fo:letter-spacing="normal" fo:font-style="normal" style:text-underline-style="none" fo:font-weight="normal" officeooo:rsid="42f1f30c" style:font-size-asian="10pt" style:font-style-asian="normal" style:font-weight-asian="normal" style:font-size-complex="10pt" style:font-style-complex="normal" style:font-weight-complex="normal"/>
    </style:style>
    <style:style style:name="T744" style:family="text">
      <style:text-properties fo:font-variant="normal" fo:text-transform="none" fo:color="#111111" loext:opacity="100%" style:font-name="Garamond" fo:font-size="10pt" fo:letter-spacing="normal" fo:font-style="normal" style:text-underline-style="none" fo:font-weight="normal" officeooo:rsid="42a503f5" style:font-size-asian="10pt" style:font-style-asian="normal" style:font-weight-asian="normal" style:font-size-complex="10pt" style:font-style-complex="normal" style:font-weight-complex="normal"/>
    </style:style>
    <style:style style:name="T745" style:family="text">
      <style:text-properties fo:font-variant="normal" fo:text-transform="none" fo:color="#111111" loext:opacity="100%" style:font-name="Garamond" fo:font-size="10pt" fo:letter-spacing="normal" fo:font-style="normal" style:text-underline-style="none" fo:font-weight="normal" officeooo:rsid="42a6eb4c" style:font-size-asian="10pt" style:font-style-asian="normal" style:font-weight-asian="normal" style:font-size-complex="10pt" style:font-style-complex="normal" style:font-weight-complex="normal"/>
    </style:style>
    <style:style style:name="T746" style:family="text">
      <style:text-properties fo:font-variant="normal" fo:text-transform="none" fo:color="#111111" loext:opacity="100%" style:font-name="Garamond" fo:font-size="10pt" fo:letter-spacing="normal" fo:font-style="normal" style:text-underline-style="none" fo:font-weight="normal" officeooo:rsid="42a6dd27" style:font-size-asian="10pt" style:font-style-asian="normal" style:font-weight-asian="normal" style:font-size-complex="10pt" style:font-style-complex="normal" style:font-weight-complex="normal"/>
    </style:style>
    <style:style style:name="T747" style:family="text">
      <style:text-properties fo:font-variant="normal" fo:text-transform="none" fo:color="#111111" loext:opacity="100%" style:font-name="Garamond" fo:font-size="10pt" fo:letter-spacing="normal" fo:font-style="normal" style:text-underline-style="none" fo:font-weight="normal" officeooo:rsid="443d8f57" style:font-size-asian="10pt" style:font-style-asian="normal" style:font-weight-asian="normal" style:font-size-complex="10pt" style:font-style-complex="normal" style:font-weight-complex="normal"/>
    </style:style>
    <style:style style:name="T748" style:family="text">
      <style:text-properties fo:font-variant="normal" fo:text-transform="none" fo:color="#111111" loext:opacity="100%" style:font-name="Garamond" fo:font-size="10pt" fo:letter-spacing="normal" fo:font-style="normal" style:text-underline-style="none" fo:font-weight="normal" officeooo:rsid="471abe3c" style:font-size-asian="10pt" style:font-style-asian="normal" style:font-weight-asian="normal" style:font-size-complex="10pt" style:font-style-complex="normal" style:font-weight-complex="normal"/>
    </style:style>
    <style:style style:name="T749" style:family="text">
      <style:text-properties fo:font-variant="normal" fo:text-transform="none" fo:color="#111111" loext:opacity="100%" style:font-name="Garamond" fo:font-size="10pt" fo:letter-spacing="normal" fo:font-style="normal" style:text-underline-style="none" fo:font-weight="normal" officeooo:rsid="4d13d02b" style:font-size-asian="10pt" style:font-style-asian="normal" style:font-weight-asian="normal" style:font-size-complex="10pt" style:font-style-complex="normal" style:font-weight-complex="normal"/>
    </style:style>
    <style:style style:name="T750" style:family="text">
      <style:text-properties fo:font-variant="normal" fo:text-transform="none" fo:color="#111111" loext:opacity="100%" style:font-name="Garamond" fo:font-size="10pt" fo:letter-spacing="normal" fo:font-style="normal" style:text-underline-style="none" fo:font-weight="normal" officeooo:rsid="42ac387a" style:font-size-asian="10pt" style:font-style-asian="normal" style:font-weight-asian="normal" style:font-size-complex="10pt" style:font-style-complex="normal" style:font-weight-complex="normal"/>
    </style:style>
    <style:style style:name="T751" style:family="text">
      <style:text-properties fo:font-variant="normal" fo:text-transform="none" fo:color="#111111" loext:opacity="100%" style:font-name="Garamond" fo:font-size="10pt" fo:letter-spacing="normal" fo:font-style="normal" style:text-underline-style="none" fo:font-weight="normal" officeooo:rsid="42aef744" style:font-size-asian="10pt" style:font-style-asian="normal" style:font-weight-asian="normal" style:font-size-complex="10pt" style:font-style-complex="normal" style:font-weight-complex="normal"/>
    </style:style>
    <style:style style:name="T752" style:family="text">
      <style:text-properties fo:font-variant="normal" fo:text-transform="none" fo:color="#111111" loext:opacity="100%" style:font-name="Garamond" fo:font-size="10pt" fo:letter-spacing="normal" fo:font-style="normal" style:text-underline-style="none" fo:font-weight="normal" officeooo:rsid="42f3aa1f" style:font-size-asian="10pt" style:font-style-asian="normal" style:font-weight-asian="normal" style:font-size-complex="10pt" style:font-style-complex="normal" style:font-weight-complex="normal"/>
    </style:style>
    <style:style style:name="T753" style:family="text">
      <style:text-properties fo:font-variant="normal" fo:text-transform="none" fo:color="#111111" loext:opacity="100%" style:font-name="Garamond" fo:font-size="10pt" fo:letter-spacing="normal" fo:font-style="normal" style:text-underline-style="none" fo:font-weight="normal" officeooo:rsid="471b23d2" style:font-size-asian="10pt" style:font-style-asian="normal" style:font-weight-asian="normal" style:font-size-complex="10pt" style:font-style-complex="normal" style:font-weight-complex="normal"/>
    </style:style>
    <style:style style:name="T754" style:family="text">
      <style:text-properties fo:font-variant="normal" fo:text-transform="none" fo:color="#111111" loext:opacity="100%" style:font-name="Garamond" fo:font-size="10pt" fo:letter-spacing="normal" fo:font-style="normal" style:text-underline-style="none" fo:font-weight="normal" officeooo:rsid="4d153fba" style:font-size-asian="10pt" style:font-style-asian="normal" style:font-weight-asian="normal" style:font-size-complex="10pt" style:font-style-complex="normal" style:font-weight-complex="normal"/>
    </style:style>
    <style:style style:name="T755" style:family="text">
      <style:text-properties fo:font-variant="normal" fo:text-transform="none" fo:color="#111111" loext:opacity="100%" style:font-name="Garamond" fo:font-size="10pt" fo:letter-spacing="normal"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56" style:family="text">
      <style:text-properties fo:font-variant="normal" fo:text-transform="none" fo:color="#111111" loext:opacity="100%" style:font-name="Garamond" fo:font-size="10pt" fo:letter-spacing="normal" fo:font-style="normal" style:text-underline-style="none" fo:font-weight="normal" officeooo:rsid="42b9ad96" fo:background-color="transparent" loext:char-shading-value="0" style:font-size-asian="10pt" style:font-style-asian="normal" style:font-weight-asian="normal" style:font-size-complex="10pt" style:font-style-complex="normal" style:font-weight-complex="normal"/>
    </style:style>
    <style:style style:name="T757" style:family="text">
      <style:text-properties fo:font-variant="normal" fo:text-transform="none" fo:color="#111111" loext:opacity="100%" style:font-name="Garamond" fo:font-size="10pt" fo:letter-spacing="normal" fo:font-style="normal" style:text-underline-style="none" fo:font-weight="normal" officeooo:rsid="46c62203" fo:background-color="transparent" loext:char-shading-value="0" style:font-size-asian="10pt" style:font-style-asian="normal" style:font-weight-asian="normal" style:font-size-complex="10pt" style:font-style-complex="normal" style:font-weight-complex="normal"/>
    </style:style>
    <style:style style:name="T758" style:family="text">
      <style:text-properties fo:font-variant="normal" fo:text-transform="none" fo:color="#111111" loext:opacity="100%" style:font-name="Garamond" fo:font-size="10pt" fo:letter-spacing="normal" fo:font-style="normal" style:text-underline-style="none" fo:font-weight="normal" officeooo:rsid="2f8eeec3" fo:background-color="transparent" loext:char-shading-value="0" style:font-size-asian="10pt" style:font-style-asian="normal" style:font-weight-asian="normal" style:font-size-complex="10pt" style:font-style-complex="normal" style:font-weight-complex="normal"/>
    </style:style>
    <style:style style:name="T759" style:family="text">
      <style:text-properties officeooo:rsid="442124d3"/>
    </style:style>
    <style:style style:name="T760" style:family="text">
      <style:text-properties officeooo:rsid="46da68ae"/>
    </style:style>
    <style:style style:name="T761" style:family="text">
      <style:text-properties officeooo:rsid="42e57b95"/>
    </style:style>
    <style:style style:name="T762" style:family="text">
      <style:text-properties officeooo:rsid="46fa3782"/>
    </style:style>
    <style:style style:name="T763" style:family="text">
      <style:text-properties officeooo:rsid="4431fb7a"/>
    </style:style>
    <style:style style:name="T764" style:family="text">
      <style:text-properties officeooo:rsid="46fbf243"/>
    </style:style>
    <style:style style:name="T765" style:family="text">
      <style:text-properties officeooo:rsid="46fdeb75"/>
    </style:style>
    <style:style style:name="T766" style:family="text">
      <style:text-properties officeooo:rsid="42e73bdb"/>
    </style:style>
    <style:style style:name="T767" style:family="text">
      <style:text-properties officeooo:rsid="42e8c660"/>
    </style:style>
    <style:style style:name="T768" style:family="text">
      <style:text-properties officeooo:rsid="42e8c00f"/>
    </style:style>
    <style:style style:name="T769" style:family="text">
      <style:text-properties officeooo:rsid="4d0645e4"/>
    </style:style>
    <style:style style:name="T770" style:family="text">
      <style:text-properties officeooo:rsid="3a7341e1"/>
    </style:style>
    <style:style style:name="T771" style:family="text">
      <style:text-properties officeooo:rsid="2f822a02"/>
    </style:style>
    <style:style style:name="T772" style:family="text">
      <style:text-properties officeooo:rsid="3a75a0eb"/>
    </style:style>
    <style:style style:name="T773" style:family="text">
      <style:text-properties officeooo:rsid="44351188"/>
    </style:style>
    <style:style style:name="T774" style:family="text">
      <style:text-properties officeooo:rsid="232265f8"/>
    </style:style>
    <style:style style:name="T775" style:family="text">
      <style:text-properties officeooo:rsid="42edc802"/>
    </style:style>
    <style:style style:name="T776" style:family="text">
      <style:text-properties officeooo:rsid="4d0a82f2"/>
    </style:style>
    <style:style style:name="T777" style:family="text">
      <style:text-properties officeooo:rsid="470bdb50"/>
    </style:style>
    <style:style style:name="T778" style:family="text">
      <style:text-properties officeooo:rsid="2f838eae"/>
    </style:style>
    <style:style style:name="T779" style:family="text">
      <style:text-properties officeooo:rsid="2fa9e82c"/>
    </style:style>
    <style:style style:name="T780" style:family="text">
      <style:text-properties officeooo:rsid="2faae013"/>
    </style:style>
    <style:style style:name="T781" style:family="text">
      <style:text-properties officeooo:rsid="23d1f440"/>
    </style:style>
    <style:style style:name="T782" style:family="text">
      <style:text-properties officeooo:rsid="23d26ea2"/>
    </style:style>
    <style:style style:name="T783" style:family="text">
      <style:text-properties officeooo:rsid="4d0b7a66"/>
    </style:style>
    <style:style style:name="T784" style:family="text">
      <style:text-properties officeooo:rsid="4d0c9b6c"/>
    </style:style>
    <style:style style:name="T785" style:family="text">
      <style:text-properties officeooo:rsid="4d0dadd0"/>
    </style:style>
    <style:style style:name="T786" style:family="text">
      <style:text-properties officeooo:rsid="2f98467d"/>
    </style:style>
    <style:style style:name="T787" style:family="text">
      <style:text-properties officeooo:rsid="4366c7c2"/>
    </style:style>
    <style:style style:name="T788" style:family="text">
      <style:text-properties officeooo:rsid="43674436"/>
    </style:style>
    <style:style style:name="T789" style:family="text">
      <style:text-properties officeooo:rsid="4368cf53"/>
    </style:style>
    <style:style style:name="T790" style:family="text">
      <style:text-properties officeooo:rsid="43691ba8"/>
    </style:style>
    <style:style style:name="T791" style:family="text">
      <style:text-properties officeooo:rsid="4369bdd9"/>
    </style:style>
    <style:style style:name="T792" style:family="text">
      <style:text-properties officeooo:rsid="436aa6d4"/>
    </style:style>
    <style:style style:name="T793" style:family="text">
      <style:text-properties officeooo:rsid="436b882f"/>
    </style:style>
    <style:style style:name="T794" style:family="text">
      <style:text-properties officeooo:rsid="44043d36"/>
    </style:style>
    <style:style style:name="T795" style:family="text">
      <style:text-properties officeooo:rsid="444a9d41"/>
    </style:style>
    <style:style style:name="T796" style:family="text">
      <style:text-properties officeooo:rsid="444b4ba4"/>
    </style:style>
    <style:style style:name="T797" style:family="text">
      <style:text-properties officeooo:rsid="436d345a"/>
    </style:style>
    <style:style style:name="T798" style:family="text">
      <style:text-properties officeooo:rsid="4d8b21ae"/>
    </style:style>
    <style:style style:name="T799" style:family="text">
      <style:text-properties officeooo:rsid="4352ecdf"/>
    </style:style>
    <style:style style:name="T800" style:family="text">
      <style:text-properties officeooo:rsid="435404e3"/>
    </style:style>
    <style:style style:name="T801" style:family="text">
      <style:text-properties officeooo:rsid="43f528a5"/>
    </style:style>
    <style:style style:name="T802" style:family="text">
      <style:text-properties officeooo:rsid="43f3e788"/>
    </style:style>
    <style:style style:name="T803" style:family="text">
      <style:text-properties officeooo:rsid="4441ec06"/>
    </style:style>
    <style:style style:name="T804" style:family="text">
      <style:text-properties officeooo:rsid="4354db3f"/>
    </style:style>
    <style:style style:name="T805" style:family="text">
      <style:text-properties officeooo:rsid="43559ea6"/>
    </style:style>
    <style:style style:name="T806" style:family="text">
      <style:text-properties officeooo:rsid="43f5c090"/>
    </style:style>
    <style:style style:name="T807" style:family="text">
      <style:text-properties officeooo:rsid="435831b9"/>
    </style:style>
    <style:style style:name="T808" style:family="text">
      <style:text-properties officeooo:rsid="43f614ad"/>
    </style:style>
    <style:style style:name="T809" style:family="text">
      <style:text-properties officeooo:rsid="43f61b0b"/>
    </style:style>
    <style:style style:name="T810" style:family="text">
      <style:text-properties officeooo:rsid="4355f271"/>
    </style:style>
    <style:style style:name="T811" style:family="text">
      <style:text-properties officeooo:rsid="435767c0"/>
    </style:style>
    <style:style style:name="T812" style:family="text">
      <style:text-properties officeooo:rsid="43577ee8"/>
    </style:style>
    <style:style style:name="T813" style:family="text">
      <style:text-properties officeooo:rsid="4443d637"/>
    </style:style>
    <style:style style:name="T814" style:family="text">
      <style:text-properties officeooo:rsid="43f9046a"/>
    </style:style>
    <style:style style:name="T815" style:family="text">
      <style:text-properties officeooo:rsid="43665f7a"/>
    </style:style>
    <style:style style:name="T816" style:family="text">
      <style:text-properties officeooo:rsid="43fad360"/>
    </style:style>
    <style:style style:name="T817" style:family="text">
      <style:text-properties officeooo:rsid="435afce2"/>
    </style:style>
    <style:style style:name="T818" style:family="text">
      <style:text-properties officeooo:rsid="43fc918f"/>
    </style:style>
    <style:style style:name="T819" style:family="text">
      <style:text-properties officeooo:rsid="4407f591"/>
    </style:style>
    <style:style style:name="T820" style:family="text">
      <style:text-properties officeooo:rsid="44098f38"/>
    </style:style>
    <style:style style:name="T821" style:family="text">
      <style:text-properties officeooo:rsid="43fe87d1"/>
    </style:style>
    <style:style style:name="T822" style:family="text">
      <style:text-properties officeooo:rsid="435ccf7a"/>
    </style:style>
    <style:style style:name="T823" style:family="text">
      <style:text-properties officeooo:rsid="435e2ab5"/>
    </style:style>
    <style:style style:name="T824" style:family="text">
      <style:text-properties officeooo:rsid="444546c1"/>
    </style:style>
    <style:style style:name="T825" style:family="text">
      <style:text-properties officeooo:rsid="43b99c6e"/>
    </style:style>
    <style:style style:name="T826" style:family="text">
      <style:text-properties officeooo:rsid="43b8a920"/>
    </style:style>
    <style:style style:name="T827" style:family="text">
      <style:text-properties officeooo:rsid="43b9a0b0"/>
    </style:style>
    <style:style style:name="T828" style:family="text">
      <style:text-properties officeooo:rsid="4436fdc1"/>
    </style:style>
    <style:style style:name="T829" style:family="text">
      <style:text-properties officeooo:rsid="4445f42c"/>
    </style:style>
    <style:style style:name="T830" style:family="text">
      <style:text-properties officeooo:rsid="435ee677"/>
    </style:style>
    <style:style style:name="T831" style:family="text">
      <style:text-properties officeooo:rsid="44479ee7"/>
    </style:style>
    <style:style style:name="T832" style:family="text">
      <style:text-properties officeooo:rsid="43fe33da"/>
    </style:style>
    <style:style style:name="T833" style:family="text">
      <style:text-properties officeooo:rsid="435fccc6"/>
    </style:style>
    <style:style style:name="T834" style:family="text">
      <style:text-properties officeooo:rsid="4346add8"/>
    </style:style>
    <style:style style:name="T835" style:family="text">
      <style:text-properties officeooo:rsid="434583ac"/>
    </style:style>
    <style:style style:name="T836" style:family="text">
      <style:text-properties officeooo:rsid="436069b1"/>
    </style:style>
    <style:style style:name="T837" style:family="text">
      <style:text-properties officeooo:rsid="43667ae8"/>
    </style:style>
    <style:style style:name="T838" style:family="text">
      <style:text-properties officeooo:rsid="4448f326"/>
    </style:style>
    <style:style style:name="T839" style:family="text">
      <style:text-properties officeooo:rsid="4449913a"/>
    </style:style>
    <style:style style:name="T840" style:family="text">
      <style:text-properties officeooo:rsid="44010f0c"/>
    </style:style>
    <style:style style:name="T841" style:family="text">
      <style:text-properties officeooo:rsid="4401ce10"/>
    </style:style>
    <style:style style:name="T842" style:family="text">
      <style:text-properties officeooo:rsid="440296ac"/>
    </style:style>
    <style:style style:name="T843" style:family="text">
      <style:text-properties officeooo:rsid="00162ffb"/>
    </style:style>
    <style:style style:name="T844" style:family="text">
      <style:text-properties officeooo:rsid="4d43dd3d"/>
    </style:style>
    <style:style style:name="T845" style:family="text">
      <style:text-properties officeooo:rsid="4daf7761"/>
    </style:style>
    <style:style style:name="T846" style:family="text">
      <style:text-properties officeooo:rsid="3a193dca"/>
    </style:style>
    <style:style style:name="T847" style:family="text">
      <style:text-properties officeooo:rsid="3a1cf760"/>
    </style:style>
    <style:style style:name="T848" style:family="text">
      <style:text-properties officeooo:rsid="3a171a34"/>
    </style:style>
    <style:style style:name="T849" style:family="text">
      <style:text-properties officeooo:rsid="2f191260"/>
    </style:style>
    <style:style style:name="T850" style:family="text">
      <style:text-properties officeooo:rsid="2f315fe8"/>
    </style:style>
    <style:style style:name="T851" style:family="text">
      <style:text-properties officeooo:rsid="467be55e"/>
    </style:style>
    <style:style style:name="T852" style:family="text">
      <style:text-properties officeooo:rsid="2f2eccac"/>
    </style:style>
    <style:style style:name="T853" style:family="text">
      <style:text-properties officeooo:rsid="2ed36f2b"/>
    </style:style>
    <style:style style:name="T854" style:family="text">
      <style:text-properties officeooo:rsid="2f06972c"/>
    </style:style>
    <style:style style:name="T855" style:family="text">
      <style:text-properties officeooo:rsid="2f09d8e7"/>
    </style:style>
    <style:style style:name="T856" style:family="text">
      <style:text-properties officeooo:rsid="39d52132"/>
    </style:style>
    <style:style style:name="T857" style:family="text">
      <style:text-properties officeooo:rsid="2f3accef"/>
    </style:style>
    <style:style style:name="T858" style:family="text">
      <style:text-properties officeooo:rsid="2f3bbfec"/>
    </style:style>
    <style:style style:name="T859" style:family="text">
      <style:text-properties officeooo:rsid="39a1798d"/>
    </style:style>
    <style:style style:name="T860" style:family="text">
      <style:text-properties officeooo:rsid="4cc69000"/>
    </style:style>
    <style:style style:name="T861" style:family="text">
      <style:text-properties officeooo:rsid="4721472b"/>
    </style:style>
    <style:style style:name="T862" style:family="text">
      <style:text-properties officeooo:rsid="2f671802"/>
    </style:style>
    <style:style style:name="T863" style:family="text">
      <style:text-properties officeooo:rsid="39a3a556"/>
    </style:style>
    <style:style style:name="T864" style:family="text">
      <style:text-properties officeooo:rsid="2f677cb2"/>
    </style:style>
    <style:style style:name="T865" style:family="text">
      <style:text-properties officeooo:rsid="2eeb721c"/>
    </style:style>
    <style:style style:name="T866" style:family="text">
      <style:text-properties officeooo:rsid="2f1ee542"/>
    </style:style>
    <style:style style:name="T867" style:family="text">
      <style:text-properties officeooo:rsid="2f0f1012"/>
    </style:style>
    <style:style style:name="T868" style:family="text">
      <style:text-properties officeooo:rsid="2ef37263"/>
    </style:style>
    <style:style style:name="T869" style:family="text">
      <style:text-properties officeooo:rsid="2f20c6b1"/>
    </style:style>
    <style:style style:name="T870" style:family="text">
      <style:text-properties officeooo:rsid="39b82ffe"/>
    </style:style>
    <style:style style:name="T871" style:family="text">
      <style:text-properties officeooo:rsid="2ef9892e"/>
    </style:style>
    <style:style style:name="T872" style:family="text">
      <style:text-properties officeooo:rsid="2f355aaf"/>
    </style:style>
    <style:style style:name="T873" style:family="text">
      <style:text-properties officeooo:rsid="2f365561"/>
    </style:style>
    <style:style style:name="T874" style:family="text">
      <style:text-properties officeooo:rsid="47295f0c"/>
    </style:style>
    <style:style style:name="T875" style:family="text">
      <style:text-properties officeooo:rsid="468b1960"/>
    </style:style>
    <style:style style:name="T876" style:family="text">
      <style:text-properties officeooo:rsid="46917dde"/>
    </style:style>
    <style:style style:name="T877" style:family="text">
      <style:text-properties officeooo:rsid="2ef0c567"/>
    </style:style>
    <style:style style:name="T878" style:family="text">
      <style:text-properties officeooo:rsid="2f188132"/>
    </style:style>
    <style:style style:name="T879" style:family="text">
      <style:text-properties officeooo:rsid="469264e4"/>
    </style:style>
    <style:style style:name="T880" style:family="text">
      <style:text-properties officeooo:rsid="2ee7778c"/>
    </style:style>
    <style:style style:name="T881" style:family="text">
      <style:text-properties officeooo:rsid="2ef5b3c2"/>
    </style:style>
    <style:style style:name="T882" style:family="text">
      <style:text-properties officeooo:rsid="468ffa5d"/>
    </style:style>
    <style:style style:name="T883" style:family="text">
      <style:text-properties officeooo:rsid="2f341188"/>
    </style:style>
    <style:style style:name="T884" style:family="text">
      <style:text-properties officeooo:rsid="2efceec0"/>
    </style:style>
    <style:style style:name="T885" style:family="text">
      <style:text-properties officeooo:rsid="2f1fc2b0"/>
    </style:style>
    <style:style style:name="T886" style:family="text">
      <style:text-properties officeooo:rsid="468c1805"/>
    </style:style>
    <style:style style:name="T887" style:family="text">
      <style:text-properties officeooo:rsid="468ec316"/>
    </style:style>
    <style:style style:name="T888" style:family="text">
      <style:text-properties officeooo:rsid="2f247506"/>
    </style:style>
    <style:style style:name="T889" style:family="text">
      <style:text-properties officeooo:rsid="2f49ea81"/>
    </style:style>
    <style:style style:name="T890" style:family="text">
      <style:text-properties officeooo:rsid="47224eff"/>
    </style:style>
    <style:style style:name="T891" style:family="text">
      <style:text-properties officeooo:rsid="2f384f5c"/>
    </style:style>
    <style:style style:name="T892" style:family="text">
      <style:text-properties officeooo:rsid="2f2a6d2b"/>
    </style:style>
    <style:style style:name="T893" style:family="text">
      <style:text-properties officeooo:rsid="4692d6c1"/>
    </style:style>
    <style:style style:name="T894" style:family="text">
      <style:text-properties officeooo:rsid="2f27ca6a"/>
    </style:style>
    <style:style style:name="T895" style:family="text">
      <style:text-properties officeooo:rsid="2f324e49"/>
    </style:style>
    <style:style style:name="T896" style:family="text">
      <style:text-properties officeooo:rsid="2f390f4c"/>
    </style:style>
    <style:style style:name="T897" style:family="text">
      <style:text-properties officeooo:rsid="469370e4"/>
    </style:style>
    <style:style style:name="T898" style:family="text">
      <style:text-properties officeooo:rsid="2f3c4a8a"/>
    </style:style>
    <style:style style:name="T899" style:family="text">
      <style:text-properties officeooo:rsid="39a98852"/>
    </style:style>
    <style:style style:name="T900" style:family="text">
      <style:text-properties officeooo:rsid="2f3ecb6b"/>
    </style:style>
    <style:style style:name="T901" style:family="text">
      <style:text-properties officeooo:rsid="46970022"/>
    </style:style>
    <style:style style:name="T902" style:family="text">
      <style:text-properties officeooo:rsid="4698b8e6"/>
    </style:style>
    <style:style style:name="T903" style:family="text">
      <style:text-properties officeooo:rsid="2f40ec60"/>
    </style:style>
    <style:style style:name="T904" style:family="text">
      <style:text-properties officeooo:rsid="467e03e4"/>
    </style:style>
    <style:style style:name="T905" style:family="text">
      <style:text-properties officeooo:rsid="467d75cc"/>
    </style:style>
    <style:style style:name="T906" style:family="text">
      <style:text-properties officeooo:rsid="39abad97"/>
    </style:style>
    <style:style style:name="T907" style:family="text">
      <style:text-properties officeooo:rsid="39ada2b4"/>
    </style:style>
    <style:style style:name="T908" style:family="text">
      <style:text-properties officeooo:rsid="39aaa9ab"/>
    </style:style>
    <style:style style:name="T909" style:family="text">
      <style:text-properties officeooo:rsid="39ae39b4"/>
    </style:style>
    <style:style style:name="T910" style:family="text">
      <style:text-properties officeooo:rsid="39af7fd8"/>
    </style:style>
    <style:style style:name="T911" style:family="text">
      <style:text-properties officeooo:rsid="472bc834"/>
    </style:style>
    <style:style style:name="T912" style:family="text">
      <style:text-properties officeooo:rsid="2f41dc9d"/>
    </style:style>
    <style:style style:name="T913" style:family="text">
      <style:text-properties officeooo:rsid="39afee87"/>
    </style:style>
    <style:style style:name="T914" style:family="text">
      <style:text-properties officeooo:rsid="2f453839"/>
    </style:style>
    <style:style style:name="T915" style:family="text">
      <style:text-properties officeooo:rsid="467ff483"/>
    </style:style>
    <style:style style:name="T916" style:family="text">
      <style:text-properties officeooo:rsid="2f456ace"/>
    </style:style>
    <style:style style:name="T917" style:family="text">
      <style:text-properties officeooo:rsid="39b3e566"/>
    </style:style>
    <style:style style:name="T918" style:family="text">
      <style:text-properties officeooo:rsid="46997dfa"/>
    </style:style>
    <style:style style:name="T919" style:family="text">
      <style:text-properties officeooo:rsid="469a0e01"/>
    </style:style>
    <style:style style:name="T920" style:family="text">
      <style:text-properties officeooo:rsid="39b54821"/>
    </style:style>
    <style:style style:name="T921" style:family="text">
      <style:text-properties officeooo:rsid="39b9b1ab"/>
    </style:style>
    <style:style style:name="T922" style:family="text">
      <style:text-properties officeooo:rsid="39ba6251"/>
    </style:style>
    <style:style style:name="T923" style:family="text">
      <style:text-properties officeooo:rsid="2f46efcd"/>
    </style:style>
    <style:style style:name="T924" style:family="text">
      <style:text-properties officeooo:rsid="469bda3b"/>
    </style:style>
    <style:style style:name="T925" style:family="text">
      <style:text-properties officeooo:rsid="472c5fa6"/>
    </style:style>
    <style:style style:name="T926" style:family="text">
      <style:text-properties officeooo:rsid="469d14ea"/>
    </style:style>
    <style:style style:name="T927" style:family="text">
      <style:text-properties officeooo:rsid="4733cc31"/>
    </style:style>
    <style:style style:name="T928" style:family="text">
      <style:text-properties officeooo:rsid="472e9a79"/>
    </style:style>
    <style:style style:name="T929" style:family="text">
      <style:text-properties officeooo:rsid="469e0a7e"/>
    </style:style>
    <style:style style:name="T930" style:family="text">
      <style:text-properties officeooo:rsid="46803a8a"/>
    </style:style>
    <style:style style:name="T931" style:family="text">
      <style:text-properties officeooo:rsid="47257c95"/>
    </style:style>
    <style:style style:name="T932" style:family="text">
      <style:text-properties officeooo:rsid="46800714"/>
    </style:style>
    <style:style style:name="T933" style:family="text">
      <style:text-properties officeooo:rsid="39bd2dc2"/>
    </style:style>
    <style:style style:name="T934" style:family="text">
      <style:text-properties officeooo:rsid="47301ec8"/>
    </style:style>
    <style:style style:name="T935" style:family="text">
      <style:text-properties officeooo:rsid="473211ed"/>
    </style:style>
    <style:style style:name="T936" style:family="text">
      <style:text-properties officeooo:rsid="2f476fb1"/>
    </style:style>
    <style:style style:name="T937" style:family="text">
      <style:text-properties officeooo:rsid="2f48b0ee"/>
    </style:style>
    <style:style style:name="T938" style:family="text">
      <style:text-properties officeooo:rsid="2f1abc92"/>
    </style:style>
    <style:style style:name="T939" style:family="text">
      <style:text-properties officeooo:rsid="2f4b6f4b"/>
    </style:style>
    <style:style style:name="T940" style:family="text">
      <style:text-properties officeooo:rsid="46a0f2c1"/>
    </style:style>
    <style:style style:name="T941" style:family="text">
      <style:text-properties officeooo:rsid="4728580b"/>
    </style:style>
    <style:style style:name="T942" style:family="text">
      <style:text-properties officeooo:rsid="2f3f10a9"/>
    </style:style>
    <style:style style:name="T943" style:family="text">
      <style:text-properties officeooo:rsid="47326d44"/>
    </style:style>
    <style:style style:name="T944" style:family="text">
      <style:text-properties officeooo:rsid="2f4c2ba0"/>
    </style:style>
    <style:style style:name="T945" style:family="text">
      <style:text-properties officeooo:rsid="47357174"/>
    </style:style>
    <style:style style:name="T946" style:family="text">
      <style:text-properties officeooo:rsid="4cc8d0f7"/>
    </style:style>
    <style:style style:name="T947" style:family="text">
      <style:text-properties officeooo:rsid="473b4690"/>
    </style:style>
    <style:style style:name="T948" style:family="text">
      <style:text-properties officeooo:rsid="473cf536"/>
    </style:style>
    <style:style style:name="T949" style:family="text">
      <style:text-properties officeooo:rsid="473dd014"/>
    </style:style>
    <style:style style:name="T950" style:family="text">
      <style:text-properties officeooo:rsid="2f33b037"/>
    </style:style>
    <style:style style:name="T951" style:family="text">
      <style:text-properties officeooo:rsid="39d5545c"/>
    </style:style>
    <style:style style:name="T952" style:family="text">
      <style:text-properties officeooo:rsid="39d8bb03"/>
    </style:style>
    <style:style style:name="T953" style:family="text">
      <style:text-properties officeooo:rsid="39dac513"/>
    </style:style>
    <style:style style:name="T954" style:family="text">
      <style:text-properties officeooo:rsid="39dc67e1"/>
    </style:style>
    <style:style style:name="T955" style:family="text">
      <style:text-properties officeooo:rsid="39df41f2"/>
    </style:style>
    <style:style style:name="T956" style:family="text">
      <style:text-properties officeooo:rsid="39e0499d"/>
    </style:style>
    <style:style style:name="T957" style:family="text">
      <style:text-properties officeooo:rsid="39dcce26"/>
    </style:style>
    <style:style style:name="T958" style:family="text">
      <style:text-properties officeooo:rsid="47414649"/>
    </style:style>
    <style:style style:name="T959" style:family="text">
      <style:text-properties officeooo:rsid="39e0e20b"/>
    </style:style>
    <style:style style:name="T960" style:family="text">
      <style:text-properties officeooo:rsid="39e2b5ca"/>
    </style:style>
    <style:style style:name="T961" style:family="text">
      <style:text-properties officeooo:rsid="474232d5"/>
    </style:style>
    <style:style style:name="T962" style:family="text">
      <style:text-properties officeooo:rsid="39fc5341"/>
    </style:style>
    <style:style style:name="T963" style:family="text">
      <style:text-properties fo:font-weight="bold" style:font-weight-asian="bold" style:font-weight-complex="bold"/>
    </style:style>
    <style:style style:name="T964" style:family="text">
      <style:text-properties officeooo:rsid="34e1ad76"/>
    </style:style>
    <style:style style:name="T965" style:family="text">
      <style:text-properties officeooo:rsid="39ec7aa2"/>
    </style:style>
    <style:style style:name="T966" style:family="text">
      <style:text-properties officeooo:rsid="39e48afe"/>
    </style:style>
    <style:style style:name="T967" style:family="text">
      <style:text-properties officeooo:rsid="4681ce2b"/>
    </style:style>
    <style:style style:name="T968" style:family="text">
      <style:text-properties officeooo:rsid="39e552b8"/>
    </style:style>
    <style:style style:name="T969" style:family="text">
      <style:text-properties officeooo:rsid="39edd289"/>
    </style:style>
    <style:style style:name="T970" style:family="text">
      <style:text-properties officeooo:rsid="39e72cc2"/>
    </style:style>
    <style:style style:name="T971" style:family="text">
      <style:text-properties officeooo:rsid="39e9e588"/>
    </style:style>
    <style:style style:name="T972" style:family="text">
      <style:text-properties officeooo:rsid="46826540"/>
    </style:style>
    <style:style style:name="T973" style:family="text">
      <style:text-properties officeooo:rsid="3a0013cd"/>
    </style:style>
    <style:style style:name="T974" style:family="text">
      <style:text-properties officeooo:rsid="39ef7db4"/>
    </style:style>
    <style:style style:name="T975" style:family="text">
      <style:text-properties officeooo:rsid="39f00c28"/>
    </style:style>
    <style:style style:name="T976" style:family="text">
      <style:text-properties officeooo:rsid="39f08eea"/>
    </style:style>
    <style:style style:name="T977" style:family="text">
      <style:text-properties officeooo:rsid="474d26a7"/>
    </style:style>
    <style:style style:name="T978" style:family="text">
      <style:text-properties officeooo:rsid="39c07072"/>
    </style:style>
    <style:style style:name="T979" style:family="text">
      <style:text-properties officeooo:rsid="3a0018c2"/>
    </style:style>
    <style:style style:name="T980" style:family="text">
      <style:text-properties officeooo:rsid="39c0ad00"/>
    </style:style>
    <style:style style:name="T981" style:family="text">
      <style:text-properties officeooo:rsid="39f223e5"/>
    </style:style>
    <style:style style:name="T982" style:family="text">
      <style:text-properties officeooo:rsid="39f2b8f8"/>
    </style:style>
    <style:style style:name="T983" style:family="text">
      <style:text-properties officeooo:rsid="2f218242"/>
    </style:style>
    <style:style style:name="T984" style:family="text">
      <style:text-properties officeooo:rsid="2f117ae0"/>
    </style:style>
    <style:style style:name="T985" style:family="text">
      <style:text-properties officeooo:rsid="39f35a7d"/>
    </style:style>
    <style:style style:name="T986" style:family="text">
      <style:text-properties officeooo:rsid="3a011042"/>
    </style:style>
    <style:style style:name="T987" style:family="text">
      <style:text-properties officeooo:rsid="39f0a8a0"/>
    </style:style>
    <style:style style:name="T988" style:family="text">
      <style:text-properties officeooo:rsid="39f18f83"/>
    </style:style>
    <style:style style:name="T989" style:family="text">
      <style:text-properties officeooo:rsid="3a025430"/>
    </style:style>
    <style:style style:name="T990" style:family="text">
      <style:text-properties officeooo:rsid="39f4fcb4"/>
    </style:style>
    <style:style style:name="T991" style:family="text">
      <style:text-properties officeooo:rsid="474d3882"/>
    </style:style>
    <style:style style:name="T992" style:family="text">
      <style:text-properties officeooo:rsid="474fca16"/>
    </style:style>
    <style:style style:name="T993" style:family="text">
      <style:text-properties officeooo:rsid="474ea090"/>
    </style:style>
    <style:style style:name="T994" style:family="text">
      <style:text-properties officeooo:rsid="39f81c51"/>
    </style:style>
    <style:style style:name="T995" style:family="text">
      <style:text-properties officeooo:rsid="39f9d9a1"/>
    </style:style>
    <style:style style:name="T996" style:family="text">
      <style:text-properties officeooo:rsid="39f84db5"/>
    </style:style>
    <style:style style:name="T997" style:family="text">
      <style:text-properties officeooo:rsid="39fad61b"/>
    </style:style>
    <style:style style:name="T998" style:family="text">
      <style:text-properties officeooo:rsid="3a03cf46"/>
    </style:style>
    <style:style style:name="T999" style:family="text">
      <style:text-properties officeooo:rsid="3a05c3ba"/>
    </style:style>
    <style:style style:name="T1000" style:family="text">
      <style:text-properties officeooo:rsid="3a0799c1"/>
    </style:style>
    <style:style style:name="T1001" style:family="text">
      <style:text-properties officeooo:rsid="3a0a367e"/>
    </style:style>
    <style:style style:name="T1002" style:family="text">
      <style:text-properties officeooo:rsid="3a0955c7"/>
    </style:style>
    <style:style style:name="T1003" style:family="text">
      <style:text-properties officeooo:rsid="3a0b6be2"/>
    </style:style>
    <style:style style:name="T1004" style:family="text">
      <style:text-properties officeooo:rsid="3a092bcc"/>
    </style:style>
    <style:style style:name="T1005" style:family="text">
      <style:text-properties officeooo:rsid="39c3127f"/>
    </style:style>
    <style:style style:name="T1006" style:family="text">
      <style:text-properties officeooo:rsid="39c4266f"/>
    </style:style>
    <style:style style:name="T1007" style:family="text">
      <style:text-properties officeooo:rsid="3a0cd78a"/>
    </style:style>
    <style:style style:name="T1008" style:family="text">
      <style:text-properties officeooo:rsid="2f54a8d8"/>
    </style:style>
    <style:style style:name="T1009" style:family="text">
      <style:text-properties officeooo:rsid="39c601f0"/>
    </style:style>
    <style:style style:name="T1010" style:family="text">
      <style:text-properties officeooo:rsid="3a0fba9c"/>
    </style:style>
    <style:style style:name="T1011" style:family="text">
      <style:text-properties officeooo:rsid="2f565156"/>
    </style:style>
    <style:style style:name="T1012" style:family="text">
      <style:text-properties officeooo:rsid="2f584129"/>
    </style:style>
    <style:style style:name="T1013" style:family="text">
      <style:text-properties officeooo:rsid="39c7a17a"/>
    </style:style>
    <style:style style:name="T1014" style:family="text">
      <style:text-properties officeooo:rsid="2f58feb9"/>
    </style:style>
    <style:style style:name="T1015" style:family="text">
      <style:text-properties fo:font-size="10pt" officeooo:rsid="1295447a" style:font-size-asian="10pt" style:font-size-complex="10pt"/>
    </style:style>
    <style:style style:name="T1016" style:family="text">
      <style:text-properties fo:font-size="10pt" officeooo:rsid="3a8f7afc" style:font-size-asian="10pt" style:font-size-complex="10pt"/>
    </style:style>
    <style:style style:name="T1017" style:family="text">
      <style:text-properties fo:font-size="10pt" officeooo:rsid="1810ab9d" style:font-size-asian="10pt" style:font-size-complex="10pt"/>
    </style:style>
    <style:style style:name="T1018" style:family="text">
      <style:text-properties officeooo:rsid="4ea196af"/>
    </style:style>
    <style:style style:name="T1019" style:family="text">
      <style:text-properties officeooo:rsid="3a90bb89"/>
    </style:style>
    <style:style style:name="T1020" style:family="text">
      <style:text-properties officeooo:rsid="32817697"/>
    </style:style>
    <style:style style:name="T1021" style:family="text">
      <style:text-properties officeooo:rsid="477bff14"/>
    </style:style>
    <style:style style:name="T1022" style:family="text">
      <style:text-properties officeooo:rsid="32849953"/>
    </style:style>
    <style:style style:name="T1023" style:family="text">
      <style:text-properties officeooo:rsid="4d68510c"/>
    </style:style>
    <style:style style:name="T1024" style:family="text">
      <style:text-properties officeooo:rsid="4d624207"/>
    </style:style>
    <style:style style:name="T1025" style:family="text">
      <style:text-properties officeooo:rsid="4d64e9c0"/>
    </style:style>
    <style:style style:name="T1026" style:family="text">
      <style:text-properties officeooo:rsid="4d655712"/>
    </style:style>
    <style:style style:name="T1027" style:family="text">
      <style:text-properties officeooo:rsid="4ea5e3a2"/>
    </style:style>
    <style:style style:name="T1028" style:family="text">
      <style:text-properties officeooo:rsid="4ea752b9"/>
    </style:style>
    <style:style style:name="T1029" style:family="text">
      <style:text-properties officeooo:rsid="4d6b59c8"/>
    </style:style>
    <style:style style:name="T1030" style:family="text">
      <style:text-properties officeooo:rsid="4d6cd9cb"/>
    </style:style>
    <style:style style:name="T1031" style:family="text">
      <style:text-properties officeooo:rsid="4d6d99c1"/>
    </style:style>
    <style:style style:name="T1032" style:family="text">
      <style:text-properties officeooo:rsid="4d732ab0"/>
    </style:style>
    <style:style style:name="T1033" style:family="text">
      <style:text-properties officeooo:rsid="4d73f911"/>
    </style:style>
    <style:style style:name="T1034" style:family="text">
      <style:text-properties officeooo:rsid="4d6dd057"/>
    </style:style>
    <style:style style:name="T1035" style:family="text">
      <style:text-properties officeooo:rsid="4d6f955d"/>
    </style:style>
    <style:style style:name="T1036" style:family="text">
      <style:text-properties officeooo:rsid="4d7244a3"/>
    </style:style>
    <style:style style:name="T1037" style:family="text">
      <style:text-properties officeooo:rsid="4d711682"/>
    </style:style>
    <style:style style:name="T1038" style:family="text">
      <style:text-properties officeooo:rsid="46405eaf"/>
    </style:style>
    <style:style style:name="T1039" style:family="text">
      <style:text-properties officeooo:rsid="46694b7b"/>
    </style:style>
    <style:style style:name="T1040" style:family="text">
      <style:text-properties officeooo:rsid="4621f19f"/>
    </style:style>
    <style:style style:name="T1041" style:family="text">
      <style:text-properties officeooo:rsid="462488d6"/>
    </style:style>
    <style:style style:name="T1042" style:family="text">
      <style:text-properties officeooo:rsid="4625536a"/>
    </style:style>
    <style:style style:name="T1043" style:family="text">
      <style:text-properties officeooo:rsid="462161a1"/>
    </style:style>
    <style:style style:name="T1044" style:family="text">
      <style:text-properties officeooo:rsid="462575c1"/>
    </style:style>
    <style:style style:name="T1045" style:family="text">
      <style:text-properties officeooo:rsid="1156ee19"/>
    </style:style>
    <style:style style:name="T1046" style:family="text">
      <style:text-properties officeooo:rsid="12a759c5"/>
    </style:style>
    <style:style style:name="T1047" style:family="text">
      <style:text-properties officeooo:rsid="031beb7f"/>
    </style:style>
    <style:style style:name="T1048" style:family="text">
      <style:text-properties officeooo:rsid="17f643ef"/>
    </style:style>
    <style:style style:name="T1049" style:family="text">
      <style:text-properties officeooo:rsid="17f76d8d"/>
    </style:style>
    <style:style style:name="T1050" style:family="text">
      <style:text-properties officeooo:rsid="033246b9"/>
    </style:style>
    <style:style style:name="T1051" style:family="text">
      <style:text-properties officeooo:rsid="03326362"/>
    </style:style>
    <style:style style:name="T1052" style:family="text">
      <style:text-properties officeooo:rsid="117c5c3d"/>
    </style:style>
    <style:style style:name="T1053" style:family="text">
      <style:text-properties officeooo:rsid="12aaa528"/>
    </style:style>
    <style:style style:name="T1054" style:family="text">
      <style:text-properties officeooo:rsid="0b57d036"/>
    </style:style>
    <style:style style:name="T1055" style:family="text">
      <style:text-properties officeooo:rsid="1231ee8e"/>
    </style:style>
    <style:style style:name="T1056" style:family="text">
      <style:text-properties officeooo:rsid="12a8e0c1"/>
    </style:style>
    <style:style style:name="T1057" style:family="text">
      <style:text-properties officeooo:rsid="117ca7f4"/>
    </style:style>
    <style:style style:name="T1058" style:family="text">
      <style:text-properties officeooo:rsid="1232ec32"/>
    </style:style>
    <style:style style:name="T1059" style:family="text">
      <style:text-properties officeooo:rsid="12a7f1e2"/>
    </style:style>
    <style:style style:name="T1060" style:family="text">
      <style:text-properties officeooo:rsid="12ab43b5"/>
    </style:style>
    <style:style style:name="T1061" style:family="text">
      <style:text-properties officeooo:rsid="0db4692e"/>
    </style:style>
    <style:style style:name="T1062" style:family="text">
      <style:text-properties officeooo:rsid="0332e3f4"/>
    </style:style>
    <style:style style:name="T1063" style:family="text">
      <style:text-properties officeooo:rsid="086d5d36"/>
    </style:style>
    <style:style style:name="T1064" style:family="text">
      <style:text-properties officeooo:rsid="0b57f40a"/>
    </style:style>
    <style:style style:name="T1065" style:family="text">
      <style:text-properties officeooo:rsid="115b585d"/>
    </style:style>
    <style:style style:name="T1066" style:family="text">
      <style:text-properties officeooo:rsid="1bacc7f6"/>
    </style:style>
    <style:style style:name="T1067" style:family="text">
      <style:text-properties officeooo:rsid="1155eca8"/>
    </style:style>
    <style:style style:name="T1068" style:family="text">
      <style:text-properties officeooo:rsid="03336559"/>
    </style:style>
    <style:style style:name="T1069" style:family="text">
      <style:text-properties officeooo:rsid="0334abc6"/>
    </style:style>
    <style:style style:name="T1070" style:family="text">
      <style:text-properties officeooo:rsid="1ba9e8b9"/>
    </style:style>
    <style:style style:name="T1071" style:family="text">
      <style:text-properties officeooo:rsid="117e28a6"/>
    </style:style>
    <style:style style:name="T1072" style:family="text">
      <style:text-properties officeooo:rsid="11582817"/>
    </style:style>
    <style:style style:name="T1073" style:family="text">
      <style:text-properties officeooo:rsid="117e4a6c"/>
    </style:style>
    <style:style style:name="T1074" style:family="text">
      <style:text-properties officeooo:rsid="1159f45a"/>
    </style:style>
    <style:style style:name="T1075" style:family="text">
      <style:text-properties officeooo:rsid="031d45b1"/>
    </style:style>
    <style:style style:name="T1076" style:family="text">
      <style:text-properties officeooo:rsid="466a9ee4"/>
    </style:style>
    <style:style style:name="T1077" style:family="text">
      <style:text-properties officeooo:rsid="031fc7ea"/>
    </style:style>
    <style:style style:name="T1078" style:family="text">
      <style:text-properties officeooo:rsid="3996717a"/>
    </style:style>
    <style:style style:name="T1079" style:family="text">
      <style:text-properties officeooo:rsid="096475b1"/>
    </style:style>
    <style:style style:name="T1080" style:family="text">
      <style:text-properties officeooo:rsid="4621842f"/>
    </style:style>
    <style:style style:name="T1081" style:family="text">
      <style:text-properties officeooo:rsid="115d7daf"/>
    </style:style>
    <style:style style:name="T1082" style:family="text">
      <style:text-properties officeooo:rsid="115fc32b"/>
    </style:style>
    <style:style style:name="T1083" style:family="text">
      <style:text-properties officeooo:rsid="2ebd3656"/>
    </style:style>
    <style:style style:name="T1084" style:family="text">
      <style:text-properties officeooo:rsid="2ec01ea1"/>
    </style:style>
    <style:style style:name="T1085" style:family="text">
      <style:text-properties officeooo:rsid="2ebe7c24"/>
    </style:style>
    <style:style style:name="T1086" style:family="text">
      <style:text-properties officeooo:rsid="2ebf9a08"/>
    </style:style>
    <style:style style:name="T1087" style:family="text">
      <style:text-properties officeooo:rsid="2ec046ee"/>
    </style:style>
    <style:style style:name="T1088" style:family="text">
      <style:text-properties officeooo:rsid="2ec16383"/>
    </style:style>
    <style:style style:name="T1089" style:family="text">
      <style:text-properties officeooo:rsid="2ec29856"/>
    </style:style>
    <style:style style:name="T1090" style:family="text">
      <style:text-properties officeooo:rsid="116bc21c"/>
    </style:style>
    <style:style style:name="T1091" style:family="text">
      <style:text-properties officeooo:rsid="12b5a7c5"/>
    </style:style>
    <style:style style:name="T1092" style:family="text">
      <style:text-properties officeooo:rsid="12b5e828"/>
    </style:style>
    <style:style style:name="T1093" style:family="text">
      <style:text-properties officeooo:rsid="115ff2de"/>
    </style:style>
    <style:style style:name="T1094" style:family="text">
      <style:text-properties officeooo:rsid="2ec3294c"/>
    </style:style>
    <style:style style:name="T1095" style:family="text">
      <style:text-properties officeooo:rsid="39981424"/>
    </style:style>
    <style:style style:name="T1096" style:family="text">
      <style:text-properties officeooo:rsid="39997178"/>
    </style:style>
    <style:style style:name="T1097" style:family="text">
      <style:text-properties officeooo:rsid="116412d1"/>
    </style:style>
    <style:style style:name="T1098" style:family="text">
      <style:text-properties officeooo:rsid="116148c2"/>
    </style:style>
    <style:style style:name="T1099" style:family="text">
      <style:text-properties officeooo:rsid="2ec51a16"/>
    </style:style>
    <style:style style:name="T1100" style:family="text">
      <style:text-properties officeooo:rsid="23895713"/>
    </style:style>
    <style:style style:name="T1101" style:family="text">
      <style:text-properties officeooo:rsid="399b9ad1"/>
    </style:style>
    <style:style style:name="T1102" style:family="text">
      <style:text-properties officeooo:rsid="2f0352b7"/>
    </style:style>
    <style:style style:name="T1103" style:family="text">
      <style:text-properties officeooo:rsid="2f04bb72"/>
    </style:style>
    <style:style style:name="T1104" style:family="text">
      <style:text-properties officeooo:rsid="2ec59aef"/>
    </style:style>
    <style:style style:name="T1105" style:family="text">
      <style:text-properties officeooo:rsid="4cace2d9"/>
    </style:style>
    <style:style style:name="T1106" style:family="text">
      <style:text-properties officeooo:rsid="2ec76bef"/>
    </style:style>
    <style:style style:name="T1107" style:family="text">
      <style:text-properties officeooo:rsid="2ec852bf"/>
    </style:style>
    <style:style style:name="T1108" style:family="text">
      <style:text-properties officeooo:rsid="12354256"/>
    </style:style>
    <style:style style:name="T1109" style:family="text">
      <style:text-properties officeooo:rsid="1182908d"/>
    </style:style>
    <style:style style:name="T1110" style:family="text">
      <style:text-properties officeooo:rsid="118449c0"/>
    </style:style>
    <style:style style:name="T1111" style:family="text">
      <style:text-properties officeooo:rsid="2ecbd75a"/>
    </style:style>
    <style:style style:name="T1112" style:family="text">
      <style:text-properties officeooo:rsid="11692442"/>
    </style:style>
    <style:style style:name="T1113" style:family="text">
      <style:text-properties officeooo:rsid="11695f59"/>
    </style:style>
    <style:style style:name="T1114" style:family="text">
      <style:text-properties officeooo:rsid="117e7fdb"/>
    </style:style>
    <style:style style:name="T1115" style:family="text">
      <style:text-properties officeooo:rsid="2ecdd1c6"/>
    </style:style>
    <style:style style:name="T1116" style:family="text">
      <style:text-properties officeooo:rsid="466ad1b8"/>
    </style:style>
    <style:style style:name="T1117" style:family="text">
      <style:text-properties officeooo:rsid="2f06470f"/>
    </style:style>
    <style:style style:name="T1118" style:family="text">
      <style:text-properties officeooo:rsid="2ecf3c0e"/>
    </style:style>
    <style:style style:name="T1119" style:family="text">
      <style:text-properties officeooo:rsid="466cc84f"/>
    </style:style>
    <style:style style:name="T1120" style:family="text">
      <style:text-properties officeooo:rsid="2ecffb4e"/>
    </style:style>
    <style:style style:name="T1121" style:family="text">
      <style:text-properties officeooo:rsid="46268322"/>
    </style:style>
    <style:style style:name="T1122" style:family="text">
      <style:text-properties officeooo:rsid="2ed178d6"/>
    </style:style>
    <style:style style:name="T1123" style:family="text">
      <style:text-properties officeooo:rsid="466d1cca"/>
    </style:style>
    <style:style style:name="T1124" style:family="text">
      <style:text-properties officeooo:rsid="2f2d90b3"/>
    </style:style>
    <style:style style:name="T1125" style:family="text">
      <style:text-properties officeooo:rsid="462c6f6f"/>
    </style:style>
    <style:style style:name="T1126" style:family="text">
      <style:text-properties officeooo:rsid="466e1390"/>
    </style:style>
    <style:style style:name="T1127" style:family="text">
      <style:text-properties officeooo:rsid="462cc00f"/>
    </style:style>
    <style:style style:name="T1128" style:family="text">
      <style:text-properties officeooo:rsid="4cae2723"/>
    </style:style>
    <style:style style:name="T1129" style:family="text">
      <style:text-properties officeooo:rsid="462dbfa3"/>
    </style:style>
    <style:style style:name="T1130" style:family="text">
      <style:text-properties officeooo:rsid="4caef517"/>
    </style:style>
    <style:style style:name="T1131" style:family="text">
      <style:text-properties officeooo:rsid="4629ee86"/>
    </style:style>
    <style:style style:name="T1132" style:family="text">
      <style:text-properties officeooo:rsid="462e6153"/>
    </style:style>
    <style:style style:name="T1133" style:family="text">
      <style:text-properties officeooo:rsid="4632b9a2"/>
    </style:style>
    <style:style style:name="T1134" style:family="text">
      <style:text-properties officeooo:rsid="466f5f18"/>
    </style:style>
    <style:style style:name="T1135" style:family="text">
      <style:text-properties officeooo:rsid="4caf304e"/>
    </style:style>
    <style:style style:name="T1136" style:family="text">
      <style:text-properties officeooo:rsid="4cb07e74"/>
    </style:style>
    <style:style style:name="T1137" style:family="text">
      <style:text-properties officeooo:rsid="4630899f"/>
    </style:style>
    <style:style style:name="T1138" style:family="text">
      <style:text-properties officeooo:rsid="4cb2ba8d"/>
    </style:style>
    <style:style style:name="T1139" style:family="text">
      <style:text-properties officeooo:rsid="4cb10266"/>
    </style:style>
    <style:style style:name="T1140" style:family="text">
      <style:text-properties officeooo:rsid="463104a5"/>
    </style:style>
    <style:style style:name="T1141" style:family="text">
      <style:text-properties officeooo:rsid="46720975"/>
    </style:style>
    <style:style style:name="T1142" style:family="text">
      <style:text-properties officeooo:rsid="463bb85a"/>
    </style:style>
    <style:style style:name="T1143" style:family="text">
      <style:text-properties officeooo:rsid="46735932"/>
    </style:style>
    <style:style style:name="T1144" style:family="text">
      <style:text-properties officeooo:rsid="4cb5408b"/>
    </style:style>
    <style:style style:name="T1145" style:family="text">
      <style:text-properties officeooo:rsid="496c025b"/>
    </style:style>
    <style:style style:name="T1146" style:family="text">
      <style:text-properties officeooo:rsid="46359d15"/>
    </style:style>
    <style:style style:name="T1147" style:family="text">
      <style:text-properties officeooo:rsid="4cb74e57"/>
    </style:style>
    <style:style style:name="T1148" style:family="text">
      <style:text-properties officeooo:rsid="4cb7a0ac"/>
    </style:style>
    <style:style style:name="T1149" style:family="text">
      <style:text-properties officeooo:rsid="46751a01"/>
    </style:style>
    <style:style style:name="T1150" style:family="text">
      <style:text-properties officeooo:rsid="4cb889c5"/>
    </style:style>
    <style:style style:name="T1151" style:family="text">
      <style:text-properties officeooo:rsid="496c4462"/>
    </style:style>
    <style:style style:name="T1152" style:family="text">
      <style:text-properties officeooo:rsid="4cb962c0"/>
    </style:style>
    <style:style style:name="T1153" style:family="text">
      <style:text-properties officeooo:rsid="4cba8506"/>
    </style:style>
    <style:style style:name="T1154" style:family="text">
      <style:text-properties officeooo:rsid="4cbd14a8"/>
    </style:style>
    <style:style style:name="T1155" style:family="text">
      <style:text-properties officeooo:rsid="4638db74"/>
    </style:style>
    <style:style style:name="T1156" style:family="text">
      <style:text-properties officeooo:rsid="4676b0da"/>
    </style:style>
    <style:style style:name="T1157" style:family="text">
      <style:text-properties officeooo:rsid="463a7721"/>
    </style:style>
    <style:style style:name="T1158" style:family="text">
      <style:text-properties officeooo:rsid="46439a87"/>
    </style:style>
    <style:style style:name="T1159" style:family="text">
      <style:text-properties officeooo:rsid="4663f3a1"/>
    </style:style>
    <style:style style:name="T1160" style:family="text">
      <style:text-properties officeooo:rsid="46772b3a"/>
    </style:style>
    <style:style style:name="T1161" style:family="text">
      <style:text-properties officeooo:rsid="4678c781"/>
    </style:style>
    <style:style style:name="T1162" style:family="text">
      <style:text-properties officeooo:rsid="467965b9"/>
    </style:style>
    <style:style style:name="T1163" style:family="text">
      <style:text-properties officeooo:rsid="463cc355"/>
    </style:style>
    <style:style style:name="T1164" style:family="text">
      <style:text-properties officeooo:rsid="46451305"/>
    </style:style>
    <style:style style:name="T1165" style:family="text">
      <style:text-properties officeooo:rsid="46414f9d"/>
    </style:style>
    <style:style style:name="T1166" style:family="text">
      <style:text-properties officeooo:rsid="4c936f1c"/>
    </style:style>
    <style:style style:name="T1167" style:family="text">
      <style:text-properties officeooo:rsid="4c9450d5"/>
    </style:style>
    <style:style style:name="T1168" style:family="text">
      <style:text-properties officeooo:rsid="4c87f329"/>
    </style:style>
    <style:style style:name="T1169" style:family="text">
      <style:text-properties officeooo:rsid="4c899c0c"/>
    </style:style>
    <style:style style:name="T1170" style:family="text">
      <style:text-properties officeooo:rsid="09e6cfd1"/>
    </style:style>
    <style:style style:name="T1171" style:family="text">
      <style:text-properties officeooo:rsid="0af2478a"/>
    </style:style>
    <style:style style:name="T1172" style:family="text">
      <style:text-properties officeooo:rsid="4c714b5f"/>
    </style:style>
    <style:style style:name="T1173" style:family="text">
      <style:text-properties officeooo:rsid="4c76da23"/>
    </style:style>
    <style:style style:name="T1174" style:family="text">
      <style:text-properties officeooo:rsid="4c7ded56"/>
    </style:style>
    <style:style style:name="T1175" style:family="text">
      <style:text-properties officeooo:rsid="2523db49"/>
    </style:style>
    <style:style style:name="T1176" style:family="text">
      <style:text-properties officeooo:rsid="4c775c0a"/>
    </style:style>
    <style:style style:name="T1177" style:family="text">
      <style:text-properties officeooo:rsid="4c731e0f"/>
    </style:style>
    <style:style style:name="T1178" style:family="text">
      <style:text-properties officeooo:rsid="4fbcd370"/>
    </style:style>
    <style:style style:name="T1179" style:family="text">
      <style:text-properties officeooo:rsid="4fba4211"/>
    </style:style>
    <style:style style:name="T1180" style:family="text">
      <style:text-properties officeooo:rsid="4fbc04ba"/>
    </style:style>
    <style:style style:name="T1181" style:family="text">
      <style:text-properties officeooo:rsid="4c8cbb00"/>
    </style:style>
    <style:style style:name="T1182" style:family="text">
      <style:text-properties officeooo:rsid="4c8cf3a3"/>
    </style:style>
    <style:style style:name="T1183" style:family="text">
      <style:text-properties officeooo:rsid="4c8cf650"/>
    </style:style>
    <style:style style:name="T1184" style:family="text">
      <style:text-properties officeooo:rsid="07e52049"/>
    </style:style>
    <style:style style:name="T1185" style:family="text">
      <style:text-properties officeooo:rsid="07df02aa"/>
    </style:style>
    <style:style style:name="T1186" style:family="text">
      <style:text-properties officeooo:rsid="09cf8993"/>
    </style:style>
    <style:style style:name="T1187" style:family="text">
      <style:text-properties officeooo:rsid="0ad9f0db"/>
    </style:style>
    <style:style style:name="T1188" style:family="text">
      <style:text-properties officeooo:rsid="09d0b084"/>
    </style:style>
    <style:style style:name="T1189" style:family="text">
      <style:text-properties officeooo:rsid="09d1cc40"/>
    </style:style>
    <style:style style:name="T1190" style:family="text">
      <style:text-properties officeooo:rsid="09d43464"/>
    </style:style>
    <style:style style:name="T1191" style:family="text">
      <style:text-properties officeooo:rsid="09d6d7fc"/>
    </style:style>
    <style:style style:name="T1192" style:family="text">
      <style:text-properties officeooo:rsid="35f0ddab"/>
    </style:style>
    <style:style style:name="T1193" style:family="text">
      <style:text-properties officeooo:rsid="35f1281e"/>
    </style:style>
    <style:style style:name="T1194" style:family="text">
      <style:text-properties officeooo:rsid="0eb4f16d"/>
    </style:style>
    <style:style style:name="T1195" style:family="text">
      <style:text-properties officeooo:rsid="4c5fe5b4"/>
    </style:style>
    <style:style style:name="T1196" style:family="text">
      <style:text-properties officeooo:rsid="21a6e5d9"/>
    </style:style>
    <style:style style:name="T1197" style:family="text">
      <style:text-properties officeooo:rsid="21a9a250"/>
    </style:style>
    <style:style style:name="T1198" style:family="text">
      <style:text-properties officeooo:rsid="0eb5e633"/>
    </style:style>
    <style:style style:name="T1199" style:family="text">
      <style:text-properties officeooo:rsid="21ab953c"/>
    </style:style>
    <style:style style:name="T1200" style:family="text">
      <style:text-properties officeooo:rsid="09d6f537"/>
    </style:style>
    <style:style style:name="T1201" style:family="text">
      <style:text-properties officeooo:rsid="4c8fe42a"/>
    </style:style>
    <style:style style:name="T1202" style:family="text">
      <style:text-properties officeooo:rsid="001a1e2e"/>
    </style:style>
    <style:style style:name="T1203" style:family="text">
      <style:text-properties officeooo:rsid="491812e3"/>
    </style:style>
    <style:style style:name="T1204" style:family="text">
      <style:text-properties officeooo:rsid="49315836"/>
    </style:style>
    <style:style style:name="T1205" style:family="text">
      <style:text-properties officeooo:rsid="49325014"/>
    </style:style>
    <style:style style:name="T1206" style:family="text">
      <style:text-properties officeooo:rsid="4b50ff76"/>
    </style:style>
    <style:style style:name="T1207" style:family="text">
      <style:text-properties officeooo:rsid="49580888"/>
    </style:style>
    <style:style style:name="T1208" style:family="text">
      <style:text-properties officeooo:rsid="491717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text:span text:style-name="T1">8.3.- </text:span><text:span text:style-name="T139">The natural origin of the deeper </text:span><text:span text:style-name="T14">patterns on my solutions.</text:span></text:p>
      <text:p text:style-name="P258"/>
      <text:p text:style-name="P39">A<text:span text:style-name="T140">s</text:span> you might have seen, there is a patter<text:span text:style-name="T141">n</text:span> through all these <text:span text:style-name="T141">dilemmas: the power dynamics one and the resource distribution one.</text:span></text:p>
      <text:p text:style-name="P39"/>
      <text:p text:style-name="P42">While recording one of the first classes <text:span text:style-name="T142">about resource distribution</text:span> as a side project to this book, when trying to argue against socialism, I realized I was wrong. There was, somehow a deeper truth to unveil. At that same moment, it is all recorded in camera and on Youtube, I figure<text:span text:style-name="T143">d</text:span> out the intuitive explanation on the graph theory approach to understand the existence of a State and I thought… wait this all looks too similar. And then, after the video, the questions about private <text:span text:style-name="T144">corporations</text:span> also being a hierarchy yet functioning for lots of people struck and realized one of my main <text:span text:style-name="T145">argument</text:span><text:span text:style-name="T143">s</text:span> against socialism was just demolished.</text:p>
      <text:p text:style-name="P42"/>
      <text:p text:style-name="P43">Due to life reasons, I had “stuff to do” and delayed the writing. This was fortunate because during this delay I read Robert Michel’s book on how large human organizations with democratic values eventually fall into oligarchies. <text:span text:style-name="T146">I loved the book, and I realized that, it felt really similar to my thoughts explained above this paragraph.</text:span></text:p>
      <text:p text:style-name="P43"/>
      <text:p text:style-name="P3">This books was written 113 years ago, as of when I’m writing this line for the first time: 30<text:span text:style-name="T147">th</text:span> of December 2025. <text:span text:style-name="T148">Yet still, all said felt as if it was written today, the arguments between people, the dynamics etc etc Robert not only analyzed the social group of his time but also realized similar mechanics appeared through history. </text:span><text:span text:style-name="T134">This was fascinating to me, there has to be some “truth” in these patterns, and they feel too similar to what I’m thinking.</text:span></text:p>
      <text:p text:style-name="P3"/>
      <text:p text:style-name="P3"><text:span text:style-name="T134">Therefore, I kept thinking, </text:span><text:span text:style-name="T135">thinking like an engineer. </text:span><text:span text:style-name="T136">Here are the conclusions I’ve arrived to </text:span><text:span text:style-name="T137">after all this time </text:span><text:span text:style-name="T138">of thinking and reading about </text:span><text:span text:style-name="T136">human organizations.</text:span></text:p>
      <text:p text:style-name="P3"/>
      <text:p text:style-name="P243">8.3<text:span text:style-name="T1">.1.- <text:s/></text:span><text:span text:style-name="T13">The general </text:span>way <text:span text:style-name="T14">of</text:span> understand<text:span text:style-name="T14">ing</text:span><text:span text:style-name="T13"> hu</text:span><text:span text:style-name="T2">man organizatio</text:span><text:span text:style-name="T3">n</text:span><text:span text:style-name="T2">s.</text:span></text:p>
      <text:p text:style-name="P1"/>
      <text:p text:style-name="P2"><text:span text:style-name="T15">The foundations for thinking about the general case are mainly those </text:span>explained on <text:span text:style-name="T15">part </text:span><text:span text:style-name="T17">4.1.2.1.- A graph theory understanding on the complexity of anarchism.</text:span></text:p>
      <text:p text:style-name="P3"/>
      <text:p text:style-name="P4">The base principle is that as a society grows by an individual at a time, the complexity of the society, understood as amounts of relations to understand per citizen, grows faster <text:span text:style-name="T59">than a unit a</text:span><text:span text:style-name="T60">t a</text:span><text:span text:style-name="T59"> time</text:span>. <text:span text:style-name="T61">This, c</text:span><text:span text:style-name="T62">ombine</text:span><text:span text:style-name="T61">d</text:span><text:span text:style-name="T62"> that with the principle of the limited cognitive capabilities of our biological brain and our inability to enhance it or alter it in complex enough ways, </text:span><text:span text:style-name="T61">creates the need for hierarchical societies.</text:span></text:p>
      <text:p text:style-name="P4"/>
      <text:p text:style-name="P5">Recalling from the other section, a society can be simply understood as a complete graph:</text:p>
      <text:p text:style-name="P5"/>
      <text:p text:style-name="P5"><draw:frame draw:style-name="fr1" draw:name="Image23" text:anchor-type="char" svg:x="1.8083in" svg:y="0in" svg:width="2.6807in" svg:height="2.6693in" draw:z-index="0"><draw:image xlink:href="Pictures/10000001000001DA000001D826270E40ABCE11B1.png" xlink:type="simple" xlink:show="embed" xlink:actuate="onLoad" draw:mime-type="image/png"/></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Yet when the limit of human cognition is reached, this graph becomes what in graph theory we call a tree, <text:span text:style-name="T63">which </text:span><text:span text:style-name="T64">its shape </text:span><text:span text:style-name="T63">should look familiar to as a hie</text:span><text:span text:style-name="T4">rarch</text:span><text:span text:style-name="T5">y</text:span><text:span text:style-name="T1">:</text:span></text:p>
      <text:p text:style-name="P3"/>
      <text:p text:style-name="P3"><draw:frame draw:style-name="fr3" draw:name="Image24" text:anchor-type="char" svg:width="2.7492in" svg:height="1.7138in" draw:z-index="1"><draw:image xlink:href="Pictures/10000001000003A900000248200C373DDA7DFD1C.png" xlink:type="simple" xlink:show="embed" xlink:actuate="onLoad" draw:mime-type="image/png"/></draw:frame><text:soft-page-break/></text:p>
      <text:p text:style-name="P3"/>
      <text:p text:style-name="P7"/>
      <text:p text:style-name="P7"/>
      <text:p text:style-name="P7"/>
      <text:p text:style-name="P7"/>
      <text:p text:style-name="P7"/>
      <text:p text:style-name="P7"/>
      <text:p text:style-name="P7"/>
      <text:p text:style-name="P7"/>
      <text:p text:style-name="P7"/>
      <text:p text:style-name="P7">It is called a tree because it <text:span text:style-name="T65">visually can be interpreted as </text:span><text:span text:style-name="T66">an upside down tree. </text:span><text:span text:style-name="T67">Where the nodes (people in this case), at the bottom of the hierarchy are the “leafs” and the one at the top is the “root”:</text:span></text:p>
      <text:p text:style-name="P7"><draw:frame draw:style-name="fr3" draw:name="Image26" text:anchor-type="char" svg:width="3.65in" svg:height="2.3902in" draw:z-index="2"><draw:image xlink:href="Pictures/1000000100000331000002177A1969E20049E395.png" xlink:type="simple" xlink:show="embed" xlink:actuate="onLoad" draw:mime-type="image/png"/></draw:frame></text:p>
      <text:p text:style-name="P2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n reality, this is more complex, as the leafs of the tree (the people at <text:span text:style-name="T68">the bottom</text:span>) <text:span text:style-name="T69">can</text:span><text:span text:style-name="T68"> have relations to each other, so it </text:span><text:span text:style-name="T70">might</text:span><text:span text:style-name="T68"> look like:</text:span></text:p>
      <text:p text:style-name="P7"/>
      <text:p text:style-name="P222"><draw:frame draw:style-name="fr4" draw:name="Image25" text:anchor-type="char" svg:width="6.6929in" svg:height="2.2252in" draw:z-index="3"><draw:image xlink:href="Pictures/100000010000060A00000202A99732DE2CE8FB07.png" xlink:type="simple" xlink:show="embed" xlink:actuate="onLoad" draw:mime-type="image/png"/></draw:frame></text:p>
      <text:p text:style-name="P8">I hope you are slowly getting comfortable on thinking about organizations this way, if you are a software engineer this might be boring to you, please keep in mind I’m trying to make anyone be able to understand this book.</text:p>
      <text:p text:style-name="P8"/>
      <text:p text:style-name="P9">Let’s continue adding layers of complexity to our visualizations to fully reflect reality.</text:p>
      <text:p text:style-name="P9"/>
      <text:p text:style-name="P10">So, in reality, a society does not need to be a complete graph. In small villages or tribes, indeed everyone has some sort of relation to each other <text:span text:style-name="T71">and that forms a complete graph</text:span>, but for example, in a city, <text:span text:style-name="T72">it doesn’t</text:span>. <text:span text:style-name="T73">Imagine the “city” has only 5 citizens, the graph </text:span><text:span text:style-name="T74">can</text:span><text:span text:style-name="T73"> look something like</text:span>:</text:p>
      <text:p text:style-name="P10"/>
      <text:p text:style-name="P10"><draw:frame draw:style-name="fr3" draw:name="Image27" text:anchor-type="char" svg:width="3in" svg:height="2.6228in" draw:z-index="4"><draw:image xlink:href="Pictures/100000010000034C000002E216A777335FCEBC0C.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1">But as said, a city is too complex for a single citizen not to feel stressed, <text:span text:style-name="T75">and to </text:span>feel things as predictable, <text:span text:style-name="T76">as </text:span>familiar enough so to not need<text:span text:style-name="T76">ing </text:span>a hierarchy. <text:span text:style-name="T77">So a real city looks more like:</text:span></text:p>
      <text:p text:style-name="P11"/>
      <text:p text:style-name="P11"><draw:frame draw:style-name="fr4" draw:name="Image28" text:anchor-type="char" svg:width="6.6929in" svg:height="5.6516in" draw:z-index="6"><draw:image xlink:href="Pictures/100000010000034A000002C75D09D855509DCC89.png" xlink:type="simple" xlink:show="embed" xlink:actuate="onLoad" draw:mime-type="image/png"/></draw:frame></text:p>
      <text:p text:style-name="P11"/>
      <text:p text:style-name="P12">As you can see, this is a way more complex graph. <text:span text:style-name="T78">This though, represents better what a society truly looks like.</text:span></text:p>
      <text:p text:style-name="P12"/>
      <text:p text:style-name="P13">Lots of individuals that know each other to some extent <text:span text:style-name="T79">and which coordinate with each other via the formation of groups, which, if big enough, become a hierarchy.</text:span></text:p>
      <text:p text:style-name="P13"><text:soft-page-break/></text:p>
      <text:p text:style-name="P14">We can observe in our simple society that we have 3 main groups (the different colors). <text:span text:style-name="T80">Let’s note some interesting natural dynamics that can happen in this society.</text:span></text:p>
      <text:p text:style-name="P14"/>
      <text:p text:style-name="P15">Note that, the sports player group is not hierarchic, as it is a complete graph. The amount of people who play that sport and the complexity of that sport <text:span text:style-name="T81">are</text:span> not that big so <text:span text:style-name="T82">as for</text:span> the people in that group (or community if you like) <text:span text:style-name="T82">to</text:span> need a hierarchic organization. <text:span text:style-name="T83">However, </text:span><text:span text:style-name="T84">coordinating </text:span><text:span text:style-name="T83">the garbage collection system, even if they are less people, </text:span><text:span text:style-name="T84">can be</text:span><text:span text:style-name="T83"> such a complex task that does require hierarchy, </text:span><text:span text:style-name="T85">like the town hall</text:span><text:span text:style-name="T83">. </text:span><text:span text:style-name="T86">As we have seen, this means the variable</text:span><text:span text:style-name="T87">s</text:span><text:span text:style-name="T86"> that needed to be handled per individual carrying out the action grew too large.</text:span></text:p>
      <text:p text:style-name="P15"/>
      <text:p text:style-name="P16"><text:span text:style-name="T88">Now</text:span>, as you might see, there is another sport player that works as a garbage collector. This showcases the existence of hobbies alongside main occupancies to make money (jobs) in a society. <text:span text:style-name="T89">This also showcases how groups are a dynamic and interconnected thing. Not isolated islands.</text:span> And we can also observe that the sport’s group might grow <text:span text:style-name="T90">in </text:span>the future <text:span text:style-name="T91">if the employer convinces the manager to hang out with him after work to try out the sport and he eventually likes it</text:span>. <text:span text:style-name="T92">This fluidity of the groups is what leads to spies and other kind of phenomena </text:span><text:span text:style-name="T93">in real life </text:span><text:span text:style-name="T92">you might be familiar with.</text:span></text:p>
      <text:p text:style-name="P16"/>
      <text:p text:style-name="P17">As the sport’s group grows, the complexity will do so and it will eventually take a hierarchic shape. Possibly even becoming 2 distinct groups, 2 sport teams. <text:span text:style-name="T94">Possibly requiring now a central coordinator to set the general rules in case these 2 groups want to play against each other in a tournament. Coming back again to a hierarchic structure:</text:span></text:p>
      <text:p text:style-name="P17"/>
      <text:p text:style-name="P17"><draw:frame draw:style-name="fr3" draw:name="Image29" text:anchor-type="char" svg:width="4.5035in" svg:height="3.2445in" draw:z-index="5"><draw:image xlink:href="Pictures/100000010000045C0000032497B88218710C9C73.png" xlink:type="simple" xlink:show="embed" xlink:actuate="onLoad" draw:mime-type="image/png"/></draw:frame></text:p>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As you can see, the natural flow of things in this still small but complex society happened to create a council with 2 elderly citizens (very experienced players on their youth) which happened to know people from each team, therefore both teams trust their knowledge and their friendship so they actually become impartial and generate good rules for exciting competition<text:span text:style-name="T95">s</text:span>.</text:p>
      <text:p text:style-name="P18"/>
      <text:p text:style-name="P19"><text:span text:style-name="T96">Highlighted in</text:span> blue <text:span text:style-name="T97">lines </text:span>you will find the meta-hierarchy, the new hierarchy formed, the sports federation, <text:span text:style-name="T98">the sports institution</text:span>. On black you will see all the connections between the people, who personally knows who.</text:p>
      <text:p text:style-name="P19"/>
      <text:p text:style-name="P20">We can learn something really natural about this example. When needing to solve complex organizational problems on a society, people tend to find a “leader” or “organizer”, on someone who has expertise and who they actually like, therefore trust, <text:span text:style-name="T99">therefore it does not stress them giving them organizational power as they are friendly and therefore predictable, which reduces stress and generates trust.</text:span></text:p>
      <text:p text:style-name="P20"/>
      <text:p text:style-name="P21"><text:soft-page-break/>Coming back to the first complex image, we also see that groups are not isolated as its members are not. At the group level though, it can happen that the town hall does control to some extent the garbage collection group but has no influence o<text:span text:style-name="T100">n</text:span> the sport group. Yet, because they all live together in a physical space, they all can know each other regardless of the groups they belong to.</text:p>
      <text:p text:style-name="P21"/>
      <text:p text:style-name="P22">Each person, as per their personalities, desires, and “desires <text:span text:style-name="T101">and</text:span> needs” of their own group will behave in some way or another, it will vote or follow some rule and maybe not another one. <text:span text:style-name="T101">Sport team will enjoy the construction of a new stadium, whereas part of the garbage collection team might not care at all, sure, the one </text:span><text:span text:style-name="T102">who </text:span><text:span text:style-name="T101">we can see </text:span><text:span text:style-name="T102">that </text:span><text:span text:style-name="T101">also plays sport will like it.</text:span></text:p>
      <text:p text:style-name="P22"/>
      <text:p text:style-name="P23">But what if the money is limited and we have to chose between a new stadium or raising wages to garbage collectors? Then a complex decision will be put upon this sport player who also is a garbage collector. Will he prefer its passion for sport or the ability to do more with more money? <text:span text:style-name="T103">The answer to this question is really dynamic and quasi-unpredictable as it depends on lots of factors. We can see in the graph </text:span><text:span text:style-name="T104">that there </text:span><text:span text:style-name="T103">at least 5 relationships influencing this </text:span><text:span text:style-name="T104">(the other sport players)</text:span><text:span text:style-name="T103">, 1 desire of playing the sport better, 1 desire more of earning more, 1 desire more of not being fired from the garbage collection organization if he votes against </text:span><text:span text:style-name="T105">the wage increase…</text:span></text:p>
      <text:p text:style-name="P23"/>
      <text:p text:style-name="P24">If for whatever reason he decides to go against the salary increase, the manager on its own <text:span text:style-name="T106">(dictatorship-like)</text:span>, or in an internal voting of the group <text:span text:style-name="T106">(democracy-like)</text:span>, might opt to kick him out. <text:span text:style-name="T106">Here we observe that the formation and destruction of groups is dynamic not only at a personal level like with the example of the worker inviting the boss to play the sport, but also at a internal level from withing the group. </text:span><text:span text:style-name="T107">Adding way more layers of complexity to the matter.</text:span></text:p>
      <text:p text:style-name="P23"/>
      <text:p text:style-name="P25">Let’s now notice another dynamic, Antonio from the sport team knows the major, a powerful figure. Therefore, if the sports grows too much and ever has to decide a leader, Antonio might be more likely to become it because he has a greater influence in other important groups.</text:p>
      <text:p text:style-name="P26"/>
      <text:p text:style-name="P27">This explanation of the dynamic is <text:span text:style-name="T108">slightly </text:span>messy on purpose, so you can feel the complexity and difficulty of thinking about each of them logically with all possible combinations.</text:p>
      <text:p text:style-name="P27"/>
      <text:p text:style-name="P26">Societies are in fact way more complex than this, religious groups, bureaucracy groups, other thousand more jobs groups, each with different needs to carry out their job, endless friendship groups that are born and die, family groups, sexual groups, hobbies groups etc etc </text:p>
      <text:p text:style-name="P26"/>
      <text:p text:style-name="P26">However, <text:span text:style-name="T109">there are </text:span>dynamics <text:span text:style-name="T109">that </text:span>appear over and over again. <text:span text:style-name="T110">Like the one Robert observed:</text:span></text:p>
      <text:p text:style-name="P3"/>
      <text:p text:style-name="P225">- There is something about large human organizations that is inherently, naturally, hierarchical. -</text:p>
      <text:p text:style-name="P225"/>
      <text:p text:style-name="P28">Then inside those organizations, different dynamics arise which tend to consolidate on the formation of an oligarchy so the group does not disappear and can keep functioning.</text:p>
      <text:p text:style-name="P28"/>
      <text:p text:style-name="P28">Sometimes, the thing to do so the groups grows or does not vanishes are contradictory with the things its members are meant to do. <text:span text:style-name="T111">Making it feel like the group itself is a living organism, an emergent phenomena that behaves differently than the parts it is conformed by. </text:span><text:span text:style-name="T112">How can that </text:span><text:span text:style-name="T113">be? How can that </text:span><text:span text:style-name="T112">make sense?</text:span></text:p>
      <text:p text:style-name="P28"/>
      <text:p text:style-name="P29">This usually happens, as we saw, when economic incentives of members within a group differ, like for the sports player but at the same time garbage collector man. <text:span text:style-name="T114">If you analyze the system on its own, and the actors into play, you can “understand” why it happens, but just for the specific cases. </text:span><text:span text:style-name="T115">You would be understanding it “economically”.</text:span></text:p>
      <text:p text:style-name="P29"/>
      <text:p text:style-name="P29"><text:span text:style-name="T115">In the case of the voting mechanism to maybe kick out a useful worker, you would be understanding it “poli-tically”. Because economically in this case, it doe not make sense to kick a useful worker. The only way this starts to make sense if you understand the social part </text:span><text:span text:style-name="T116">of it too</text:span><text:span text:style-name="T115">, the city, the polis </text:span><text:span text:style-name="T116">(which means city I Greek)</text:span><text:span text:style-name="T115">, and the dynamics of desires, which </text:span><text:soft-page-break/><text:span text:style-name="T115">need power of action to be carried out. </text:span><text:span text:style-name="T117">In this case, you would be going down one extra layer of complexity.</text:span></text:p>
      <text:p text:style-name="P29"/>
      <text:p text:style-name="P30">But how deep can you go? How can you find the deepest “truth” that helps you reason no matter how complex the system (society) you are analyzing?</text:p>
      <text:p text:style-name="P29"/>
      <text:p text:style-name="P31"><text:span text:style-name="T117">The deepest you can go is to the </text:span>the individual and its free, natural <text:span text:style-name="T118">and unavoidable </text:span>ability to belong to multiple groups, <text:span text:style-name="T119">which its initial creation is also shaped by individual interests or needs that lead to the formation of the group.</text:span></text:p>
      <text:p text:style-name="P31"/>
      <text:p text:style-name="P32">And as we know and you know by living your own life, the desires and needs of the individuals are ever changing <text:span text:style-name="T120">influenced by oneself but also the environment and beings around</text:span>. The fundamental reason for this is adaptation and survival. The boredom or the hunger reactions that leads us to explore so we better adapt or jut keep existing.</text:p>
      <text:p text:style-name="P32"/>
      <text:p text:style-name="P33">The social dimension is needed because we can not survive without others, and the individual desire is born as a way to move us to find others in case we are completely alone and so to create a slight extra randomness to promote adaptiveness to our also “randomly” (unpredictably given enough time) changing environment.</text:p>
      <text:p text:style-name="P32"/>
      <text:p text:style-name="P34"><text:span text:style-name="T121">Hierarchic organizations are a </text:span>a logical deduction <text:span text:style-name="T121">from </text:span>the way living beings keep being what we call alive. <text:span text:style-name="T122">Creating order from disorder. Creating predictability from unpredictability. </text:span><text:span text:style-name="T123">That is what living beings do.</text:span></text:p>
      <text:p text:style-name="P34"/>
      <text:p text:style-name="P35">Therefore it even makes sense <text:span text:style-name="T124">the “emergent phenomena”</text:span> <text:span text:style-name="T124">of</text:span> these patterns <text:span text:style-name="T125">also </text:span><text:span text:style-name="T124">applying</text:span> when groups, organizations, start to feel like they are alive on its own, independently from some of its members.</text:p>
      <text:p text:style-name="P35"/>
      <text:p text:style-name="P36">Just as an individual use the fixed-variable resolution technique and defines temporary “truths” we might call beliefs, organizations parallel <text:span text:style-name="T126">and execute</text:span> this behavior <text:span text:style-name="T126">and higher levels </text:span>by creating laws, rules.</text:p>
      <text:p text:style-name="P36"/>
      <text:p text:style-name="P37"><text:span text:style-name="T127">Because</text:span> all these observations, I think it is correct and useful to aim for a great societal organization shaping its rules and dynamics based on individual or small groups dynamic principles. <text:span text:style-name="T128">Like I’ve been doing all along the book.</text:span></text:p>
      <text:p text:style-name="P35"/>
      <text:p text:style-name="P38">By the way, doesn’t the graph I drew on the complex society look to you like biological cells? Doesn’t it look like amoebas merging when the sports player is also a garbage collector mixing the groups? <text:span text:style-name="T129">Fascinating.</text:span></text:p>
      <text:p text:style-name="P39"/>
      <text:p text:style-name="P39"><text:span text:style-name="T1">While writi</text:span>ng this book and when I while I was reading Robert Michels book,</text:p>
      <text:p text:style-name="P39"/>
      <text:p text:style-name="P81"><text:span text:style-name="T1">We can have </text:span>a deeper analysis <text:span text:style-name="T130">on the third factor</text:span>, is the violence of neighbors also a natural tendency due to its size also being big? <text:span text:style-name="T130">Is violence a sign of societies who grew too large for their intellect? Most likely, as of my </text:span><text:span text:style-name="T131">current </text:span><text:span text:style-name="T130">thoughts.</text:span></text:p>
      <text:p text:style-name="P81"/>
      <text:p text:style-name="P82"><text:span text:style-name="T1">Migh</text:span>t here reside an intuitive understanding to the statement from Robert Michels, rephrased a bit: “There were there is organization, there is an oligarchy.”?</text:p>
      <text:p text:style-name="P81"/>
      <text:p text:style-name="P83"><text:span text:style-name="T1">Very int</text:span>eresting <text:span text:style-name="T132">and more curious </text:span>questions can be asked from here: Could anarchism be possible if we manage to create smaller societies? Is this the path to an assured world peace? <text:span text:style-name="T133">Can technological advancements in information processing increase the threshold from which anarchism starts being impossible, therefore, can we create big anarchist societies through technological advancements in information processing capabilities?</text:span></text:p>
      <text:p text:style-name="P83"/>
      <text:p text:style-name="P40"><text:span text:style-name="T1">What sho</text:span>uld we do in our reality where anarchism is not possible? Sure, if we can not fly we should not just jump out of planes. If we can not be anarchist for now, should we then not vote or promote anarchist-like behavior?</text:p>
      <text:p text:style-name="P81"/>
      <text:p text:style-name="P244"><text:span text:style-name="T1">8.3.2.- The</text:span> most fundamental argumentation in favor of democratic organizations.</text:p>
      <text:p text:style-name="P81"/>
      <text:p text:style-name="P41"><text:soft-page-break/>The realization on how and why societal structures parallel living beings unlocks new strong arguments in favor of decentralized and dynamic systems.</text:p>
      <text:p text:style-name="P41"/>
      <text:p text:style-name="P44">We can now confidently observe and understand simple yet thriving organisms so to get inspiration on their mechanics to better shape our institutions. Let’s take one of the longest living beings which also happen to be the simplest: the cell.</text:p>
      <text:p text:style-name="P44"/>
      <text:p text:style-name="P44"/>
      <text:p text:style-name="P44"/>
      <text:p text:style-name="P44"/>
      <text:p text:style-name="P45">TO THINK:</text:p>
      <text:p text:style-name="P245">Maybe make this sections marked as incomplete and complete them when the idea of feedback loops is propely defied???<text:span text:style-name="T149">Feedback loops and error correcting codes, physical (social), unavoidable noise that deters integrity of information (abusive traits, envy etc </text:span><text:span text:style-name="T150">and personal non-subjective limitations</text:span><text:span text:style-name="T149">)</text:span></text:p>
      <text:p text:style-name="P245"/>
      <text:p text:style-name="P84"/>
      <text:p text:style-name="P259"><text:bookmark-start text:name="5.1.0.1.-Critique to libertarianism"/>5.2.2.<text:span text:style-name="T151">4</text:span>.- A <text:span text:style-name="T152">naive </text:span>critique to libertarianis<text:span text:style-name="T153">m</text:span>.<text:bookmark-end text:name="5.1.0.1.-Critique to libertarianism"/></text:p>
      <text:p text:style-name="P85"/>
      <text:p text:style-name="P86">Now coming back to where we left the previous section.</text:p>
      <text:p text:style-name="P86"/>
      <text:p text:style-name="P87"><text:span text:style-name="T154">L</text:span>ibertarianism <text:span text:style-name="T155">is not perfect, </text:span><text:span text:style-name="T156">essentially</text:span><text:span text:style-name="T157"> because free people can still </text:span><text:span text:style-name="T158">take</text:span><text:span text:style-name="T157"> bad decisions.</text:span><text:span text:style-name="T155"> </text:span><text:span text:style-name="T157">So it </text:span>can <text:span text:style-name="T159">also </text:span>lead <text:span text:style-name="T160">to </text:span>inefficiencies. <text:span text:style-name="T161">Decrease the </text:span><text:span text:style-name="T162">citizen’s </text:span><text:span text:style-name="T161">intelligence factors’ </text:span><text:span text:style-name="T163">value</text:span><text:span text:style-name="T164">s</text:span><text:span text:style-name="T161"> on the equation </text:span><text:span text:style-name="T165">from </text:span><text:span text:style-name="T166">before</text:span><text:span text:style-name="T161"> </text:span><text:span text:style-name="T167">to </text:span><text:span text:style-name="T161">see </text:span><text:span text:style-name="T168">that the equation also </text:span><text:span text:style-name="T169">mimics </text:span><text:span text:style-name="T168">this mechanic</text:span><text:span text:style-name="T161">.</text:span></text:p>
      <text:p text:style-name="P87"/>
      <text:p text:style-name="P216"><text:span text:style-name="T170">B</text:span>ut socialism and communism <text:span text:style-name="T171">nowada</text:span><text:span text:style-name="T172">y</text:span><text:span text:style-name="T171">s </text:span><text:span text:style-name="T173">have</text:span> guaranteed incredibly obvious inefficienc<text:span text:style-name="T173">ies</text:span><text:span text:style-name="T171">.</text:span><text:span text:style-name="T173"> </text:span><text:span text:style-name="T174">Sure there are lots of factors coming into play, and it might not be the fault of the </text:span><text:span text:style-name="T175">resource distribution</text:span><text:span text:style-name="T174"> protocol, but at this point after years and years of history, just by taking an empiric, data analytic approach, we can conclude </text:span><text:span text:style-name="T176">in a no</text:span><text:span text:style-name="T177">t that </text:span><text:span text:style-name="T176">crazy way </text:span><text:span text:style-name="T174">that these centralized protocols are just worse </text:span><text:span text:style-name="T178">in our current era</text:span><text:span text:style-name="T174">.</text:span></text:p>
      <text:p text:style-name="P87"/>
      <text:p text:style-name="P88">However, it is not useful to throw an apple thousands of times and see that it does fall. It is useful to understand why it falls, or at least, exactly how it falls, <text:span text:style-name="T179">or</text:span> where it will fall. <text:span text:style-name="T179">Therefore, a complete rejection and/</text:span><text:span text:style-name="T180">or</text:span><text:span text:style-name="T179"> censorship o</text:span><text:span text:style-name="T180">f</text:span><text:span text:style-name="T179"> the inefficient protocols is the least scientific approach you can have, the leas</text:span><text:span text:style-name="T180">t</text:span><text:span text:style-name="T179"> adaptive approach.</text:span></text:p>
      <text:p text:style-name="P88"/>
      <text:p text:style-name="P89">As it should feel familiar by now, all protocols human invent are not appearing out of the blue, they are based on our nature <text:span text:style-name="T181">and experiences</text:span>, on who we actually are, and neglecting part of them would be neglecting the understanding o<text:span text:style-name="T181">f</text:span> a part of ourselves. And as seen, a one-eyed approach is just not the most effective way of solving problems, we would likely be fixing way more variables than needed.</text:p>
      <text:p text:style-name="P89"/>
      <text:p text:style-name="P89">If we want to reach an utopia we must understand the basics, their mechanics and relations and not blindly follow forever a protocol or blindly ignore forever other despite of their repeated inefficiencies.</text:p>
      <text:p text:style-name="P89"/>
      <text:p text:style-name="P89">My father always told me: “Hasta el más tonto te puede enseñar algo.” (“Even the dumbest <text:span text:style-name="T182">person</text:span> can teach you something.”). That phrase encapsulates <text:span text:style-name="T183">fairly </text:span>well what I’m trying to explain <text:span text:style-name="T182">in </text:span>these paragraphs. <text:span text:style-name="T184">I will clarify</text:span><text:span text:style-name="T185"> that with this statement I’m not calling any protocol dumb. As we will see later, there are more factors than dumbness that come into play when taking conclusions of this nature.</text:span></text:p>
      <text:p text:style-name="P89"/>
      <text:p text:style-name="P90">For the sake of critical thinking, even if I’m a human with libertarian tendencies as you can read so far, I will explicitly leave here a section criticizing it, even though I think it is a great part o<text:span text:style-name="T186">f</text:span> how <text:span text:style-name="T186">a brighter </text:span>future <text:span text:style-name="T186">can </text:span>look like.</text:p>
      <text:p text:style-name="P91"/>
      <text:p text:style-name="P84"><text:span text:style-name="T187">I see a possible reality, in </text:span><text:span text:style-name="T188">decades </text:span><text:span text:style-name="T189">or a century</text:span><text:span text:style-name="T188">, </text:span><text:span text:style-name="T190">where</text:span><text:span text:style-name="T187"> humans live in </text:span><text:span text:style-name="T191">libertarian </text:span><text:span text:style-name="T187">societies </text:span><text:span text:style-name="T192">where </text:span><text:span text:style-name="T187">they take decisions with the aid of AI and communicat</text:span><text:span text:style-name="T191">e</text:span><text:span text:style-name="T187"> with their neighbors </text:span><text:span text:style-name="T193">more </text:span><text:span text:style-name="T187">peacefully </text:span><text:span text:style-name="T194">and transparently </text:span><text:span text:style-name="T195">using </text:span><text:span text:style-name="T187">trustless </text:span><text:span text:style-name="T196">CDNs</text:span><text:span text:style-name="T187"> technology. </text:span><text:span text:style-name="T192">Leveraging these decentralized </text:span><text:span text:style-name="T197">or</text:span><text:span text:style-name="T198"> trust-minimized </text:span><text:span text:style-name="T187">databases </text:span><text:span text:style-name="T199">to minimize betrayal </text:span><text:span text:style-name="T200">and corruption</text:span><text:span text:style-name="T187">.</text:span></text:p>
      <text:p text:style-name="P217"><text:soft-page-break/></text:p>
      <text:p text:style-name="P92">But before elaborating further on how these technologies <text:span text:style-name="T201">impact</text:span> <text:span text:style-name="T201">resource distribution, </text:span>let me critique libertarianism a little bit.</text:p>
      <text:p text:style-name="P85"/>
      <text:p text:style-name="P93"><text:span text:style-name="T203">T</text:span><text:span text:style-name="T202">his section will be an exception. I will use libertarianism as per its current </text:span><text:span text:style-name="T204">perceived </text:span><text:span text:style-name="T202">social meaning. Not purely as the definition I gave at the beginning of the chapter.</text:span></text:p>
      <text:p text:style-name="P93"/>
      <text:p text:style-name="P94"><text:span text:style-name="T203">I'm an advocate for </text:span><text:span text:style-name="T205">libertarianism</text:span><text:span text:style-name="T203">, but I acknowledge its imperfections. It operates on the </text:span><text:span text:style-name="T206">hope</text:span><text:span text:style-name="T203"> tha</text:span><text:span text:style-name="T312">t individuals will act wisely when shaping their li</text:span><text:span text:style-name="T313">f</text:span><text:span text:style-name="T312">e's path, which isn't always the case. Hence, I believe there should be a socialist touch </text:span><text:span text:style-name="T314">when</text:span><text:span text:style-name="T312"> educat</text:span><text:span text:style-name="T314">ing </text:span><text:span text:style-name="T312">people, </text:span><text:span text:style-name="T315">w</text:span><text:span text:style-name="T314">hether in public school or in the family household, </text:span><text:span text:style-name="T312">about the importance of considering others and the medium to long-term consequences of </text:span><text:span text:style-name="T316">your</text:span><text:span text:style-name="T312"> actions </text:span><text:span text:style-name="T317">in them.</text:span></text:p>
      <text:p text:style-name="P95"/>
      <text:p text:style-name="P95"><text:span text:style-name="T318">It is true that libertarianism already considers </text:span><text:span text:style-name="T319">others </text:span><text:span text:style-name="T320">in its discourse</text:span><text:span text:style-name="T318">, I just want to emphasize that, in my opinion, </text:span><text:span text:style-name="T321">it clearly</text:span><text:span text:style-name="T318"> require</text:span><text:span text:style-name="T321">s</text:span><text:span text:style-name="T318"> a </text:span><text:span text:style-name="T322">greater </text:span><text:span text:style-name="T318">highlight </text:span><text:span text:style-name="T322">with a clearer </text:span><text:span text:style-name="T323">definition</text:span><text:span text:style-name="T318">.</text:span></text:p>
      <text:p text:style-name="P95"/>
      <text:p text:style-name="P96">The problem with libertarianism is that, spoiler, it is actually <text:span text:style-name="T324">very</text:span><text:span text:style-name="T325"> similar to</text:span> socialism <text:span text:style-name="T326">a</text:span>nd <text:span text:style-name="T326">it has been </text:span>brand<text:span text:style-name="T326">ed in modern times </text:span>as something fundamentally different. <text:span text:style-name="T327">Both are protocols that require a </text:span><text:span text:style-name="T328">S</text:span><text:span text:style-name="T327">tate and some public resource distribution, the difference is not fundamental, it is in percentages </text:span><text:span text:style-name="T329">of public manag</text:span><text:span text:style-name="T330">ement</text:span><text:span text:style-name="T327">, </text:span><text:span text:style-name="T331">in gray areas</text:span><text:span text:style-name="T327">.</text:span></text:p>
      <text:p text:style-name="P96"/>
      <text:p text:style-name="P97">Yet people are consistently told that libertarianism is <text:span text:style-name="T332">fundamentally </text:span>different. <text:span text:style-name="T333">T</text:span>hat it is the supremacy of the individual allowing <text:span text:style-name="T334">him </text:span>to create its own life project. <text:span text:style-name="T335">This is not fundamentally different from socialism. Let me elaborate.</text:span></text:p>
      <text:p text:style-name="P96"/>
      <text:p text:style-name="P96"><text:span text:style-name="T336">Labeling </text:span><text:span text:style-name="T337">these 2 protocols as </text:span><text:span text:style-name="T336">completely different </text:span>leads <text:span text:style-name="T338">to </text:span>people justify<text:span text:style-name="T338">ing their actions</text:span> <text:span text:style-name="T338">with an ultimately authoritarian argument: you must respect the individual, me</text:span>. <text:span text:style-name="T339">Which, if delved deeper into libertarianism you realize it is not exactly like that, but in our simplification lead society people eventually think like that and </text:span><text:span text:style-name="T340">it </text:span><text:span text:style-name="T339">become</text:span><text:span text:style-name="T340">s</text:span><text:span text:style-name="T339"> problematic.</text:span></text:p>
      <text:p text:style-name="P96"/>
      <text:p text:style-name="P98">My critique to libertarianism is that it needs a re-branding, it needs to be explained with a socialist touch, because that is ultimately what it is, “<text:span text:style-name="T341">a softer socialism”</text:span>. <text:span text:style-name="T341">Correctly speaking, the softest statism.</text:span> <text:span text:style-name="T342">Let me </text:span><text:span text:style-name="T343">keep </text:span><text:span text:style-name="T344">elaborat</text:span><text:span text:style-name="T343">ing</text:span><text:span text:style-name="T342">.</text:span></text:p>
      <text:p text:style-name="P95"/>
      <text:p text:style-name="P99">Libertarianism says that you, the individual, are the supreme leader of your life and everyone should respect your life project and ambitions, <text:span text:style-name="T345">yet ju</text:span><text:span text:style-name="T346">st</text:span> as long as they don’t cause damage to other people’s life projects.</text:p>
      <text:p text:style-name="P99"/>
      <text:p text:style-name="P100">Sounds good right? Well this is <text:span text:style-name="T347">actually</text:span> <text:span text:style-name="T348">useless </text:span><text:span text:style-name="T349">even though </text:span><text:span text:style-name="T350">it is </text:span><text:span text:style-name="T349">a true sentence. </text:span><text:span text:style-name="T351">I</text:span><text:span text:style-name="T349">t is like saying: Apples are </text:span><text:span text:style-name="T352">blue </text:span><text:span text:style-name="T349">as long as </text:span><text:span text:style-name="T330">they do not become</text:span><text:span text:style-name="T349"> </text:span><text:span text:style-name="T352">red</text:span>. <text:span text:style-name="T353">Why </text:span><text:span text:style-name="T330">this</text:span><text:span text:style-name="T353">?</text:span></text:p>
      <text:p text:style-name="P247"/>
      <text:p text:style-name="P101"><text:span text:style-name="T353">I</text:span><text:span text:style-name="T354">t</text:span> <text:span text:style-name="T355">marks </text:span>the individual as the unbreakable, impregnable unit of society. <text:span text:style-name="T356">And all action should be taken in order to respect the individual as he is the supreme leader of his life. </text:span><text:span text:style-name="T319">But, only as</text:span><text:span text:style-name="T357"> long as he is not negatively impacting other supreme leaders of their own </text:span><text:span text:style-name="T358">lives, other humans</text:span><text:span text:style-name="T356">.</text:span></text:p>
      <text:p text:style-name="P101"/>
      <text:p text:style-name="P101"><text:span text:style-name="T359">These</text:span><text:span text:style-name="T360"> negative impacts you can have in other lives are commonly known to libertarians as: negative externalities.</text:span></text:p>
      <text:p text:style-name="P101"/>
      <text:p text:style-name="P101"><text:span text:style-name="T361">But… </text:span><text:span text:style-name="T362">what</text:span><text:span text:style-name="T361"> if I got a definition of what I want that aggressively clashes with what you want, who decides who is the actual supreme leader of its </text:span><text:span text:style-name="T363">own</text:span><text:span text:style-name="T361"> life? </text:span><text:span text:style-name="T364">One </text:span><text:span text:style-name="T365">of u</text:span><text:span text:style-name="T366">s </text:span><text:span text:style-name="T364">has to get the supremacy and become the leader of its own life while the other doesn’t. </text:span><text:span text:style-name="T367">Then what? Libertarianism is true for some and false for others? Indeed.</text:span></text:p>
      <text:p text:style-name="P101"/>
      <text:p text:style-name="P102">And if you coordinate your society in a truth that only applies to some, even if they are the majority, <text:span text:style-name="T368">you will </text:span><text:span text:style-name="T369">still </text:span><text:span text:style-name="T368">for sure be acting in an inadequate way to other realities.</text:span></text:p>
      <text:p text:style-name="P102"/>
      <text:p text:style-name="P102"><text:span text:style-name="T370">Not necessarily in all situations, but eventually t</text:span><text:span text:style-name="T371">he supremacy of </text:span><text:span text:style-name="T370">one </text:span><text:span text:style-name="T371">individual </text:span><text:span text:style-name="T372">will </text:span><text:span text:style-name="T373">come </text:span><text:span text:style-name="T371">at </text:span><text:span text:style-name="T374">the</text:span><text:span text:style-name="T371"> cost of the supremacy of </text:span><text:span text:style-name="T375">ano</text:span><text:span text:style-name="T371">ther individual. </text:span><text:span text:style-name="T376">Basing </text:span><text:span text:style-name="T371">you</text:span><text:span text:style-name="T377">r</text:span><text:span text:style-name="T371"> line of action </text:span><text:span text:style-name="T378">i</text:span><text:span text:style-name="T379">n</text:span><text:span text:style-name="T371"> the freedom of the individual </text:span><text:span text:style-name="T380">is impossibl</text:span><text:span text:style-name="T381">e</text:span><text:span text:style-name="T380">. </text:span><text:span text:style-name="T381">B</text:span><text:span text:style-name="T380">ecause it is impossible </text:span><text:span text:style-name="T381">to not</text:span><text:span text:style-name="T380"> suppress any individual in a society </text:span><text:span text:style-name="T382">forever</text:span><text:span text:style-name="T380">.</text:span></text:p>
      <text:p text:style-name="P102"/>
      <text:p text:style-name="P101"><text:soft-page-break/><text:span text:style-name="T383">Y</text:span><text:span text:style-name="T384">ou can’t </text:span><text:span text:style-name="T385">always </text:span><text:span text:style-name="T384">be the supreme leader of your life if you are surrounded by others</text:span><text:span text:style-name="T386">.</text:span><text:span text:style-name="T384"> </text:span><text:span text:style-name="T387">H</text:span><text:span text:style-name="T388">umans </text:span><text:span text:style-name="T384">will never be, we have always needed and depended on each other since ancient times. It is in our nature the need </text:span><text:span text:style-name="T389">for</text:span><text:span text:style-name="T384"> </text:span><text:span text:style-name="T390">coordination with other</text:span><text:span text:style-name="T391">s</text:span><text:span text:style-name="T390">, whether t</text:span><text:span text:style-name="T392">h</text:span><text:span text:style-name="T390">rough cooperation or domination</text:span><text:span text:style-name="T393">. </text:span><text:span text:style-name="T394">T</text:span><text:span text:style-name="T384">hinking it is possible for individual</text:span><text:span text:style-name="T395">s</text:span><text:span text:style-name="T384"> to </text:span><text:span text:style-name="T396">always </text:span><text:span text:style-name="T384">be free is anti-natural and false.</text:span></text:p>
      <text:p text:style-name="P101"/>
      <text:p text:style-name="P101"><text:span text:style-name="T397">Even matter does not follow this principle. Matter can not do whatever it wants, force</text:span><text:span text:style-name="T398">s</text:span><text:span text:style-name="T397"> move its parts, </text:span><text:span text:style-name="T398">and </text:span><text:span text:style-name="T397">if they are moved against other parts, they will clash, and </text:span><text:span text:style-name="T398">then </text:span><text:span text:style-name="T397">the greater force will determine where matter goes. The simplified understanding of libertarianism from nowadays society would make people think that each force would be applied independently from one another even when they clash. And, well, it is just not like this. </text:span><text:span text:style-name="T399">People will think that the matter will move in some direction and ultimately it won’t, worsening their prediction capabilities, essential for solving problems.</text:span></text:p>
      <text:p text:style-name="P101"/>
      <text:p text:style-name="P101"><text:span text:style-name="T400">S</text:span><text:span text:style-name="T401">aying that individuals are </text:span><text:span text:style-name="T402">the </text:span><text:span text:style-name="T401">shapers of their </text:span><text:span text:style-name="T402">own</text:span><text:span text:style-name="T401"> </text:span><text:span text:style-name="T403">life-</text:span><text:span text:style-name="T401">path as long as they do not cause negative externalities</text:span><text:span text:style-name="T404"> </text:span><text:span text:style-name="T401">to others’ </text:span><text:span text:style-name="T405">path</text:span><text:span text:style-name="T406">s</text:span><text:span text:style-name="T405"> </text:span><text:span text:style-name="T401">is a</text:span><text:span text:style-name="T407">n</text:span><text:span text:style-name="T408"> always true, useless </text:span><text:span text:style-name="T401">phrase. I</text:span><text:span text:style-name="T404">t’</text:span><text:span text:style-name="T401">s like saying apples are </text:span><text:span text:style-name="T409">blue</text:span><text:span text:style-name="T401"> as long as they </text:span><text:span text:style-name="T410">do not become </text:span><text:span text:style-name="T409">red</text:span><text:span text:style-name="T401">. </text:span><text:span text:style-name="T411">It is like saying two objects </text:span><text:span text:style-name="T412">traveling </text:span><text:span text:style-name="T413">in parallel</text:span><text:span text:style-name="T412"> lines <text:s/>through </text:span><text:span text:style-name="T414">a </text:span><text:span text:style-name="T412">2D </text:span><text:span text:style-name="T415">space </text:span><text:span text:style-name="T412">will never clash </text:span><text:span text:style-name="T416">as long as they are parallel</text:span><text:span text:style-name="T412">. </text:span><text:span text:style-name="T417">Because of course a human is free until someone else appears, and of course that someone else was doing whatever he wanted until I appeared.</text:span></text:p>
      <text:p text:style-name="P101"/>
      <text:p text:style-name="P101"><text:span text:style-name="T417">“Something is always true </text:span><text:span text:style-name="T418">as long as </text:span><text:span text:style-name="T419">it </text:span><text:span text:style-name="T410">does</text:span><text:span text:style-name="T419"> </text:span><text:span text:style-name="T420">not</text:span><text:span text:style-name="T417"> </text:span><text:span text:style-name="T410">become </text:span><text:span text:style-name="T417">false”. </text:span><text:span text:style-name="T421">Logically </text:span><text:span text:style-name="T422">true, and </text:span><text:span text:style-name="T421">useless.</text:span></text:p>
      <text:p text:style-name="P103"><text:s/></text:p>
      <text:p text:style-name="P101"><text:span text:style-name="T423">W</text:span><text:span text:style-name="T356">e humans need others to survive, we inherently have a </text:span><text:span text:style-name="T424">natural </text:span><text:span text:style-name="T356">dependency on others. </text:span><text:span text:style-name="T425">B</text:span><text:span text:style-name="T356">asing all decision making </text:span><text:span text:style-name="T426">or repeatedly arguing</text:span><text:span text:style-name="T356"> that we </text:span><text:span text:style-name="T427">are the only one who decide</text:span><text:span text:style-name="T423">s</text:span><text:span text:style-name="T427"> our life-path </text:span><text:span text:style-name="T428">lead</text:span><text:span text:style-name="T429">s</text:span><text:span text:style-name="T356"> to </text:span><text:span text:style-name="T430">some </text:span><text:span text:style-name="T356">inconsistencies and </text:span><text:span text:style-name="T430">conflicts</text:span><text:span text:style-name="T356"> </text:span><text:span text:style-name="T431">in</text:span><text:span text:style-name="T356"> co</text:span><text:span text:style-name="T207">ordination.</text:span></text:p>
      <text:p text:style-name="P46"/>
      <text:p text:style-name="P101"><text:span text:style-name="T208">So no, </text:span><text:span text:style-name="T209">I do not think </text:span><text:span text:style-name="T210">relying solely on</text:span><text:span text:style-name="T208"> libertarianism </text:span><text:span text:style-name="T211">will </text:span><text:span text:style-name="T208">make this world an utopia because of </text:span><text:span text:style-name="T212">how mindlessly this </text:span><text:span text:style-name="T213">useless</text:span><text:span text:style-name="T208"> </text:span><text:span text:style-name="T214">core </text:span><text:span text:style-name="T208">phrasing </text:span><text:span text:style-name="T212">is repeated </text:span><text:span text:style-name="T215">over and over again</text:span><text:span text:style-name="T208"> </text:span><text:span text:style-name="T216">in the hope of differentiating it from socialism.</text:span></text:p>
      <text:p text:style-name="P47"/>
      <text:p text:style-name="P101"><text:span text:style-name="T217">I do not think libertarian </text:span><text:span text:style-name="T218">principles, </text:span><text:span text:style-name="T219">even though it mentions it vaguely </text:span><text:span text:style-name="T220">accepting the need for a State</text:span><text:span text:style-name="T219">,</text:span><text:span text:style-name="T218"> </text:span><text:span text:style-name="T221">ultimately </text:span><text:span text:style-name="T217">focus </text:span><text:span text:style-name="T222">properly</text:span><text:span text:style-name="T217"> on </text:span><text:span text:style-name="T221">the </text:span><text:span text:style-name="T217">real empathy </text:span><text:span text:style-name="T221">you need </text:span><text:span text:style-name="T223">to</text:span><text:span text:style-name="T221"> coordinate a society </text:span><text:span text:style-name="T223">as efficiently as possible</text:span><text:span text:style-name="T217">.</text:span></text:p>
      <text:p text:style-name="P47"/>
      <text:p text:style-name="P101"><text:span text:style-name="T224">Do what you want but if you cause negative externalities </text:span><text:span text:style-name="T225">to others</text:span><text:span text:style-name="T224"> you will be punished. </text:span><text:span text:style-name="T226">T</text:span><text:span text:style-name="T224">hen it </text:span><text:span text:style-name="T227">can’t always be </text:span><text:span text:style-name="T224">what I want. </text:span><text:span text:style-name="T226">W</text:span><text:span text:style-name="T224">ho defines what a negative externality is? The individual? </text:span><text:span text:style-name="T228">Which individual? </text:span><text:span text:style-name="T229">Y</text:span><text:span text:style-name="T228">ou? </text:span><text:span text:style-name="T229">M</text:span><text:span text:style-name="T228">e? Different things bother each of us and the clear definition of </text:span><text:span text:style-name="T230">what things are a </text:span><text:span text:style-name="T228">negative externality </text:span><text:span text:style-name="T230">will change depending on who you ask </text:span><text:span text:style-name="T231">to</text:span><text:span text:style-name="T230">.</text:span></text:p>
      <text:p text:style-name="P48"/>
      <text:p text:style-name="P104"><text:span text:style-name="T230">I</text:span><text:span text:style-name="T202">n survival related matters, most of the times, we can agree, as we all need food and water, yet, when societies thrive and happiness becomes the next goal, then a clearly subjective matter joins the chat. </text:span><text:span text:style-name="T232">Note that I did not mention security when talking of survival, security is eventually </text:span><text:span text:style-name="T233">a</text:span><text:span text:style-name="T232"> perception, therefore it has some degree of subjectivity which can lead to disagreement too.</text:span></text:p>
      <text:p text:style-name="P48"/>
      <text:p text:style-name="P105"><text:span text:style-name="T234">To agree upon this </text:span><text:span text:style-name="T235">natural subjectivity </text:span><text:span text:style-name="T236">it</text:span><text:span text:style-name="T202"> is why libertarianism defends the existence of a </text:span><text:span text:style-name="T237">S</text:span><text:span text:style-name="T202">tate, as minimal as possible, but a </text:span><text:span text:style-name="T237">S</text:span><text:span text:style-name="T202">tate. </text:span><text:span text:style-name="T238">A </text:span><text:span text:style-name="T237">S</text:span><text:span text:style-name="T238">tate that rules over the individual</text:span><text:span text:style-name="T239">s</text:span><text:span text:style-name="T238"> while at the same time govern</text:span><text:span text:style-name="T240">s</text:span><text:span text:style-name="T238"> for </text:span><text:span text:style-name="T239">them...</text:span><text:span text:style-name="T238">? That will, </text:span><text:span text:style-name="T241">unavoidably,</text:span><text:span text:style-name="T238"> be true for some and false for others.</text:span></text:p>
      <text:p text:style-name="P49"/>
      <text:p text:style-name="P105"><text:span text:style-name="T242">Libertarianism ha</text:span><text:span text:style-name="T243">s</text:span><text:span text:style-name="T242"> premises </text:span><text:span text:style-name="T244">that are </text:span><text:span text:style-name="T242">incompatible with each other, </text:span><text:span text:style-name="T245">a </text:span><text:span text:style-name="T242">minimal </text:span><text:span text:style-name="T246">S</text:span><text:span text:style-name="T242">tate next to individual freedom? </text:span><text:span text:style-name="T247">N</text:span><text:span text:style-name="T248">ext to respecting private property, freedom of association</text:span><text:span text:style-name="T245">?</text:span><text:span text:style-name="T242"> </text:span><text:span text:style-name="T245">I doesn’t</text:span><text:span text:style-name="T248"> matter </text:span><text:span text:style-name="T245">with how many words libertarianism tries to describe </text:span><text:span text:style-name="T249">the</text:span><text:span text:style-name="T245"> </text:span><text:span text:style-name="T248">freedom</text:span><text:span text:style-name="T247">s</text:span><text:span text:style-name="T248"> of action of an individual, </text:span><text:span text:style-name="T250">these won’t be real freedom</text:span><text:span text:style-name="T251">s, </text:span><text:span text:style-name="T252">in the sense of created by the individual</text:span><text:span text:style-name="T250">, the</text:span><text:span text:style-name="T253">s</text:span><text:span text:style-name="T250">e will be allowed freedoms.</text:span><text:span text:style-name="T242"> </text:span><text:span text:style-name="T250">Allowed by the </text:span><text:span text:style-name="T254">S</text:span><text:span text:style-name="T250">tate </text:span><text:span text:style-name="T255">and by society</text:span><text:span text:style-name="T250">. W</text:span><text:span text:style-name="T245">ith a</text:span><text:span text:style-name="T248"> </text:span><text:span text:style-name="T256">S</text:span><text:span text:style-name="T242">tate </text:span><text:span text:style-name="T257">freedom </text:span><text:span text:style-name="T242">will </text:span><text:span text:style-name="T258">always be </text:span><text:span text:style-name="T242">suppress</text:span><text:span text:style-name="T258">ed </text:span><text:span text:style-name="T259">to some extent</text:span><text:span text:style-name="T242">. </text:span><text:span text:style-name="T260">And </text:span><text:span text:style-name="T261">even </text:span><text:span text:style-name="T260">without it too, by </text:span><text:span text:style-name="T262">unavoidable </text:span><text:span text:style-name="T260">natural forces </text:span><text:span text:style-name="T263">and social ones</text:span><text:span text:style-name="T260">.</text:span></text:p>
      <text:p text:style-name="P50"><text:s/></text:p>
      <text:p text:style-name="P106"><text:span text:style-name="T264">I</text:span><text:span text:style-name="T202">n the same way, socialism has no fundamental difference with all said. People in the socialist protocol still have the ability to own stuff, to move and decide their path, as long as they obey the </text:span><text:span text:style-name="T265">S</text:span><text:span text:style-name="T202">tate </text:span><text:span text:style-name="T266">and do not bother neighbors too much</text:span><text:span text:style-name="T202">. </text:span><text:span text:style-name="T246">So, people under socialist societies are also the supreme leaders of their own lives as long a they do not cause negative externalities to others.</text:span></text:p>
      <text:p text:style-name="P106"><text:soft-page-break/></text:p>
      <text:p text:style-name="P107"><text:span text:style-name="T267">L</text:span><text:span text:style-name="T268">ibertar</text:span><text:span text:style-name="T269">i</text:span><text:span text:style-name="T268">anism is just the softest </text:span><text:span text:style-name="T270">of </text:span><text:span text:style-name="T264">the </text:span><text:span text:style-name="T268">sociali</text:span><text:span text:style-name="T271">sm</text:span><text:span text:style-name="T272">s</text:span><text:span text:style-name="T268">. </text:span><text:span text:style-name="T273">And not being able to </text:span><text:span text:style-name="T274">clearly </text:span><text:span text:style-name="T273">ack</text:span><text:span text:style-name="T275">n</text:span><text:span text:style-name="T273">owledge it </text:span><text:span text:style-name="T276">from the get go </text:span><text:span text:style-name="T273">is </text:span><text:span text:style-name="T277">l</text:span><text:span text:style-name="T268">ibertar</text:span><text:span text:style-name="T269">i</text:span><text:span text:style-name="T268">anism</text:span><text:span text:style-name="T278">’s </text:span><text:span text:style-name="T273">weak </text:span><text:span text:style-name="T279">spot</text:span><text:span text:style-name="T273"> </text:span><text:span text:style-name="T277">in modern times</text:span><text:span text:style-name="T273">.</text:span></text:p>
      <text:p text:style-name="P51"/>
      <text:p text:style-name="P107"><text:span text:style-name="T275">B</text:span><text:span text:style-name="T273">ecause if you mindlessly deny it </text:span><text:span text:style-name="T280">and think </text:span><text:span text:style-name="T281">it </text:span><text:span text:style-name="T280">is fundamentally different than socialism</text:span><text:span text:style-name="T273">, you are accepti</text:span><text:span text:style-name="T280">n</text:span><text:span text:style-name="T273">g the supremacy of the individual </text:span><text:span text:style-name="T282">regardless of negative externalities. You are accepting</text:span><text:span text:style-name="T273"> the impossible, the abuse over others justified on a: I’m right because I say so, </text:span><text:span text:style-name="T282">because I must be respected</text:span><text:span text:style-name="T273">. </text:span><text:span text:style-name="T283">A</text:span><text:span text:style-name="T273">nd that eventually creates conflict with others. </text:span><text:span text:style-name="T284">Likely fueled by arrogance.</text:span></text:p>
      <text:p text:style-name="P51"/>
      <text:p text:style-name="P52"><text:span text:style-name="T432">To make libertarianism really fundamentally different than socialism you have to </text:span>delet<text:span text:style-name="T432">e</text:span> the negative externalities part. Because freedom of individuals unless they bother someone else <text:span text:style-name="T433">requires a </text:span><text:span text:style-name="T434">S</text:span><text:span text:style-name="T433">tate </text:span><text:span text:style-name="T435">to control</text:span><text:span text:style-name="T433">, just like </text:span>socialism.<text:span text:style-name="T435"> </text:span><text:span text:style-name="T436">If you delete that you do not require a </text:span><text:span text:style-name="T437">S</text:span><text:span text:style-name="T436">tate and humans are truly free.</text:span></text:p>
      <text:p text:style-name="P52"/>
      <text:p text:style-name="P52"><text:span text:style-name="T436">Unfortunately, you can only</text:span> <text:span text:style-name="T436">delete </text:span><text:span text:style-name="T438">it </text:span><text:span text:style-name="T436">from the phrasing, but not </text:span><text:span text:style-name="T439">from</text:span><text:span text:style-name="T436"> reality. </text:span>We are social animals. This is the fatal mistake of libertarianism <text:span text:style-name="T440">these days.</text:span> <text:span text:style-name="T441">I like it </text:span><text:span text:style-name="T442">though</text:span><text:span text:style-name="T441">, it has a very clever </text:span><text:span text:style-name="T443">and simple</text:span><text:span text:style-name="T441"> design, but, </text:span><text:span text:style-name="T444">as far as I’ve seen so far,</text:span><text:span text:style-name="T441"> </text:span>it committed a <text:span text:style-name="T445">deep </text:span>marketing <text:span text:style-name="T444">and phrasing </text:span>mistake. <text:span text:style-name="T446">Its</text:span><text:span text:style-name="T443"> contradictions, and the lack of emphasis about them limits </text:span><text:span text:style-name="T446">its </text:span><text:span text:style-name="T443">efficiency.</text:span></text:p>
      <text:p text:style-name="P52"/>
      <text:p text:style-name="P52"><text:span text:style-name="T447">But, to be fair </text:span><text:span text:style-name="T448">with libertarianism</text:span><text:span text:style-name="T447">, all ideologies </text:span><text:span text:style-name="T448">seem to </text:span><text:span text:style-name="T447">fall for continuously ignoring their natural contradictions and </text:span><text:span text:style-name="T449">then </text:span><text:span text:style-name="T450">not </text:span><text:span text:style-name="T448">to </text:span><text:span text:style-name="T450">give up on their </text:span><text:span text:style-name="T447">justif</text:span><text:span text:style-name="T450">ications</text:span><text:span text:style-name="T447"> with </text:span><text:span text:style-name="T451">lots of </text:span><text:span text:style-name="T447">books of hundreds of pages. </text:span><text:span text:style-name="T452">To be even more fair, </text:span><text:span text:style-name="T453">this time with all of them, </text:span><text:span text:style-name="T452">I can be wrong as I’</text:span><text:span text:style-name="T453">m saying all this </text:span><text:span text:style-name="T452"><text:s/>hav</text:span><text:span text:style-name="T453">ing</text:span><text:span text:style-name="T452"> read </text:span><text:span text:style-name="T453">close to none of these </text:span><text:span text:style-name="T452">books. </text:span><text:span text:style-name="T448">A</text:span><text:span text:style-name="T452">nd I might never will, as they start with nonsensical premises. Who would read a mathematical proof that start</text:span><text:span text:style-name="T454">s</text:span><text:span text:style-name="T452"> assuming that A is B and B is not A. It just feels pointless to read, I feel it is more useful to live, talk and think </text:span><text:span text:style-name="T449">on my own</text:span><text:span text:style-name="T452">.</text:span></text:p>
      <text:p text:style-name="P52"/>
      <text:p text:style-name="P53">I wonder if this continuous <text:span text:style-name="T455">logical-</text:span>blindness of people married to ideologies arises from the simplification of truths <text:span text:style-name="T456">need which</text:span> the non-linear way in which social relations scale on societies <text:span text:style-name="T457">creates</text:span>. I’m referring to sect<text:span text:style-name="T458">i</text:span>on <text:span text:style-name="T16">4.1.2.1.- A graph theory understanding on the complexity of anarchism</text:span>.</text:p>
      <text:p text:style-name="P52"/>
      <text:p text:style-name="P52"><text:span text:style-name="T459">Likely</text:span><text:span text:style-name="T452">, all this behavior is just the natural need for humans to fix some variables, even if they make no sense, so they can start thinking </text:span><text:span text:style-name="T460">and solve a close in time problem to them</text:span><text:span text:style-name="T452">. Then, after you have put so much effort and time into building a big, yet flawed </text:span><text:span text:style-name="T461">to some extent</text:span><text:span text:style-name="T452">, understanding, your brain will do anything, like writing tens of books, to not destroy the base and </text:span><text:span text:style-name="T461">then needing to </text:span><text:span text:style-name="T462">maybe </text:span><text:span text:style-name="T452">start all over again. </text:span><text:span text:style-name="T461">It is l</text:span><text:span text:style-name="T452">ike if our brain had a tendency to refuse to acknowledge </text:span><text:span text:style-name="T461">that the </text:span><text:span text:style-name="T452">energy spent </text:span><text:span text:style-name="T461">might have been futile in some cases.</text:span></text:p>
      <text:p text:style-name="P52"/>
      <text:p text:style-name="P52"><text:span text:style-name="T463">Is Cheerfulism doing the same? Am I doing the same? I do not think so, because, in the definition itself of this -ism, Cheerfulism, I acknowledge the ever evolving </text:span><text:span text:style-name="T464">cyclic </text:span><text:span text:style-name="T463">nature of rational thinking and with that, </text:span><text:span text:style-name="T465">I </text:span><text:span text:style-name="T463">embed into this human philosophy what other</text:span><text:span text:style-name="T465">s</text:span><text:span text:style-name="T463"> seem to forget, the </text:span><text:span text:style-name="T466">natural acceptance of the </text:span><text:span text:style-name="T467">theoretical impo</text:span><text:span text:style-name="T468">s</text:span><text:span text:style-name="T467">sibility of absolute knowledge. </text:span><text:span text:style-name="T468">Mixing it with the </text:span><text:span text:style-name="T469">thing that makes knowledge, </text:span><text:span text:style-name="T470">whatever that is if it even is,</text:span><text:span text:style-name="T469"> </text:span><text:span text:style-name="T468">practical </text:span><text:span text:style-name="T469">and usable</text:span><text:span text:style-name="T471">, </text:span><text:span text:style-name="T468">happiness. </text:span><text:span text:style-name="T472">This is getting close to metaphysics, I </text:span><text:span text:style-name="T473">wrote </text:span><text:span text:style-name="T472">about </text:span><text:span text:style-name="T473">it</text:span><text:span text:style-name="T472"> later, let’s come back to ideologies and the naive critique to libertarianism.</text:span></text:p>
      <text:p text:style-name="P108"/>
      <text:p text:style-name="P109"><text:span text:style-name="T474">These days, c</text:span>ommunism is build on a straight up wrong premise <text:span text:style-name="T475">of any human </text:span><text:span text:style-name="T476">productive </text:span><text:span text:style-name="T475">interaction being an abuse</text:span>, libertarianism is build on a <text:span text:style-name="T477">useless</text:span> <text:span text:style-name="T477">ever true </text:span>premise <text:span text:style-name="T478">explained inadequately</text:span>, <text:span text:style-name="T479">and </text:span><text:span text:style-name="T480">anarchism is also build on a straight up wrong premise </text:span><text:span text:style-name="T481">in history so far</text:span><text:span text:style-name="T480">. </text:span><text:span text:style-name="T479">This one being that </text:span><text:span text:style-name="T480">humans never ha</text:span><text:span text:style-name="T482">ve</text:span><text:span text:style-name="T480"> </text:span><text:span text:style-name="T483">extreme</text:span><text:span text:style-name="T480"> discrepancies </text:span><text:span text:style-name="T484">with each other </text:span><text:span text:style-name="T485">and can in practice just not to abuse</text:span><text:span text:style-name="T484">. </text:span><text:span text:style-name="T486">S</text:span>ocialism might be the truest protocol to <text:span text:style-name="T487">modern </text:span>human <text:span text:style-name="T488">reality</text:span>.</text:p>
      <text:p text:style-name="P109"/>
      <text:p text:style-name="P109">Yet, <text:span text:style-name="T489">even with all this, </text:span><text:span text:style-name="T490">for reasons that will be explained along the book,</text:span> I think we should aim to get away from socialism as much as we can and try <text:span text:style-name="T491">to </text:span>be a<text:span text:style-name="T492">s</text:span> libertarian as possible.</text:p>
      <text:p text:style-name="P109"/>
      <text:p text:style-name="P110">Interestingly enough I reached this conclusion without thinking about freedom <text:span text:style-name="T493">or subjective terms</text:span>, just about biological human facts o<text:span text:style-name="T493">n </text:span>happiness and information processing <text:span text:style-name="T494">capabilities.</text:span></text:p>
      <text:p text:style-name="P109"/>
      <text:p text:style-name="P269"><text:span text:style-name="T496">So, summing up </text:span><text:span text:style-name="T497">so far</text:span><text:span text:style-name="T496">, libertarianism’s mistake was to brand itself as something fundamentally different </text:span><text:span text:style-name="T498">to socialism</text:span><text:span text:style-name="T496">. </text:span><text:span text:style-name="T497">Likely this happened due to the human nature of needing </text:span><text:soft-page-break/><text:span text:style-name="T499">a</text:span><text:span text:style-name="T497"> differentiation of </text:span><text:span text:style-name="T499">2 </text:span><text:span text:style-name="T497">concepts </text:span><text:span text:style-name="T499">to start thinking</text:span><text:span text:style-name="T497">, fixing some </text:span><text:span text:style-name="T499">definitions</text:span><text:span text:style-name="T497">, even if non-sense, to guide themselves through life. If you have a true, there must be a false, and from that and little more we build logic. If you have socialism, there must be an anti-socialism, so we can start reasoning along whatever problem we are trying to solve, and we created, fixing too many variables, libertarianism. </text:span><text:span text:style-name="T500">And when we weren’t </text:span><text:span text:style-name="T501">being able to make the variables vary again quickly enough</text:span><text:span text:style-name="T502">, </text:span><text:span text:style-name="T500">we </text:span><text:span text:style-name="T501">created the absurd simplifications of our </text:span><text:span text:style-name="T503">modern society</text:span><text:span text:style-name="T504">, </text:span><text:span text:style-name="T505">like risking thinking the individual is the supreme leader of its own life, </text:span><text:span text:style-name="T501">which </text:span><text:span text:style-name="T502">lead</text:span><text:span text:style-name="T496"> </text:span><text:span text:style-name="T502">to significant misunderstandings </text:span><text:span text:style-name="T506">and coordination conflicts</text:span><text:span text:style-name="T502">.</text:span></text:p>
      <text:p text:style-name="P111"/>
      <text:p text:style-name="P269"><text:span text:style-name="T507">Then, some </text:span><text:span text:style-name="T508">shitty </text:span><text:span text:style-name="T509">inefficiencies</text:span><text:span text:style-name="T510"> </text:span><text:span text:style-name="T511">of </text:span><text:span text:style-name="T508">coordination </text:span><text:span text:style-name="T507">are </text:span><text:span text:style-name="T512">potentiated by political actors utilizing the tool mentioned in chapter 4 to oppose people with simplified concepts </text:span><text:span text:style-name="T513">to gain power</text:span><text:span text:style-name="T512">. </text:span><text:span text:style-name="T514">The potentiation came from the politica</text:span><text:span text:style-name="T512">l class selling </text:span><text:span text:style-name="T515">this mastery of theirs on </text:span><text:span text:style-name="T516">the</text:span><text:span text:style-name="T515"> confrontation technique </text:span><text:span text:style-name="T512">to the highest bidder, </text:span><text:span text:style-name="T517">the richest, </text:span><text:span text:style-name="T518">wether nationally or internationally, </text:span><text:span text:style-name="T517">so they can </text:span><text:span text:style-name="T515">better </text:span><text:span text:style-name="T517">influence their wealth </text:span><text:span text:style-name="T515">in a forced way</text:span><text:span text:style-name="T517">, the resource</text:span><text:span text:style-name="T515">s</text:span><text:span text:style-name="T517"> they “</text:span><text:span text:style-name="T505">own”</text:span><text:span text:style-name="T517">, and </text:span><text:span text:style-name="T515">make sure they </text:span><text:span text:style-name="T517">never lose them, </text:span><text:span text:style-name="T519">and </text:span><text:span text:style-name="T520">sometimes</text:span><text:span text:style-name="T515">, that they will have more.</text:span><text:span text:style-name="T517"> </text:span><text:span text:style-name="T515">E</text:span><text:span text:style-name="T517">ven though some others, poorer, </text:span><text:span text:style-name="T521">less free, </text:span><text:span text:style-name="T517">might lose them, and did lose them. </text:span><text:span text:style-name="T522">Some of them even </text:span><text:span text:style-name="T523">lost </text:span><text:span text:style-name="T522">the</text:span><text:span text:style-name="T523">ir</text:span><text:span text:style-name="T522"> </text:span><text:span text:style-name="T523">most precious </text:span><text:span text:style-name="T522">resource, life. </text:span><text:span text:style-name="T521">This is one of the risks libertarianism has. And, </text:span><text:span text:style-name="T505">being fair again,</text:span><text:span text:style-name="T521"> socialism </text:span><text:span text:style-name="T505">too</text:span><text:span text:style-name="T521">, both. In the end this is a risk arising from pure power dynamics, from a State.</text:span></text:p>
      <text:p text:style-name="P112"/>
      <text:p text:style-name="P270"><text:span text:style-name="T756">T</text:span><text:span text:style-name="T755">he thing is that </text:span><text:span text:style-name="T757">this section is a critique to libertarianism and so I will continue this phrase writing that</text:span><text:span text:style-name="T755"> libert</text:span><text:span text:style-name="T495">arians sort of lie to themselves, they think of their ideas as perfect, as if they </text:span><text:span text:style-name="T524">can even</text:span><text:span text:style-name="T495"> counter human nature. But ideas, ideas are, and reality, reality is.</text:span></text:p>
      <text:p text:style-name="P113"/>
      <text:p text:style-name="P270"><text:span text:style-name="T525">We created </text:span><text:span text:style-name="T526">a</text:span><text:span text:style-name="T527">n ideological</text:span><text:span text:style-name="T526"> belief </text:span><text:span text:style-name="T528">where </text:span><text:span text:style-name="T527">everyone </text:span><text:span text:style-name="T528">can</text:span><text:span text:style-name="T527">, but specially </text:span><text:span text:style-name="T525">p</text:span><text:span text:style-name="T529">owerful individuals, specially the richest, </text:span><text:span text:style-name="T528">can </text:span><text:span text:style-name="T529">repeatedly think they have the </text:span><text:span text:style-name="T530">right of holding </text:span><text:span text:style-name="T529">power thanks to individualistic </text:span><text:span text:style-name="T530">principles,</text:span><text:span text:style-name="T529"> </text:span><text:span text:style-name="T531">promoting arrogance.</text:span></text:p>
      <text:p text:style-name="P114"/>
      <text:p text:style-name="P270"><text:span text:style-name="T532">Some keep t</text:span><text:span text:style-name="T533">hinking that the individual is powerful, mighty, very wise and intelligent, specially if they managed to gather so much money. </text:span><text:span text:style-name="T534">T</text:span><text:span text:style-name="T535">hinking </text:span><text:span text:style-name="T532">that</text:span><text:span text:style-name="T535"> their money is their ultimate representation of their worth and they must do anything to protect it. </text:span><text:span text:style-name="T534">T</text:span><text:span text:style-name="T535">hinking </text:span><text:span text:style-name="T532">that </text:span><text:span text:style-name="T535">their dominan</text:span><text:span text:style-name="T536">ce-based</text:span><text:span text:style-name="T535"> freedom, </text:span><text:span text:style-name="T532">therefore it must create submission,</text:span><text:span text:style-name="T535"> is at the core of their existence, </text:span><text:span text:style-name="T532">they think it is</text:span><text:span text:style-name="T535"> </text:span><text:span text:style-name="T528">a natural and normal freedom to have </text:span><text:span text:style-name="T525">b</text:span><text:span text:style-name="T535">ecause the individual is the supreme leader of its life</text:span><text:span text:style-name="T528">,</text:span><text:span text:style-name="T535"> </text:span><text:span text:style-name="T532">and </text:span><text:span text:style-name="T528">not </text:span><text:span text:style-name="T537">thinking about </text:span><text:span text:style-name="T532">what it actually is, </text:span><text:span text:style-name="T528">a powe</text:span><text:span text:style-name="T532">r</text:span><text:span text:style-name="T535">.</text:span></text:p>
      <text:p text:style-name="P115"/>
      <text:p text:style-name="P270"><text:span text:style-name="T538">And because everyone else is </text:span><text:span text:style-name="T539">a supreme leader </text:span><text:span text:style-name="T538">too, if they agree using money, that must 100% correlate </text:span><text:span text:style-name="T540">with</text:span><text:span text:style-name="T538"> that they agree to be enslaved </text:span><text:span text:style-name="T541">if they are poorer </text:span><text:span text:style-name="T538">than you. </text:span><text:span text:style-name="T542">They keep t</text:span><text:span text:style-name="T534">hinking that w</text:span><text:span text:style-name="T535">hat deeply defines an individual at its core </text:span><text:span text:style-name="T542">it </text:span><text:span text:style-name="T535">is not its happiness, it </text:span><text:span text:style-name="T543">is not</text:span><text:span text:style-name="T535"> </text:span><text:span text:style-name="T542">its </text:span><text:span text:style-name="T535">empathy, it is </text:span><text:span text:style-name="T544">it</text:span><text:span text:style-name="T535">s freedom, the capability to do whatever </text:span><text:span text:style-name="T540">you</text:span><text:span text:style-name="T535"> want, regardless. </text:span><text:span text:style-name="T543">Which</text:span><text:span text:style-name="T535"> </text:span><text:span text:style-name="T545">in modern societies this is granted by having lots of money</text:span><text:span text:style-name="T535">.</text:span></text:p>
      <text:p text:style-name="P115"/>
      <text:p text:style-name="P271"><text:span text:style-name="T535">S</text:span><text:span text:style-name="T495">o they see that, hey I can do whatever I want, I might as well just do it, </text:span><text:span text:style-name="T546">and I will do stuff that potentiates my freedom,</text:span><text:span text:style-name="T495"> because what truly matters is freedom, that is the ultimate goal of an individual, </text:span><text:span text:style-name="T547">the ultimate goal that generates wealth for everyone, because sure, I know better, I have the right to know better</text:span><text:span text:style-name="T495">. </text:span><text:span text:style-name="T548">The State is there in case I was doing wrong, if I did not have the right to do better they would have stopped me right? So </text:span><text:span text:style-name="T549">what I’m doing must be right, justified</text:span><text:span text:style-name="T546">.</text:span></text:p>
      <text:p text:style-name="P116"/>
      <text:p text:style-name="P272"><text:span text:style-name="T546">A</text:span><text:span text:style-name="T495">nd, if for whatever reason I bribe the State, why is that bad? At the end of the day the State exists because supreme leader</text:span><text:span text:style-name="T550">s</text:span><text:span text:style-name="T495"> of their own lives, individuals, created it, so even if indirectly, they agree on me bribing it. And, anyway, I have more money, </text:span><text:span text:style-name="T550">I managed to be freer, I managed to be </text:span><text:span text:style-name="T495">worth more, so why not my opinions and desires be worth more too? </text:span><text:span text:style-name="T551">Furthermore, why can’t I spend my money freely? If I want to “support” my politician friend I will do so, because we are meant to be free and I, </text:span><text:span text:style-name="T552">the supreme individual,</text:span><text:span text:style-name="T551"> have the right to be free, regardless.</text:span></text:p>
      <text:p text:style-name="P117"/>
      <text:p text:style-name="P273"><text:span text:style-name="T553">So what if I influence the State, w</text:span><text:span text:style-name="T495">hy lean towards a democracy that would give power to </text:span><text:span text:style-name="T554">poor</text:span><text:span text:style-name="T495"> people? That is dangerous, these people have been proven to not be able to provide value for others, by the all-mighty impersonal market. </text:span><text:span text:style-name="T555">So</text:span><text:span text:style-name="T495"> let power better be in the hands of the proven ones, </text:span><text:span text:style-name="T555">either </text:span><text:span text:style-name="T495">the rich or very knowledgeable</text:span><text:span text:style-name="T555"> </text:span><text:span text:style-name="T495">ones, let’s aim for a mix of plutocracy (power given to wealth) and technocracy (power given to the wise and technical in different fields of knowledge).</text:span></text:p>
      <text:p text:style-name="P116"/>
      <text:p text:style-name="P271"><text:soft-page-break/><text:span text:style-name="T556">Hey reader I’m back. </text:span><text:span text:style-name="T557">Now,</text:span><text:span text:style-name="T558"> do not get me wrong, </text:span><text:span text:style-name="T559">I’m just describing the risks </text:span><text:span text:style-name="T560">and thoughts that individualistic principles can lead to</text:span><text:span text:style-name="T559">, </text:span><text:span text:style-name="T560">I’m </text:span><text:span text:style-name="T559">not stating how often they happen.</text:span><text:span text:style-name="T558"> </text:span><text:span text:style-name="T560">In fact and for now, I’m not even stating if these thoughts are good or bad, I might be labeling them with adjectives associated with a bad picture as per nowadays culture, but remember, life is gray, you can define spectrum using the positive or negative ends as reference to influence how your discourse is perceived. I’m doing just that, for reasons I hope you later understand.</text:span></text:p>
      <text:p text:style-name="P118"/>
      <text:p text:style-name="P271"><text:span text:style-name="T561">Even if what I wrote in the above paragraphs might sound bad to some we mut admit that, p</text:span><text:span text:style-name="T558">owerful people </text:span><text:span text:style-name="T561">and</text:span><text:span text:style-name="T558"> rich people, </text:span><text:span text:style-name="T557">the ones who are more free, </text:span><text:span text:style-name="T558">can take good decisions </text:span><text:span text:style-name="T562">too</text:span><text:span text:style-name="T558">. In fact, to some extent they have taken them </text:span><text:span text:style-name="T544">more often than not</text:span><text:span text:style-name="T558">, otherwise the overall life quality on Earth would not have increased. I </text:span><text:span text:style-name="T563">was </text:span><text:span text:style-name="T558">just describing the </text:span><text:span text:style-name="T563">negatively perceived </text:span><text:span text:style-name="T558">consequence</text:span><text:span text:style-name="T544">s </text:span><text:span text:style-name="T564">which</text:span><text:span text:style-name="T544"> the</text:span><text:span text:style-name="T558"> core of libertarianism </text:span><text:span text:style-name="T565">lead</text:span><text:span text:style-name="T544">s</text:span><text:span text:style-name="T565"> to </text:span><text:span text:style-name="T544">sometimes</text:span><text:span text:style-name="T558">.</text:span></text:p>
      <text:p text:style-name="P119"/>
      <text:p text:style-name="P274"><text:span text:style-name="T558">S</text:span><text:span text:style-name="T495">ure, if you are free, you can be exactly </text:span><text:span text:style-name="T566">who</text:span><text:span text:style-name="T495"> you want to be every time. </text:span><text:span text:style-name="T567">But that does not mean that freedom is who you are.</text:span><text:span text:style-name="T495"> </text:span><text:span text:style-name="T567">Furthermore, being free comes at a cost, </text:span><text:span text:style-name="T495">what cost? That behavior is not natural, we are </text:span><text:span text:style-name="T566">n</text:span><text:span text:style-name="T495">ever born to be completely free, that is not our natural state. </text:span><text:span text:style-name="T567">We need each other, and an excess of freedom will </text:span><text:span text:style-name="T568">at some point </text:span><text:span text:style-name="T567">correspond to chaos somewhere else, </text:span><text:span text:style-name="T569">and</text:span><text:span text:style-name="T567"> the slavery, </text:span><text:span text:style-name="T570">understood </text:span><text:span text:style-name="T568">as </text:span><text:span text:style-name="T567">loss of freedom, of someone somewhere else. </text:span><text:span text:style-name="T568">They will lose more or less freedom, maybe the freedom they lose is just </text:span><text:span text:style-name="T571">that</text:span><text:span text:style-name="T568"> they can only chose between 4 brands of drinks instead of 6, or maybe, </text:span><text:span text:style-name="T570">in the worst cases,</text:span><text:span text:style-name="T568"> they lose the freedom to rest </text:span><text:span text:style-name="T571">their bodies </text:span><text:span text:style-name="T568">properly, </text:span><text:span text:style-name="T571">a.k.a. work exploitation</text:span><text:span text:style-name="T568">.</text:span></text:p>
      <text:p text:style-name="P120"/>
      <text:p text:style-name="P274"><text:span text:style-name="T568">T</text:span><text:span text:style-name="T495">rying to artificially create </text:span><text:span text:style-name="T568">the natural freedom of the individual</text:span><text:span text:style-name="T495"> by giving the artificial right for power to money won’t make us escape from the truth that, we will never create a natural good life that feels good for everyone’s nature if we forever create artific</text:span><text:span text:style-name="T572">i</text:span><text:span text:style-name="T495">al anti-natural behavior </text:span><text:span text:style-name="T573">based principles </text:span><text:span text:style-name="T568">to guide us through</text:span><text:span text:style-name="T495">. </text:span><text:span text:style-name="T574">The blind focus on freedom make some forget about power.</text:span></text:p>
      <text:p text:style-name="P121"/>
      <text:p text:style-name="P122">Focusing on freedom has been the most effective and efficient method so far, but it has limits, because it is anti-natural in the sense that it contradicts natural human behavior. Even if it is the best we have so far, it does not mean we can not create something better or it does not mean it does not have negative side effects.</text:p>
      <text:p text:style-name="P122"/>
      <text:p text:style-name="P123">The market is not perfect, it will never be. Because it is driven by the subjective desires of humans, <text:span text:style-name="T759">and humans use action, power, to satisfy them</text:span>. <text:span text:style-name="T760">The market</text:span> is just the best imperfection so far.</text:p>
      <text:p text:style-name="P116"/>
      <text:p text:style-name="P271"><text:span text:style-name="T575">We did not come here to be free</text:span><text:span text:style-name="T546">, </text:span><text:span text:style-name="T576">biologically, </text:span><text:span text:style-name="T577">at the core, </text:span><text:span text:style-name="T576">we are here to </text:span><text:span text:style-name="T578">survive and </text:span><text:span text:style-name="T579">try to </text:span><text:span text:style-name="T576">be happy.</text:span></text:p>
      <text:p text:style-name="P124"/>
      <text:p text:style-name="P271"><text:span text:style-name="T576">Anyway, they think </text:span><text:span text:style-name="T580">money </text:span><text:span text:style-name="T576">is freedom, </text:span><text:span text:style-name="T580">and it is </text:span><text:span text:style-name="T581">under our modern context</text:span><text:span text:style-name="T580">, </text:span><text:span text:style-name="T576">the freedom </text:span><text:span text:style-name="T580">of the holder </text:span><text:span text:style-name="T576">to force you to do what </text:span><text:span text:style-name="T580">he</text:span><text:span text:style-name="T576"> do</text:span><text:span text:style-name="T580">es</text:span><text:span text:style-name="T576"> not want or can not do. Then these people </text:span><text:span text:style-name="T546">might want to abuse </text:span><text:span text:style-name="T576">directly</text:span><text:span text:style-name="T546">, </text:span><text:span text:style-name="T576">or </text:span><text:span text:style-name="T546">they might want something that indirectly abuses others, and in their arrogance </text:span><text:span text:style-name="T582">originated on </text:span><text:span text:style-name="T546">the libertaria</text:span><text:span text:style-name="T583">n</text:span><text:span text:style-name="T546"> principle </text:span><text:span text:style-name="T582">and fueled by the </text:span><text:span text:style-name="T584">impersonal and </text:span><text:span text:style-name="T582">infinite power of money </text:span><text:span text:style-name="T546">they will take a while to realize they abused. </text:span><text:span text:style-name="T576">And then they will take a while to say sorry, or fix the mess. Because they will eventually have to, because we are social animals, and you can not escape that, </text:span><text:span text:style-name="T585">not forever, </text:span><text:span text:style-name="T576">regardless if you think yourself as a god of freedom.</text:span></text:p>
      <text:p text:style-name="P115"/>
      <text:p text:style-name="P275"><text:span text:style-name="T586">All this creates </text:span><text:span text:style-name="T495">a tendency for </text:span><text:span text:style-name="T586">lots of people </text:span><text:span text:style-name="T495">to not properly think about others’ </text:span><text:span text:style-name="T587">real needs</text:span><text:span text:style-name="T495">, </text:span><text:span text:style-name="T586">their own real needs even,</text:span><text:span text:style-name="T495"> and just indirectly, and likely unk</text:span><text:span text:style-name="T587">n</text:span><text:span text:style-name="T495">owingly, abuse them </text:span><text:span text:style-name="T588">and abuse themselves</text:span><text:span text:style-name="T495">.</text:span></text:p>
      <text:p text:style-name="P125"/>
      <text:p text:style-name="P275"><text:span text:style-name="T589">I think we all can imagine </text:span><text:span text:style-name="T590">a </text:span><text:span text:style-name="T589">modern nation that behaves like this pretty frequently. But names do not matter, I’m not seeking blame </text:span><text:span text:style-name="T591">n</text:span><text:span text:style-name="T589">or revenge, I’m seeking </text:span><text:span text:style-name="T592">to thrive, to </text:span><text:span text:style-name="T589">understand, </text:span><text:span text:style-name="T592">to cooperate, not </text:span><text:span text:style-name="T593">to </text:span><text:span text:style-name="T592">dominate </text:span><text:span text:style-name="T593">or to be free, but to be happy</text:span><text:span text:style-name="T592">.</text:span></text:p>
      <text:p text:style-name="P126"/>
      <text:p text:style-name="P276"><text:span text:style-name="T594">The described</text:span><text:span text:style-name="T495"> behavior </text:span><text:span text:style-name="T595">feels very </text:span><text:span text:style-name="T495">natural </text:span><text:span text:style-name="T595">given the historical context. A</text:span><text:span text:style-name="T495">s the richest have not been intelligent enough to realize, or have just been </text:span><text:span text:style-name="T595">blinded by individualism-based arrogance </text:span><text:span text:style-name="T596">and the abstract nature of money</text:span><text:span text:style-name="T495">.</text:span></text:p>
      <text:p text:style-name="P127"/>
      <text:p text:style-name="P276"><text:soft-page-break/><text:span text:style-name="T597">Money producing money, </text:span><text:span text:style-name="T598">saving, investment of private goods, what is </text:span><text:span text:style-name="T599">commonly perceived as that thing called</text:span><text:span text:style-name="T598"> </text:span><text:span text:style-name="T597">capitalism, is not bad. S</text:span><text:span text:style-name="T600">toring money </text:span><text:span text:style-name="T495">reflects the natural tendency of a human to store me</text:span><text:span text:style-name="T601">a</text:span><text:span text:style-name="T495">t just in case winter comes. </text:span><text:span text:style-name="T602">Investing it, reflects the natural tendency of humans to optimize their meat management. </text:span><text:span text:style-name="T603">In fact, it is the only way so far we can coexist and live together being as </text:span><text:span text:style-name="T604">many</text:span><text:span text:style-name="T603"> humans as we are. </text:span><text:span text:style-name="T605">W</text:span><text:span text:style-name="T606">ithout money we would be killing each other </text:span><text:span text:style-name="T607">way more frequently</text:span><text:span text:style-name="T603">. </text:span><text:span text:style-name="T597">The problem comes </text:span><text:span text:style-name="T605">with</text:span><text:span text:style-name="T597"> what you use that money for </text:span><text:span text:style-name="T608">and what is moving you to use it</text:span><text:span text:style-name="T597">.</text:span></text:p>
      <text:p text:style-name="P127"/>
      <text:p text:style-name="P276"><text:span text:style-name="T609">As </text:span><text:span text:style-name="T610">another </text:span><text:span text:style-name="T611">example, </text:span><text:span text:style-name="T610">shallowly mentioned a bit ago,</text:span><text:span text:style-name="T611"> of issues derived from individualistic arrogance </text:span><text:span text:style-name="T610">we can see how r</text:span><text:span text:style-name="T495">ich people </text:span><text:span text:style-name="T612">or entities </text:span><text:span text:style-name="T495">saw the service </text:span><text:span text:style-name="T613">of</text:span><text:span text:style-name="T495">, cheaper in less democratic countries, </text:span><text:span text:style-name="T613">buying </text:span><text:span text:style-name="T495">an assurance that their resources distribution rights </text:span><text:span text:style-name="T614">(money) </text:span><text:span text:style-name="T495">will not decrease, so they </text:span><text:span text:style-name="T600">bought it</text:span><text:span text:style-name="T495">. </text:span><text:span text:style-name="T611">Buying politicians, resources, </text:span><text:span text:style-name="T615">terrorist even, </text:span><text:span text:style-name="T611">influencing the world in such a way that their wealth is protected.</text:span><text:span text:style-name="T495"> </text:span><text:span text:style-name="T616">Libertarians will say, but that is the State’</text:span><text:span text:style-name="T617">s</text:span><text:span text:style-name="T616"> problem, </text:span><text:span text:style-name="T618">that is</text:span><text:span text:style-name="T616"> easy to corrupt socialism, </text:span><text:span text:style-name="T619">it is socialism’s fault!</text:span><text:span text:style-name="T616"> </text:span><text:span text:style-name="T618">Then I would answer, b</text:span><text:span text:style-name="T616">ut hey, you also have a State. You might be better, but </text:span><text:span text:style-name="T620">just</text:span><text:span text:style-name="T616"> the </text:span><text:span text:style-name="T621">lesser</text:span><text:span text:style-name="T616"> evil. Not the objective good you tend to think you are. </text:span><text:span text:style-name="T622">Yet, to be honest, I would probably just not answer. Because </text:span><text:span text:style-name="T623">discussing this problem from one-eyed ideologies </text:span><text:span text:style-name="T624">is kind of futile and has already been done for enough years already. </text:span><text:span text:style-name="T625">Having similar conversations as the ones our parents had</text:span><text:span text:style-name="T623"> will not generate a real </text:span><text:span text:style-name="T625">progress in </text:span><text:span text:style-name="T626">the </text:span><text:span text:style-name="T623">understanding of the matter and it will lead to poorer </text:span><text:span text:style-name="T627">or non-improving</text:span><text:span text:style-name="T623"> solutions. </text:span><text:span text:style-name="T628">I will propose later better methods of analysis.</text:span></text:p>
      <text:p text:style-name="P128"/>
      <text:p text:style-name="P276"><text:span text:style-name="T628">Now</text:span><text:span text:style-name="T629"> we mu</text:span><text:span text:style-name="T597">s</text:span><text:span text:style-name="T629">t not rush into blaming </text:span><text:span text:style-name="T630">n</text:span><text:span text:style-name="T631">or aggression.</text:span><text:span text:style-name="T629"> </text:span><text:span text:style-name="T632">In </text:span><text:span text:style-name="T629">the same ways citizens are not intelligent enough, the political and richest of people are not either. </text:span><text:span text:style-name="T633">They must soon become Cheerful too. </text:span><text:span text:style-name="T631">The same way you can not blame yourself for not </text:span><text:span text:style-name="T634">developing</text:span><text:span text:style-name="T631"> efficient learning skills, because there is a whole system in place promoting you do not, you can not fully blame rich or powerful people for abusing their power </text:span><text:span text:style-name="T634">to protect their wealth, </text:span><text:span text:style-name="T635">and then justify it with </text:span><text:span text:style-name="T634">their right to be free, or their right to enslave you if you want to say it harsh</text:span><text:span text:style-name="T636">ly</text:span><text:span text:style-name="T631">. The </text:span><text:span text:style-name="T637">very same</text:span><text:span text:style-name="T631"> system, </text:span><text:span text:style-name="T638">even our nature </text:span><text:span text:style-name="T639">sometimes</text:span><text:span text:style-name="T638"> I would dare to say, makes the </text:span><text:span text:style-name="T640">indirect </text:span><text:span text:style-name="T641">or direct</text:span><text:span text:style-name="T640"> abuse </text:span><text:span text:style-name="T642">of the powerful </text:span><text:span text:style-name="T640">through freedom maximization </text:span><text:span text:style-name="T643">a real risk </text:span><text:span text:style-name="T644">that they do not really realize and limits their ability to think further, </text:span><text:span text:style-name="T637">to think about </text:span><text:span text:style-name="T644">more complex and fundamental principles</text:span><text:span text:style-name="T643">. </text:span><text:span text:style-name="T645">Then, as any human does, the</text:span><text:span text:style-name="T646">y</text:span><text:span text:style-name="T645"> strongly follow their herd, their system.</text:span></text:p>
      <text:p text:style-name="P129"/>
      <text:p text:style-name="P277"><text:span text:style-name="T643">A</text:span><text:span text:style-name="T495">s said, some might just be evil, psychopaths, but I think most of them are just dumb or too ignorant, lacking creativity. Because at the end of the day we are humans, and if citizens have these problems </text:span><text:span text:style-name="T647">caused by these human traits in the observed proportions,</text:span><text:span text:style-name="T495"> </text:span><text:span text:style-name="T647">then, </text:span><text:span text:style-name="T495">wh</text:span><text:span text:style-name="T647">y</text:span><text:span text:style-name="T495"> would powerful people </text:span><text:span text:style-name="T648">(from capital wealth or political power)</text:span><text:span text:style-name="T495"> </text:span><text:span text:style-name="T647">be </text:span><text:span text:style-name="T495">special </text:span><text:span text:style-name="T647">and full of psychopaths</text:span><text:span text:style-name="T495">? They are raised in actually very similar ways </text:span><text:span text:style-name="T649">to us</text:span><text:span text:style-name="T495">. I still do not know “</text:span><text:span text:style-name="T649">politics-</text:span><text:span text:style-name="T495">powerful” people, but I </text:span><text:span text:style-name="T650">know rich people, and I</text:span><text:span text:style-name="T495"> am optimistic </text:span><text:span text:style-name="T649">that they have the same root of problems as the citizens and in similar proportions</text:span><text:span text:style-name="T495">. </text:span><text:span text:style-name="T651">Powerful or not, e</text:span><text:span text:style-name="T495">veryone </text:span><text:span text:style-name="T650">seems to be limited by the same things, and we </text:span><text:span text:style-name="T495">just ha</text:span><text:span text:style-name="T650">ve </text:span><text:span text:style-name="T495">to adapt to deeper truths, leading to better coordination, by becoming more intelligent.</text:span></text:p>
      <text:p text:style-name="P128"/>
      <text:p text:style-name="P278"><text:span text:style-name="T652">Let’s finish this section. Here are m</text:span><text:span text:style-name="T495">ore risks “</text:span><text:span text:style-name="T653">of”</text:span><text:span text:style-name="T654"> libertarianism</text:span><text:span text:style-name="T495">. Thinking of yourself and others as the owners of your own lives makes you see each other as competitors, denying full trust. </text:span><text:span text:style-name="T655">If I’m a god and he is a god, and if I can do whatever I want and you too, you might some day want me to not want something. Fueling distrust. And deep in your brain, even if you do not realize, subconsciously, because you are human, </text:span><text:span text:style-name="T656">you know </text:span><text:span text:style-name="T657">that </text:span><text:span text:style-name="T658">any of you</text:span><text:span text:style-name="T656"> are actually </text:span><text:span text:style-name="T659">a god of </text:span><text:span text:style-name="T655">free</text:span><text:span text:style-name="T659">dom</text:span><text:span text:style-name="T655">. </text:span><text:span text:style-name="T657">You will create </text:span><text:span text:style-name="T660">i</text:span><text:span text:style-name="T657">n your head the image of you and others being an unstoppable force and an unmovable object at the same time, things which its existence, by definition, is incompatible. The fundamental lack of logic </text:span><text:span text:style-name="T661">in</text:span><text:span text:style-name="T662"> your understanding</text:span><text:span text:style-name="T657"> will create stress, your human nature will create fear, y</text:span><text:span text:style-name="T656">ou will fear the other, and afraid dogs are the ones who will likely bite. </text:span><text:span text:style-name="T663">Because you are denying the truth, you say you both </text:span><text:span text:style-name="T630">are </text:span><text:span text:style-name="T661">always</text:span><text:span text:style-name="T663"> free and respect each other’s freedom </text:span><text:span text:style-name="T658">on the surface</text:span><text:span text:style-name="T663">, but in reality you </text:span><text:span text:style-name="T664">are not, </text:span><text:span text:style-name="T661">you can not, not always,</text:span><text:span text:style-name="T664"> and that fuels distrust, promoting </text:span><text:span text:style-name="T665">aggressive </text:span><text:span text:style-name="T664">competition over cooperation</text:span><text:span text:style-name="T663">. </text:span></text:p>
      <text:p text:style-name="P130"/>
      <text:p text:style-name="P279"><text:span text:style-name="T495">Let competition be it, libertarians </text:span><text:span text:style-name="T666">will say</text:span><text:span text:style-name="T495">, </text:span><text:span text:style-name="T667">let </text:span><text:span text:style-name="T668">perfect competition</text:span><text:span text:style-name="T495"> </text:span><text:span text:style-name="T667">be it, they will </text:span><text:span text:style-name="T495">say, let the free market decide. </text:span><text:span text:style-name="T667">And in theory, sure, but in reality, </text:span><text:span text:style-name="T495">the free market is anything but free </text:span><text:span text:style-name="T668">and perfect</text:span><text:span text:style-name="T495">. The market are humans, and humans are not free, we are social animals. </text:span><text:span text:style-name="T668">Disguise </text:span><text:span text:style-name="T630">it </text:span><text:span text:style-name="T668">with </text:span><text:span text:style-name="T669">different </text:span><text:span text:style-name="T668">wording</text:span><text:span text:style-name="T669">s</text:span><text:span text:style-name="T668"> if you will, fool yourself with your own words if you will, but no-one is the supreme leader of its own life. </text:span><text:span text:style-name="T670">And market is not objective, it is subjective and power </text:span><text:span text:style-name="T671">based</text:span><text:span text:style-name="T670">.</text:span></text:p>
      <text:p text:style-name="P131"/>
      <text:p text:style-name="P132"><text:soft-page-break/>Furthermore, there is not such a thing as human perfection. Perfection is subjective. And we must embrace that, <text:span text:style-name="T761">we must </text:span>find a way to operate <text:span text:style-name="T762">with</text:span> that, not <text:span text:style-name="T763">to </text:span>negate <text:span text:style-name="T764">it</text:span>.</text:p>
      <text:p text:style-name="P132"/>
      <text:p text:style-name="P133">Competition is not <text:span text:style-name="T765">a </text:span>good <text:span text:style-name="T765">sign</text:span>, if you are competing is because there has to be a winner. Why? Because life is a zero sum game? Because we lack resources? Or actually because we have too much unnecessary desires? <text:span text:style-name="T766">What are we competing for that is scarce? </text:span><text:span text:style-name="T767">Food? Water? </text:span><text:span text:style-name="T766">Freedom? </text:span><text:span text:style-name="T768">Time? </text:span><text:span text:style-name="T767">Happiness? </text:span><text:span text:style-name="T769">Trust? </text:span><text:span text:style-name="T767">Why not cooperating instead?</text:span></text:p>
      <text:p text:style-name="P131"/>
      <text:p text:style-name="P276"><text:span text:style-name="T613">The world is currently facing an issue way deeper than any economic theory can explain, than any political theory can explain. </text:span><text:span text:style-name="T672">Than any of them both together can explain.</text:span></text:p>
      <text:p text:style-name="P134"/>
      <text:p text:style-name="P276"><text:span text:style-name="T613">Because the issues stem from </text:span><text:span text:style-name="T673">misunderstanding </text:span><text:span text:style-name="T613">intelligence </text:span><text:span text:style-name="T673">and happiness</text:span><text:span text:style-name="T613">. </text:span><text:span text:style-name="T674">From </text:span><text:span text:style-name="T673">misunderstanding </text:span><text:span text:style-name="T674">human instincts themselves. </text:span><text:span text:style-name="T675">And then failing to successfully leverage them.</text:span></text:p>
      <text:p text:style-name="P135"/>
      <text:p text:style-name="P280"><text:span text:style-name="T674">W</text:span><text:span text:style-name="T495">e </text:span><text:span text:style-name="T676">face the challenge of</text:span><text:span text:style-name="T495"> tam</text:span><text:span text:style-name="T676">ing</text:span><text:span text:style-name="T495"> our </text:span><text:span text:style-name="T677">ancient-</text:span><text:span text:style-name="T495">selves, </text:span><text:span text:style-name="T677">our true selves</text:span><text:span text:style-name="T495">. Control</text:span><text:span text:style-name="T676">ling</text:span><text:span text:style-name="T495"> our instinct to dominate </text:span><text:span text:style-name="T676">our fear</text:span><text:span text:style-name="T495">, this time economically speaking. I</text:span><text:span text:style-name="T676">n</text:span><text:span text:style-name="T495"> a similar way we can control our sexual desire</text:span><text:span text:style-name="T678">s</text:span><text:span text:style-name="T495"> and not rape </text:span><text:span text:style-name="T678">if rejected</text:span><text:span text:style-name="T495">, we must </text:span><text:span text:style-name="T678">do </text:span><text:span text:style-name="T495">that so, but econom</text:span><text:span text:style-name="T676">ically</text:span><text:span text:style-name="T495"> </text:span><text:span text:style-name="T679">and politically-</text:span><text:span text:style-name="T495">wise.</text:span></text:p>
      <text:p text:style-name="P136"/>
      <text:p text:style-name="P276"><text:span text:style-name="T758">Wealth increased</text:span><text:span text:style-name="T680"> because we increased our capabilities with technology and we had a really crazy high step up in technological efficiency. </text:span><text:span text:style-name="T681">There was more for everyone, and even in a freedom first tendency, everyone could just have more without abusing.</text:span></text:p>
      <text:p text:style-name="P137"/>
      <text:p text:style-name="P276"><text:span text:style-name="T680">Yet after </text:span><text:span text:style-name="T682">the invention</text:span><text:span text:style-name="T680"> </text:span><text:span text:style-name="T682">of </text:span><text:span text:style-name="T683">the </text:span><text:span text:style-name="T682">internet, progress slowed down </text:span><text:span text:style-name="T684">for some decades</text:span><text:span text:style-name="T680">. And </text:span><text:span text:style-name="T685">the</text:span><text:span text:style-name="T680"> true nature </text:span><text:span text:style-name="T685">and limits of our understanding</text:span><text:span text:style-name="T680"> started showing up.</text:span><text:span text:style-name="T613"> </text:span><text:span text:style-name="T686">Our true limitations appeared. We got too used to unlimited potential, addicted to </text:span><text:span text:style-name="T687">our lives feeling better thanks to </text:span><text:span text:style-name="T686">the improvement of resource allocation driven by technological progress, but not because of a significant increase in intelligence </text:span><text:span text:style-name="T688">or in our happiness understanding </text:span><text:span text:style-name="T678">and control</text:span><text:span text:style-name="T686">.</text:span></text:p>
      <text:p text:style-name="P138"/>
      <text:p text:style-name="P281"><text:span text:style-name="T686">W</text:span><text:span text:style-name="T495">e have naturally disregarded intelligence and happiness by decades, </text:span><text:span text:style-name="T689">because more resources were available, because better ways of organizing them were. </text:span><text:span text:style-name="T690">That made us freer, and we confused freedom as the source. </text:span><text:span text:style-name="T689">But, in a parallelism way, like said in the power dynamics chapter, we can’t run to uncharted lands forever. Once there is no land to run, </text:span><text:span text:style-name="T691">so once there is </text:span><text:span text:style-name="T689">no new technology to give us more and more </text:span><text:span text:style-name="T692">sparks of happiness due to discovering new </text:span><text:span text:style-name="T693">more optimal</text:span><text:span text:style-name="T692"> stuff</text:span><text:span text:style-name="T689">, </text:span><text:span text:style-name="T692">then</text:span><text:span text:style-name="T689"> we must dialog</text:span><text:span text:style-name="T694">u</text:span><text:span text:style-name="T689">e </text:span><text:span text:style-name="T695">or fight.</text:span></text:p>
      <text:p text:style-name="P139"/>
      <text:p text:style-name="P282"><text:span text:style-name="T495">Happiness has not been as cheap anymore, we did not have crazy technological discoveries for decades and </text:span><text:span text:style-name="T696">some</text:span><text:span text:style-name="T495"> started </text:span><text:span text:style-name="T697">hurting</text:span><text:span text:style-name="T495"> each other, </text:span><text:span text:style-name="T698">stealing resources from each other,</text:span><text:span text:style-name="T495"> just to feel something. </text:span><text:span text:style-name="T690">We had to slow down our exploration and forgot to enjoy life while becoming addicted to the high amounts of happiness </text:span><text:span text:style-name="T699">that </text:span><text:span text:style-name="T700">frequently </text:span><text:span text:style-name="T690">discovering fancy new things brings.</text:span><text:span text:style-name="T495"> Like an addicted person </text:span><text:span text:style-name="T701">who need</text:span><text:span text:style-name="T702">s</text:span><text:span text:style-name="T701"> more of that drug, we need more of those fresh new resources, more and more</text:span><text:span text:style-name="T495">. </text:span><text:span text:style-name="T703">So we create wars, to dominate and abuse, to have control and get easy solutions to satisfy our addiction.</text:span><text:span text:style-name="T495"> </text:span><text:span text:style-name="T702">Even if it comes at the cost of other humans kilometers away.</text:span></text:p>
      <text:p text:style-name="P140"/>
      <text:p text:style-name="P283"><text:span text:style-name="T702">I</text:span><text:span text:style-name="T495">n the same ways drug addicts </text:span><text:span text:style-name="T704">don’t even think of</text:span><text:span text:style-name="T495"> the</text:span><text:span text:style-name="T704">ir</text:span><text:span text:style-name="T495"> addiction, societies </text:span><text:span text:style-name="T704">don’t even think of</text:span><text:span text:style-name="T495"> their </text:span><text:span text:style-name="T704">unnecessary </text:span><text:span text:style-name="T495">abusive </text:span><text:span text:style-name="T704">actions by using </text:span><text:span text:style-name="T495">simplified truths, yet they called them ideologies to sound intellectual.</text:span></text:p>
      <text:p text:style-name="P140"/>
      <text:p text:style-name="P284"><text:span text:style-name="T702">W</text:span><text:span text:style-name="T495">e praise the freedom that allowed us </text:span><text:span text:style-name="T705">to</text:span><text:span text:style-name="T495"> explore, to feel the happiness rush. We got addicted to it.</text:span></text:p>
      <text:p text:style-name="P139"/>
      <text:p text:style-name="P282"><text:span text:style-name="T706">Fortunately we got AI, which will </text:span><text:span text:style-name="T707">clearly</text:span><text:span text:style-name="T706"> increase productivity, yet it will just be like a drug addict injecting another </text:span><text:span text:style-name="T708">drug</text:span><text:span text:style-name="T706"> dose </text:span><text:span text:style-name="T708">to the blood stream</text:span><text:span text:style-name="T706">, how much will it last until we start suffering again from withdrawal and start driving crazy?</text:span></text:p>
      <text:p text:style-name="P141"/>
      <text:p text:style-name="P285"><text:span text:style-name="T495">Fortunately, now we have Cheerfulism </text:span><text:span text:style-name="T709">too</text:span><text:span text:style-name="T495">. </text:span><text:span text:style-name="T710">Which will allow us to understand ourselves and each other better, tame our instincts, and coordinate based on cooperation </text:span><text:span text:style-name="T711">as much as possible </text:span><text:span text:style-name="T710">and not based o</text:span><text:span text:style-name="T712">n </text:span><text:span text:style-name="T710">domination like </text:span><text:span text:style-name="T713">junkies on the street</text:span><text:span text:style-name="T710">.</text:span><text:span text:style-name="T495"> </text:span><text:span text:style-name="T709">More on chapter 7.</text:span></text:p>
      <text:p text:style-name="P142"/>
      <text:p text:style-name="P142"><text:span text:style-name="T770">S</text:span><text:span text:style-name="T771">o, d</text:span>oes <text:span text:style-name="T772">all </text:span>this make libertarianism actually something good <text:span text:style-name="T773">i</text:span>n concept <text:span text:style-name="T774">that </text:span>has just been misunderstood? Is it truly flawed?</text:p>
      <text:p text:style-name="P142"/>
      <text:p text:style-name="P143"><text:soft-page-break/>Indeed, it has just been inadequately explained and misunderstood. <text:span text:style-name="T775">This has lead to the appearance of similar risks to the ones </text:span><text:span text:style-name="T776">described</text:span><text:span text:style-name="T775">. </text:span>As <text:span text:style-name="T777">mentioned</text:span> in the previous section, libertarianism is really <text:span text:style-name="T778">logically</text:span> optimal.</text:p>
      <text:p text:style-name="P143"/>
      <text:p text:style-name="P144"><text:span text:style-name="T779">All </text:span><text:span text:style-name="T780">these</text:span><text:span text:style-name="T779"> inefficiencies</text:span> would not have happened, <text:span text:style-name="T781">or </text:span><text:span text:style-name="T780">they</text:span><text:span text:style-name="T781"> would have happened way less </text:span><text:span text:style-name="T782">frequently</text:span><text:span text:style-name="T781">,</text:span> in a Cheerful society. <text:span text:style-name="T782">O</text:span>ne where people care <text:span text:style-name="T783">as much as they can </text:span>about detail, <text:span text:style-name="T784">about </text:span>seek<text:span text:style-name="T784">ing</text:span> detail, seek<text:span text:style-name="T784">ing </text:span>understanding, question<text:span text:style-name="T785">ing</text:span>, <text:span text:style-name="T786">explor</text:span><text:span text:style-name="T785">ing</text:span> and all under the common goal of happiness.</text:p>
      <text:p text:style-name="P224"/>
      <text:p text:style-name="P262"><text:bookmark-start text:name="5.2.2.4.1.- happines over freedom"/>5.2.2.4.1.- Why happiness over freedom?<text:bookmark-end text:name="5.2.2.4.1.- happines over freedom"/></text:p>
      <text:p text:style-name="P145"/>
      <text:p text:style-name="P286"><text:span text:style-name="T495">If you get clever enough, you can </text:span><text:span text:style-name="T714">deduce similar risks</text:span><text:span text:style-name="T495"> for people who </text:span><text:span text:style-name="T715">fix</text:span><text:span text:style-name="T495"> as the core priority happiness. So why should we chose happiness over freedom?</text:span></text:p>
      <text:p text:style-name="P146"/>
      <text:p text:style-name="P287"><text:span text:style-name="T495">First, it </text:span><text:span text:style-name="T716">is</text:span><text:span text:style-name="T495"> not one or the other, it is which one should we prioritize and use as the main guidance.</text:span></text:p>
      <text:p text:style-name="P124"/>
      <text:p text:style-name="P288"><text:span text:style-name="T495">I think a better engine, a better core principle that leads to more human well-being can be reached if we focus </text:span><text:span text:style-name="T717">mainly on</text:span><text:span text:style-name="T495"> happiness and not </text:span><text:span text:style-name="T717">on </text:span><text:span text:style-name="T495">freedom, because it is more natural and it</text:span><text:span text:style-name="T716">s search</text:span><text:span text:style-name="T495"> is </text:span><text:span text:style-name="T716">always </text:span><text:span text:style-name="T495">real, all the time, </text:span><text:span text:style-name="T718">regardless</text:span><text:span text:style-name="T495">.</text:span></text:p>
      <text:p text:style-name="P124"/>
      <text:p text:style-name="P288"><text:span text:style-name="T495">Sure, </text:span><text:span text:style-name="T714">only</text:span><text:span text:style-name="T495"> after survival is granted. </text:span><text:span text:style-name="T719">But freedom operates </text:span><text:span text:style-name="T718">in </text:span><text:span text:style-name="T719">the same way, no-one seeks freedom when they starve, they seek food. </text:span><text:span text:style-name="T718">I’m assuming granted survival as said earlier.</text:span></text:p>
      <text:p text:style-name="P147"/>
      <text:p text:style-name="P289"><text:span text:style-name="T719">P</text:span><text:span text:style-name="T495">eople gather and party together, they bond together, because they are ultimately feeling happy, not because they are feeling free. Freedom can make you feel happy, and that is why we ultimately like it </text:span><text:span text:style-name="T720">and can get addicted to it</text:span><text:span text:style-name="T495">. Not vice-versa.</text:span></text:p>
      <text:p text:style-name="P148"/>
      <text:p text:style-name="P290"><text:span text:style-name="T495">Any source of happiness brings the risk of addiction with it. Some are easier to </text:span><text:span text:style-name="T721">f</text:span><text:span text:style-name="T495">all into, some are harder, but all do bring the risk. </text:span><text:span text:style-name="T722">This is another reason why we must not ignore the intelligence part.</text:span></text:p>
      <text:p text:style-name="P148"/>
      <text:p text:style-name="P291"><text:span text:style-name="T495">Regardless of freedom seekers or protection seekers, if you seek happiness, you can talk to both and they will not perceive you as the other, because you have common ground. Because happiness is a deeper shared truth, it can help us coordinate with less conflict </text:span><text:span text:style-name="T723">too</text:span><text:span text:style-name="T495">.</text:span></text:p>
      <text:p text:style-name="P149"/>
      <text:p text:style-name="P292"><text:span text:style-name="T495">As a metaphor for this. Libertarianism and socialism are a couple that broke up due </text:span><text:span text:style-name="T724">to </text:span><text:span text:style-name="T495">misunderstandings and lack of communication lead arguments. Cheerfulism would be the common friend who still hangs out with both, </text:span><text:span text:style-name="T725">which is </text:span><text:span text:style-name="T724">listened </text:span><text:span text:style-name="T726">by</text:span><text:span text:style-name="T724"> and listens to both,</text:span><text:span text:style-name="T495"> and has the capability of fixing the relationship in the future.</text:span></text:p>
      <text:p text:style-name="P148"/>
      <text:p text:style-name="P293"><text:span text:style-name="T495">When we guide ourselves based on deeper principles </text:span><text:span text:style-name="T727">that always hold</text:span><text:span text:style-name="T495">, we can reach </text:span><text:span text:style-name="T728">deeper understanding</text:span><text:span text:style-name="T729">s</text:span><text:span text:style-name="T728"> a</text:span><text:span text:style-name="T727">n</text:span><text:span text:style-name="T728">d reach </text:span><text:span text:style-name="T495">greater goals </text:span><text:span text:style-name="T730">by crafting more effective and complex solutions</text:span><text:span text:style-name="T495">.</text:span><text:span text:style-name="T717"> </text:span><text:span text:style-name="T728">And for successful guidance, r</text:span><text:span text:style-name="T731">egardless of what is the core you choose, </text:span><text:span text:style-name="T728">regardless of freedom or happiness,</text:span><text:span text:style-name="T731"> </text:span><text:span text:style-name="T728">you have to </text:span><text:span text:style-name="T732">mix it with the</text:span><text:span text:style-name="T731"> maximization of intelligence </text:span><text:span text:style-name="T733">for optimal well-being </text:span><text:span text:style-name="T734">and being able to handle chaos and uncertainty, </text:span><text:span text:style-name="T735">which conform risk</text:span><text:span text:style-name="T732">. </text:span><text:span text:style-name="T727">Cheerfulism is both, happiness and intelligence.</text:span></text:p>
      <text:p text:style-name="P147"/>
      <text:p text:style-name="P294"><text:span text:style-name="T736">I </text:span><text:span text:style-name="T495">do not dislike freedom, </text:span><text:span text:style-name="T737">as said I’m an advocate for libertarianism but I acknowledge its imperfections.</text:span><text:span text:style-name="T495"> </text:span><text:span text:style-name="T737">Libertarianism is build upon a belief, like a religion. That is not good nor bad, that is just how humans operate. </text:span><text:span text:style-name="T495">I do </text:span><text:span text:style-name="T738">sometimes</text:span><text:span text:style-name="T495"> use </text:span><text:span text:style-name="T737">libertarianism</text:span><text:span text:style-name="T495"> and guide myself taking it into account, because it is natural </text:span><text:span text:style-name="T737">to do so</text:span><text:span text:style-name="T495">.</text:span></text:p>
      <text:p text:style-name="P150"/>
      <text:p text:style-name="P294"><text:span text:style-name="T737">But ultimately I’m Cheerful,</text:span><text:span text:style-name="T495"> I can only think of deeper principles always true when I think of happiness, and that, overall, always leads to more </text:span><text:span text:style-name="T737">understanding that has greater potential of </text:span><text:span text:style-name="T495">prosperity.</text:span></text:p>
      <text:p text:style-name="P150"/>
      <text:p text:style-name="P294"><text:span text:style-name="T495">As a scientific parallelism, some Einst</text:span><text:span text:style-name="T739">e</text:span><text:span text:style-name="T495">in equations can be </text:span><text:span text:style-name="T739">“simplified”</text:span><text:span text:style-name="T495"> logically and correctly </text:span><text:span text:style-name="T739">in</text:span><text:span text:style-name="T495">to </text:span><text:span text:style-name="T739">Newton’s</text:span><text:span text:style-name="T495"> ones. This doe not mean Newton is always wrong, the same way in which putting individual freedom at the core is not always wrong, it just means that Einstein’s equations hold true for a larger set of reality’s contexts. Happiness focus would be Einstein, </text:span><text:soft-page-break/><text:span text:style-name="T495">Newton would be freedom </text:span><text:span text:style-name="T740">focus</text:span><text:span text:style-name="T495">. </text:span><text:span text:style-name="T739">However</text:span><text:span text:style-name="T495">, you need to be intelligent to discover and use any of them.</text:span></text:p>
      <text:p text:style-name="P150"/>
      <text:p text:style-name="P295"><text:span text:style-name="T495">Sure, the same way I </text:span><text:span text:style-name="T739">messed around with </text:span><text:span text:style-name="T495">libertarianism, you can criticiz</text:span><text:span text:style-name="T739">e</text:span><text:span text:style-name="T495">, let’s </text:span><text:span text:style-name="T739">c</text:span><text:span text:style-name="T495">all it happynism, using only happiness as guidance. </text:span><text:span text:style-name="T739">The simplest example </text:span><text:span text:style-name="T741">of a risk of that is</text:span><text:span text:style-name="T739"> </text:span><text:span text:style-name="T495">someone deciding to abuse drugs to be happy </text:span><text:span text:style-name="T739">and then he drives on drugs and damages someone else accidentally</text:span><text:span text:style-name="T495">. The same way someone ca</text:span><text:span text:style-name="T739">n</text:span><text:span text:style-name="T495"> abuse others for the sake of “I’m the sole builder of my life path”, </text:span><text:span text:style-name="T739">they can do so by thinking “I have to be happy”</text:span><text:span text:style-name="T495">. </text:span><text:span text:style-name="T742">This is what intelligence maximization is meant to minimize, more on how later.</text:span></text:p>
      <text:p text:style-name="P151"/>
      <text:p text:style-name="P295"><text:span text:style-name="T495">Sure, we can create a new philosophy, libertarianism mixed with intelligence maximization, let’s call it libertynism. But still I think Cheerfulism, happine</text:span><text:span text:style-name="T743">s</text:span><text:span text:style-name="T495">s with maximized intelligence is superior, due to focusing on deeper truths, in th</text:span><text:span text:style-name="T743">e</text:span><text:span text:style-name="T495"> sense </text:span><text:span text:style-name="T743">that they </text:span><text:span text:style-name="T495">hold true in more contexts of reality </text:span><text:span text:style-name="T744">and that they even conform part of the truth of freedom</text:span><text:span text:style-name="T495">.</text:span></text:p>
      <text:p text:style-name="P151"/>
      <text:p text:style-name="P296"><text:span text:style-name="T495">Eve</text:span><text:span text:style-name="T745">n</text:span><text:span text:style-name="T495"> when freedom leads to periods of pain, people still </text:span><text:span text:style-name="T745">choose to </text:span><text:span text:style-name="T495">face them because ultimately they will get the chemical reward of happiness. </text:span><text:span text:style-name="T746">So they should not forget about it.</text:span></text:p>
      <text:p text:style-name="P152"/>
      <text:p text:style-name="P297"><text:span text:style-name="T746">I </text:span><text:span text:style-name="T495">think of freedom as a </text:span><text:span text:style-name="T743">more shallow guide</text:span><text:span text:style-name="T495">. And as human</text:span><text:span text:style-name="T747">s</text:span><text:span text:style-name="T495"> become more intelligent, they will seek </text:span><text:span text:style-name="T743">deeper </text:span><text:span text:style-name="T748">and </text:span><text:span text:style-name="T743">more complex ones, </text:span><text:span text:style-name="T749">like happiness.</text:span></text:p>
      <text:p text:style-name="P153"/>
      <text:p text:style-name="P298"><text:span text:style-name="T495">I choose Cheerfulism, but I really like libertarianism. </text:span><text:span text:style-name="T750">I</text:span><text:span text:style-name="T495">n fact in later chapters I will propose </text:span><text:span text:style-name="T750">combining both </text:span><text:span text:style-name="T495">as a </text:span><text:span text:style-name="T750">realistic </text:span><text:span text:style-name="T495">transition to utopias. I just added this section so people reading realize I’m not dogmatic and </text:span><text:span text:style-name="T751">I </text:span><text:span text:style-name="T752">can </text:span><text:span text:style-name="T495">apply rough self-criticism to my ideas, proposals </text:span><text:span text:style-name="T753">and tende</text:span><text:span text:style-name="T754">n</text:span><text:span text:style-name="T753">cies</text:span><text:span text:style-name="T495">. </text:span><text:span text:style-name="T751">Just like an engineer re-defines systems and goes back and forth when thinking.</text:span></text:p>
      <text:p text:style-name="P250"/>
      <text:p text:style-name="P250"/>
      <text:p text:style-name="P251">FROM THE PEACE CHAPTER, REMOVED:</text:p>
      <text:p text:style-name="P263"><text:span text:style-name="T798">People who reject this fact </text:span><text:span text:style-name="T799">will throw data at you on how the well-being and wealth has increased over the last hundred years. But they will ultimately undermine the fact that the improvement </text:span><text:span text:style-name="T800">indeed</text:span><text:span text:style-name="T799"> was allowed by freer markets, but it ultimately, at the real core, it came from the improvements in the amount of information we can process </text:span><text:span text:style-name="T800">and the improvement of ou</text:span><text:span text:style-name="T801">r</text:span><text:span text:style-name="T800"> intelligence</text:span><text:span text:style-name="T799">, not only and purely </text:span><text:span text:style-name="T802">from</text:span><text:span text:style-name="T799"> the amount of money we can process </text:span><text:span text:style-name="T803">or posses</text:span><text:span text:style-name="T799">.</text:span></text:p>
      <text:p text:style-name="P263"/>
      <text:p text:style-name="P264">As said, more freedom is not <text:span text:style-name="T804">necessarily </text:span>more good, only if you are intelligent enough. The new era of information processing just allowed us to access more information, to train our brains in more intelligent ways. And this, linked to the <text:span text:style-name="T805">natural </text:span>fact that we all are humans, made us more clearly realize that the others are not others, thus we strove for the improvement of the world, and “free” markets allowed it.</text:p>
      <text:p text:style-name="P264"/>
      <text:p text:style-name="P264"><text:span text:style-name="T805">They</text:span> <text:span text:style-name="T805">were </text:span>a natural consequence, not the natural cause. <text:span text:style-name="T804">Now both, </text:span><text:span text:style-name="T806">cause and consequence </text:span><text:span text:style-name="T804">are in action and fuel one another, but we are reaching the limits </text:span><text:span text:style-name="T807">and </text:span><text:span text:style-name="T808">we have stopped reducing the </text:span><text:span text:style-name="T809">amount of </text:span><text:span text:style-name="T808">conflicts</text:span><text:span text:style-name="T807">. </text:span><text:span text:style-name="T806">B</text:span><text:span text:style-name="T804">ecause our information processing capabilities </text:span><text:span text:style-name="T810">were</text:span><text:span text:style-name="T804"> reaching the limit</text:span><text:span text:style-name="T810">s</text:span><text:span text:style-name="T804">, not because we </text:span><text:span text:style-name="T805">must</text:span><text:span text:style-name="T804"> need more freedom. </text:span><text:span text:style-name="T811">The recent advancements in AI </text:span><text:span text:style-name="T812">that unlock more information access </text:span><text:span text:style-name="T811">will </text:span><text:span text:style-name="T813">still </text:span><text:span text:style-name="T811">fuel the illusion </text:span><text:span text:style-name="T813">for some years </text:span><text:span text:style-name="T811">that freedom is at the core </text:span><text:span text:style-name="T814">though</text:span><text:span text:style-name="T811">, but it isn’t.</text:span></text:p>
      <text:p text:style-name="P264"/>
      <text:p text:style-name="P265">Freedom might be the thing that allows for greater <text:span text:style-name="T815">limits of </text:span>intelligence to develop, but if not develop<text:span text:style-name="T816">ed</text:span> you <text:span text:style-name="T816">risk </text:span>mess<text:span text:style-name="T816">ing</text:span> up your life. <text:span text:style-name="T817">Prioritizing </text:span><text:span text:style-name="T816">freedom</text:span><text:span text:style-name="T817"> is just sub optimal </text:span><text:span text:style-name="T816">to</text:span><text:span text:style-name="T817"> maximizing intelligence, </text:span><text:span text:style-name="T816">getting happiness </text:span><text:span text:style-name="T817">and then if needed, which will be needed because we get bored and then explore by default, go for freedom.</text:span></text:p>
      <text:p text:style-name="P265"/>
      <text:p text:style-name="P265"><text:span text:style-name="T817">Prioritizing freedom in practice leads to abuse to the ones who are not intelligent enough </text:span><text:span text:style-name="T818">or adapt slower</text:span><text:span text:style-name="T817">, creating uncontrolled chaos that </text:span><text:span text:style-name="T818">eventually </text:span><text:span text:style-name="T817">retaliates. I can not assure it, but being Cheerful would be more optimal, it is like when </text:span><text:span text:style-name="T818">a </text:span><text:span text:style-name="T817">colonization </text:span><text:span text:style-name="T818">event happens.</text:span><text:span text:style-name="T817"> </text:span><text:span text:style-name="T818">I</text:span><text:span text:style-name="T817">f no or minimal abuse is made, no future strong destabilizing movements will ever </text:span><text:span text:style-name="T818">emerge </text:span><text:span text:style-name="T817">and </text:span><text:span text:style-name="T818">thus</text:span><text:span text:style-name="T817"> we will reach optimal coordination earlier.</text:span></text:p>
      <text:p text:style-name="P265"/>
      <text:p text:style-name="P265"><text:span text:style-name="T817">Nowadays, blinded by thinking capital and growth is at the core, we are internationally abusing each other, creating a natural counterforce of </text:span><text:span text:style-name="T818">stronger Statism</text:span><text:span text:style-name="T819">s</text:span><text:span text:style-name="T817"> </text:span><text:span text:style-name="T818">and </text:span><text:span text:style-name="T820">n</text:span><text:span text:style-name="T818">ationalisms</text:span><text:span text:style-name="T817"> to balan</text:span><text:span text:style-name="T818">c</text:span><text:span text:style-name="T817">e things out and </text:span><text:span text:style-name="T821">help the ones in need to </text:span><text:span text:style-name="T817">adapt </text:span><text:span text:style-name="T821">slower.</text:span></text:p>
      <text:p text:style-name="P265"><text:soft-page-break/></text:p>
      <text:p text:style-name="P265"><text:span text:style-name="T822">If we were Cheerful, we would coordinate better, opposing nations would understand and respect each other more and succes</text:span><text:span text:style-name="T818">s</text:span><text:span text:style-name="T822">fully, without threats, with less conflict and more diplomacy. </text:span><text:span text:style-name="T823">Because no-one is </text:span><text:span text:style-name="T824">consciously </text:span><text:span text:style-name="T823">Cheerful yet, I can not show it with historical data, but it makes sense </text:span><text:span text:style-name="T818">so far</text:span><text:span text:style-name="T823">.</text:span></text:p>
      <text:p text:style-name="P265"/>
      <text:p text:style-name="P266">Cheerfulism is to libertarianism, <text:span text:style-name="T825">in the philosoph</text:span><text:span text:style-name="T818">i</text:span><text:span text:style-name="T825">cal</text:span><text:span text:style-name="T826"> </text:span><text:span text:style-name="T825">realm</text:span><text:span text:style-name="T826">,</text:span> what anarchy is to democracy <text:span text:style-name="T825">in </text:span><text:span text:style-name="T827">the</text:span><text:span text:style-name="T825"> power realm. </text:span><text:span text:style-name="T818">T</text:span>he next level of complexity, <text:span text:style-name="T828">the next step, </text:span>which if done <text:span text:style-name="T829">it </text:span>will be better. And, contrary to anarchism, Cheerfulism is very clear, basic and doable. Just think like an engineer <text:span text:style-name="T830">to maximize your intelligence </text:span>and know what makes you happy. Everything else <text:span text:style-name="T818">will </text:span>just follow <text:span text:style-name="T818">if you are not </text:span><text:span text:style-name="T831">alone and/or </text:span><text:span text:style-name="T832">too </text:span><text:span text:style-name="T818">dumb</text:span>.</text:p>
      <text:p text:style-name="P263"/>
      <text:p text:style-name="P263"><text:span text:style-name="T833">A</text:span><text:span text:style-name="T834">nother fact is that lots of </text:span><text:span text:style-name="T833">libertarians </text:span><text:span text:style-name="T834">are actually </text:span><text:span text:style-name="T835">very intelligent people, </text:span><text:span text:style-name="T836">so </text:span><text:span text:style-name="T835">there must be something deeper that blinds them, it must be an instinct. </text:span><text:span text:style-name="T834">T</text:span><text:span text:style-name="T835">he human instinct of tending not to care about what is perceived as the others, </text:span><text:span text:style-name="T834">in this case, there is even no other</text:span><text:span text:style-name="T837">s</text:span><text:span text:style-name="T834"> to perceive, it is an invisible hand, an emergent always objectively good phenomena. But it isn’t, the coordination comes from desires, which are subjective and made true by human power.</text:span></text:p>
      <text:p text:style-name="P263"/>
      <text:p text:style-name="P263"><text:span text:style-name="T834">So my guess is that these people are </text:span><text:span text:style-name="T835">likely </text:span><text:span text:style-name="T834">very </text:span><text:span text:style-name="T835">empathetic people who refuse to accept the </text:span><text:span text:style-name="T837">deeper complex</text:span><text:span text:style-name="T835"> truth, they crave for a solution that hurts no-one, and consciously or not, </text:span><text:span text:style-name="T838">they </text:span><text:span text:style-name="T835">choose to believe in the invisible hand. </text:span><text:span text:style-name="T834">No matter how much </text:span><text:span text:style-name="T839">simple real</text:span><text:span text:style-name="T834"> </text:span><text:span text:style-name="T839">and true </text:span><text:span text:style-name="T834">facts you throw at them, they chose not to accept it </text:span><text:span text:style-name="T837">and answer back with the data that allegedly proofs “</text:span><text:span text:style-name="T840">free” markets and </text:span><text:span text:style-name="T837">capitalism always generates well-being</text:span><text:span text:style-name="T834">.</text:span></text:p>
      <text:p text:style-name="P263"><text:s/></text:p>
      <text:p text:style-name="P267">Are you sure that a little boy from a poorer nation is better on a sweat shop rather than being on his family’s land helping grow cows? Yes? Why? Because some magic number called gross domestic product says so? Who defines that number? Oh, the greater the more things I can do to be happy because I’m richer? Therefore that is well-being? Forcing someone that “has to” do something for me because I give him imaginary numbers associated with subjective value?</text:p>
      <text:p text:style-name="P263"/>
      <text:p text:style-name="P263"><text:span text:style-name="T834">I guess </text:span><text:span text:style-name="T787">they do this because it is </text:span><text:span text:style-name="T834">not a choice, it is a natural reaction to protect them against the harm of realizing there is actually another person that will be </text:span><text:span text:style-name="T841">abused</text:span><text:span text:style-name="T834">.</text:span><text:span text:style-name="T835"> </text:span><text:span text:style-name="T834">B</text:span><text:span text:style-name="T835">ecause they actually do care and do see any other human as an equal, as a member of the tribe. </text:span><text:span text:style-name="T842">Recognizing that their method does lead to abuse</text:span><text:span text:style-name="T835"> </text:span><text:span text:style-name="T842">would make their empathetic personas feel </text:span><text:span text:style-name="T839">real deep </text:span><text:span text:style-name="T842">pain </text:span><text:span text:style-name="T839">and discomfort, and an existential crisis</text:span><text:span text:style-name="T842">.</text:span></text:p>
      <text:p text:style-name="P263"/>
      <text:p text:style-name="P263"><text:span text:style-name="T787">Libertarianism says so, everyone has the right to pursue their life path. So it makes sense that </text:span><text:span text:style-name="T788">some </text:span><text:span text:style-name="T787">followers are quite empathetic, </text:span><text:span text:style-name="T788">they see each others as equals, and then they blind themselves camouflaging the potential perverse nature of their desires by calling it invisible ha</text:span><text:span text:style-name="T789">n</text:span><text:span text:style-name="T788">d. </text:span><text:span text:style-name="T790">As said, libertarianism is aiming well, but fails sometimes when shooting. Because they chose </text:span><text:span text:style-name="T791">contradictory</text:span><text:span text:style-name="T790"> </text:span><text:span text:style-name="T791">definitions</text:span><text:span text:style-name="T790">, they had a marketing m</text:span><text:span text:style-name="T791">istake. </text:span><text:span text:style-name="T792">They failed to market their ideas, </text:span><text:span text:style-name="T793">to put them, frame them and sell them properly</text:span><text:span text:style-name="T792"> in the realm of </text:span><text:span text:style-name="T794">modern </text:span><text:span text:style-name="T792">reality, </text:span><text:span text:style-name="T795">in the </text:span><text:span text:style-name="T796">realm </text:span><text:span text:style-name="T797">of human biology’s reality </text:span><text:span text:style-name="T794">even</text:span><text:span text:style-name="T792">.</text:span></text:p>
      <text:p text:style-name="P263"/>
      <text:p text:style-name="P263"/>
      <text:p text:style-name="P268">// <text:span text:style-name="T843">deleted form 5:</text:span></text:p>
      <text:p text:style-name="P259"><text:bookmark-start text:name="5.2.2.3.- mathmodel"/><text:span text:style-name="T1">5.2.</text:span>2.<text:span text:style-name="T844">1</text:span>.- A <text:span text:style-name="T845">simple </text:span>mathematical model to understand <text:span text:style-name="T846">a</text:span> society’<text:span text:style-name="T846">s capa</text:span><text:span text:style-name="T847">b</text:span><text:span text:style-name="T846">ility</text:span> to distribute resources <text:span text:style-name="T848">effectively</text:span>.<text:bookmark-end text:name="5.2.2.3.- mathmodel"/></text:p>
      <text:p text:style-name="P154"/>
      <text:p text:style-name="P155">While trying to grasp my head around what are the factors involved in an effective resource distribution I realized there are lot of variables involved. Here I will explain the conclusions I arrived to via the development of a simple mathematical model.</text:p>
      <text:p text:style-name="P155"/>
      <text:p text:style-name="P155">Overall, when I was done thinking, I realized the key is always to measure it in <text:span text:style-name="T849">how much variables you can handle per variable</text:span><text:span text:style-name="T850">s</text:span><text:span text:style-name="T849"> needed to be handled. </text:span>This just meant, give each problem of resource distribution to someone intelligent enough to solve it correct it.</text:p>
      <text:p text:style-name="P155"/>
      <text:p text:style-name="P156">This is very generic statement, it is basically the basic measurement on if someone will be able to solve a problem or not.</text:p>
      <text:p text:style-name="P157"/>
      <text:p text:style-name="P156"><text:soft-page-break/>The interesting thing comes when you slowly substitute the variables into others that represent meaningful parameters that help your brain reason or at least take into account all real life factors, like technological development, which result in a better resource distribution.</text:p>
      <text:p text:style-name="P157"/>
      <text:p text:style-name="P156">So, this section is not mainly about a working model or cool math that unveils truth. But a description of all parameters that influence resource distribution expressed in math.</text:p>
      <text:p text:style-name="P157"/>
      <text:p text:style-name="P157">There are a bunch of variables on the latest explanations. If you read them, understand them, and do it multiple times, thinking about it will become intuitive. Yet <text:span text:style-name="T851">doing the analysis </text:span>via just <text:s/>words, as there are <text:span text:style-name="T851">quite a bunch of </text:span>variables, <text:span text:style-name="T851">can </text:span>take more time than if done via equations.</text:p>
      <text:p text:style-name="P154"/>
      <text:p text:style-name="P154"><text:span text:style-name="T852">So, here </text:span><text:span text:style-name="T853">I will use an equation to </text:span>clearly <text:span text:style-name="T853">visualize </text:span>all these essential relations in the problem of resource distribution.</text:p>
      <text:p text:style-name="P158"/>
      <text:p text:style-name="P158"><text:span text:style-name="T854">The following equation is </text:span>representing how well a group of people, a society, organize<text:span text:style-name="T855">s</text:span> resources, <text:span text:style-name="T849">this is measured on how much variables you can handle per variable</text:span><text:span text:style-name="T850">s</text:span><text:span text:style-name="T849"> needed to be handled:</text:span></text:p>
      <text:p text:style-name="P160">f(v, V) = v / V</text:p>
      <text:p text:style-name="P158"/>
      <text:p text:style-name="P237">v = variables your society can handle</text:p>
      <text:p text:style-name="P237">V = <text:span text:style-name="T856">amount of variables</text:span> that need to be handled</text:p>
      <text:p text:style-name="P161"/>
      <text:p text:style-name="P162">The greater the output the better your society manages resources. <text:span text:style-name="T857">For a greater output we must increase the numerator of the division </text:span><text:span text:style-name="T858">or decrease the denominator</text:span><text:span text:style-name="T857">. And for a smaller output we must increase the denominator </text:span><text:span text:style-name="T858">or </text:span><text:span text:style-name="T859">decrease</text:span><text:span text:style-name="T858"> the numerator.</text:span></text:p>
      <text:p text:style-name="P162"/>
      <text:p text:style-name="P163">Note that, as with the power dynamics equation, I’m just describing the relations between variable<text:span text:style-name="T851">s</text:span>, I’m not saying <text:span text:style-name="T860">that </text:span>they are 100% like this in real life. Some multiplications might be exponential, or some divisions <text:span text:style-name="T861">might be</text:span> subtractions etc. <text:span text:style-name="T862">This equation is not meant to fully reflect reality like a physics equati</text:span><text:span text:style-name="T863">on. It is </text:span><text:span text:style-name="T862">just </text:span><text:span text:style-name="T863">meant </text:span><text:span text:style-name="T862">to fully help an individual to guide </text:span><text:span text:style-name="T864">its </text:span><text:span text:style-name="T863">reasoning </text:span><text:span text:style-name="T862">about reality.</text:span></text:p>
      <text:p text:style-name="P162"/>
      <text:p text:style-name="P161">I will start describing each variable in the equation with the components its composed by. Slightly making the equation more complex to fully and intuitively represent the relations of all concepts mentioned earlier, these are:</text:p>
      <text:p text:style-name="P54"/>
      <text:p text:style-name="P226">t = <text:span text:style-name="T865">degree of </text:span>technological advancement</text:p>
      <text:p text:style-name="P226">i<text:span text:style-name="T866">c</text:span> = intelligence of the <text:span text:style-name="T866">citizens</text:span>, <text:span text:style-name="T867">amount of </text:span><text:span text:style-name="T868">variables </text:span><text:span text:style-name="T869">each </text:span><text:span text:style-name="T866">citizen </text:span><text:span text:style-name="T869">can handle</text:span></text:p>
      <text:p text:style-name="P227">cp = citizen population</text:p>
      <text:p text:style-name="P228">vc = variables handled per citizen</text:p>
      <text:p text:style-name="P229"><text:span text:style-name="T867">ip = </text:span>intelligence of the political class, <text:span text:style-name="T867">amount of </text:span><text:span text:style-name="T868">variables </text:span><text:span text:style-name="T869">each </text:span><text:span text:style-name="T867">politician </text:span><text:span text:style-name="T869">can handle</text:span></text:p>
      <text:p text:style-name="P230">pp = political <text:span text:style-name="T870">class </text:span>population</text:p>
      <text:p text:style-name="P229"><text:span text:style-name="T867">v</text:span>p = <text:span text:style-name="T871">variables handled per politician</text:span></text:p>
      <text:p text:style-name="P55"/>
      <text:p text:style-name="P56">I also mentioned other factors which arise from these ones. <text:span text:style-name="T872">You don’t need to </text:span><text:span text:style-name="T873">mathematically</text:span><text:span text:style-name="T872"> try to make sense of these now</text:span>:</text:p>
      <text:p text:style-name="P57"/>
      <text:p text:style-name="P58"><text:span text:style-name="T874">VP</text:span> = <text:span text:style-name="T24">variables </text:span><text:span text:style-name="T25">that can be </text:span><text:span text:style-name="T24">handled by the </text:span><text:span text:style-name="T23">politicians</text:span><text:span text:style-name="T24"> = </text:span><text:span text:style-name="T26"><text:s/></text:span><text:span text:style-name="T27">i</text:span><text:span text:style-name="T23">p</text:span><text:span text:style-name="T26"> * </text:span><text:span text:style-name="T23">p</text:span><text:span text:style-name="T28">p</text:span></text:p>
      <text:p text:style-name="P231"><text:span text:style-name="T875">P</text:span><text:span text:style-name="T876">c</text:span> = <text:span text:style-name="T875">political </text:span>centralization factor = <text:span text:style-name="T877"><text:s/></text:span><text:span text:style-name="T878">(</text:span><text:span text:style-name="T874">VP</text:span><text:span text:style-name="T879"> <text:s/></text:span><text:span text:style-name="T878">/ </text:span><text:span text:style-name="T867">v</text:span><text:span text:style-name="T880">p</text:span><text:span text:style-name="T881">)</text:span></text:p>
      <text:p text:style-name="P232">VC = variables <text:span text:style-name="T882">that can be </text:span>handled by the <text:span text:style-name="T883">citizens</text:span> = <text:span text:style-name="T853"><text:s/></text:span><text:span text:style-name="T884">i</text:span><text:span text:style-name="T866">c</text:span><text:span text:style-name="T853"> * </text:span><text:span text:style-name="T885">c</text:span><text:span text:style-name="T866">p</text:span></text:p>
      <text:p text:style-name="P231"><text:span text:style-name="T875">C</text:span><text:span text:style-name="T876">c</text:span> = <text:span text:style-name="T886">civil</text:span><text:span text:style-name="T875"> </text:span>centralization factor = <text:span text:style-name="T877"><text:s/></text:span><text:span text:style-name="T878">(</text:span><text:span text:style-name="T887">VC </text:span><text:span text:style-name="T878">/ </text:span><text:span text:style-name="T867">v</text:span><text:span text:style-name="T875">c</text:span><text:span text:style-name="T881">)</text:span></text:p>
      <text:p text:style-name="P233">I = intelligence of all society = ic + ip</text:p>
      <text:p text:style-name="P59"/>
      <text:p text:style-name="P164">Alright, these are all the factors, let’s start adding them to the equation:</text:p>
      <text:p text:style-name="P165"/>
      <text:p text:style-name="P166">This:</text:p>
      <text:p text:style-name="P166"><draw:frame draw:style-name="fr2" draw:name="Image14" text:anchor-type="char" svg:width="1.5102in" svg:height="0.552in" draw:z-index="8"><draw:image xlink:href="Pictures/100000010000009100000035325FCC03EB92ED1C.png" xlink:type="simple" xlink:show="embed" xlink:actuate="onLoad" draw:mime-type="image/png"/></draw:frame></text:p>
      <text:p text:style-name="P160"/>
      <text:p text:style-name="P160"/>
      <text:p text:style-name="P160"/>
      <text:p text:style-name="P160">f(v, V) = v / V</text:p>
      <text:p text:style-name="P166"/>
      <text:p text:style-name="P166"><text:soft-page-break/>Becomes:</text:p>
      <text:p text:style-name="P166"><draw:frame draw:style-name="fr2" draw:name="Image13" text:anchor-type="char" svg:width="3.1043in" svg:height="0.6772in" draw:z-index="7"><draw:image xlink:href="Pictures/100000010000012A00000041E5362E858C8CBB3B.png" xlink:type="simple" xlink:show="embed" xlink:actuate="onLoad" draw:mime-type="image/png"/></draw:frame></text:p>
      <text:p text:style-name="P159"/>
      <text:p text:style-name="P159"/>
      <text:p text:style-name="P159"/>
      <text:p text:style-name="P159"/>
      <text:p text:style-name="P159">f(<text:span text:style-name="T888">t, </text:span><text:span text:style-name="T889">I</text:span><text:span text:style-name="T888">, </text:span><text:span text:style-name="T890">Cc</text:span><text:span text:style-name="T888">, </text:span><text:span text:style-name="T890">Pc</text:span><text:span text:style-name="T888">, </text:span><text:span text:style-name="T889">V</text:span>) = <text:span text:style-name="T891">(</text:span><text:span text:style-name="T884">(</text:span>t^<text:span text:style-name="T892">I</text:span><text:span text:style-name="T884">)</text:span> * <text:span text:style-name="T893">Cc</text:span><text:span text:style-name="T894"> </text:span><text:span text:style-name="T877">* </text:span><text:span text:style-name="T893">Pc</text:span><text:span text:style-name="T891">) </text:span>/ <text:span text:style-name="T895">V</text:span></text:p>
      <text:p text:style-name="P159"/>
      <text:p text:style-name="P164">As you can see, now the amount of variables that a society can handle <text:span text:style-name="T896">(</text:span><text:span text:style-name="T29">v</text:span><text:span text:style-name="T896">) has been broken down into the degree of technological advancement (</text:span><text:span text:style-name="T29">t</text:span><text:span text:style-name="T896">), the total intelligence of the society (</text:span><text:span text:style-name="T29">I </text:span><text:span text:style-name="T896">), the </text:span><text:span text:style-name="T897">civil centralization factor </text:span><text:span text:style-name="T896">(</text:span><text:span text:style-name="T29">C</text:span><text:span text:style-name="T30">c</text:span><text:span text:style-name="T896">) and the </text:span><text:span text:style-name="T897">political </text:span><text:span text:style-name="T896">centralization factor (</text:span><text:span text:style-name="T30">Pc</text:span><text:span text:style-name="T896">).</text:span></text:p>
      <text:p text:style-name="P164"/>
      <text:p text:style-name="P167">All of these are part of the numerator, so the greater they are the bigger the output.</text:p>
      <text:p text:style-name="P167"/>
      <text:p text:style-name="P168"><text:span text:style-name="T898">So </text:span>we can see that the higher the degree of technological advancement the greater the output will be, thus this means the better your resource distribution capabilities <text:span text:style-name="T851">are</text:span>.</text:p>
      <text:p text:style-name="P168"/>
      <text:p text:style-name="P168">We also see that intelligence also contributes to increasing technological advancement. <text:span text:style-name="T898">Because </text:span><text:span text:style-name="T31">t</text:span> <text:span text:style-name="T898">is powered to the </text:span><text:span text:style-name="T31">I</text:span><text:span text:style-name="T898">. </text:span>So the more we increase intelligence, not only we increase technological advancement, but also how well we distribute resources. Because the amount of variables we can handle <text:span text:style-name="T899">(</text:span><text:span text:style-name="T32">v</text:span><text:span text:style-name="T899">)</text:span>, compared to the ones we need to handle <text:span text:style-name="T900">(</text:span><text:span text:style-name="T33">V </text:span><text:span text:style-name="T900">)</text:span>, is greater.</text:p>
      <text:p text:style-name="P168"/>
      <text:p text:style-name="P169"><text:span text:style-name="T901">We also see that </text:span>the greater the <text:span text:style-name="T902">political </text:span>centralization <text:span text:style-name="T902">factor </text:span><text:span text:style-name="T903">(</text:span><text:span text:style-name="T34">Pc</text:span><text:span text:style-name="T903">)</text:span>, the greater the output too… Wait, didn’t we logically deduced from biological principles <text:span text:style-name="T851">that </text:span>the opposite <text:span text:style-name="T851">can oc</text:span><text:span text:style-name="T904">c</text:span><text:span text:style-name="T851">ur </text:span><text:span text:style-name="T905">too</text:span>? <text:span text:style-name="T903">Indeed, the key is that </text:span><text:span text:style-name="T34">Pc</text:span><text:span text:style-name="T903"> is a rational number, </text:span><text:span text:style-name="T904">as it comes from the division </text:span><text:span text:style-name="T35">(</text:span><text:span text:style-name="T36">VP</text:span><text:span text:style-name="T37"> <text:s/></text:span><text:span text:style-name="T35">/ </text:span><text:span text:style-name="T38">v</text:span><text:span text:style-name="T39">p</text:span><text:span text:style-name="T40">)</text:span><text:span text:style-name="T904">,</text:span><text:span text:style-name="T903"> so its value can be smaller than 1. If you multiply </text:span><text:span text:style-name="T906">a </text:span><text:span text:style-name="T907">positive </text:span><text:span text:style-name="T906">number</text:span><text:span text:style-name="T903"> by </text:span><text:span text:style-name="T906">a number </text:span><text:span text:style-name="T903">smaller than 1 then you get a</text:span><text:span text:style-name="T908">nother</text:span><text:span text:style-name="T903"> </text:span><text:span text:style-name="T909">numbe</text:span><text:span text:style-name="T910">r</text:span><text:span text:style-name="T903"> </text:span><text:span text:style-name="T911">which</text:span><text:span text:style-name="T908"> is </text:span><text:span text:style-name="T903">smaller </text:span><text:span text:style-name="T911">than the initial one</text:span><text:span text:style-name="T903">. </text:span><text:span text:style-name="T912">Yet if </text:span><text:span text:style-name="T913">the number you use to multiply by </text:span><text:span text:style-name="T912">happens to be greater than one, the output will be bigger.</text:span></text:p>
      <text:p text:style-name="P169"/>
      <text:p text:style-name="P170">This reflects the <text:span text:style-name="T914">natural </text:span>fact that centralized entities can take <text:span text:style-name="T915">efficient</text:span> decisions <text:span text:style-name="T916">distributing resources</text:span>. <text:span text:style-name="T916">These can be measured </text:span><text:span text:style-name="T917">and seen reflected in </text:span><text:span text:style-name="T916">the factors that </text:span><text:span text:style-name="T918">describe </text:span><text:span text:style-name="T919">the</text:span><text:span text:style-name="T920"> </text:span><text:span text:style-name="T919">centralization of</text:span><text:span text:style-name="T916"> power. </text:span><text:span text:style-name="T890">The factors</text:span><text:span text:style-name="T916"> are the previously mentioned intelligence of the politicians (</text:span><text:span text:style-name="T41">ip</text:span><text:span text:style-name="T916">), number </text:span><text:span text:style-name="T921">of people in the population </text:span><text:span text:style-name="T922">pertaining</text:span><text:span text:style-name="T921"> the political class </text:span><text:span text:style-name="T916">(</text:span><text:span text:style-name="T41">pp</text:span><text:span text:style-name="T916">) and variables assigned per politician (</text:span><text:span text:style-name="T41">vp</text:span><text:span text:style-name="T916">).</text:span></text:p>
      <text:p text:style-name="P170"/>
      <text:p text:style-name="P171"><text:span text:style-name="T923">So l</text:span>et’s now break down <text:span text:style-name="T42">Pc</text:span><text:span text:style-name="T23"> </text:span>to make it all clear. <text:span text:style-name="T916">We are taking the previous equations and substituting for:</text:span></text:p>
      <text:p text:style-name="P172"><text:span text:style-name="T924">Pc</text:span><text:span text:style-name="T916"> = </text:span><text:span text:style-name="T878">(</text:span><text:span text:style-name="T925">VP</text:span><text:span text:style-name="T926"> </text:span><text:span text:style-name="T878">/ </text:span><text:span text:style-name="T867">v</text:span><text:span text:style-name="T880">p</text:span><text:span text:style-name="T881">)</text:span></text:p>
      <text:p text:style-name="P173"><text:span text:style-name="T927">As</text:span> <text:span text:style-name="T925">V</text:span><text:span text:style-name="T928">P</text:span> = ip * pp, <text:span text:style-name="T927">then </text:span>we can write</text:p>
      <text:p text:style-name="P172"><text:span text:style-name="T924">Pc</text:span><text:span text:style-name="T916"> = </text:span><text:span text:style-name="T878">(</text:span><text:span text:style-name="T884">i</text:span><text:span text:style-name="T876">p</text:span><text:span text:style-name="T853"> * </text:span><text:span text:style-name="T876">p</text:span><text:span text:style-name="T866">p</text:span><text:span text:style-name="T926"> </text:span><text:span text:style-name="T878">/ </text:span><text:span text:style-name="T867">v</text:span><text:span text:style-name="T880">p</text:span><text:span text:style-name="T881">)</text:span></text:p>
      <text:p text:style-name="P172"/>
      <text:p text:style-name="P174"><text:span text:style-name="T285">Similar</text:span><text:span text:style-name="T202"> log</text:span>ic <text:span text:style-name="T929">to the starting point </text:span>applies here, the more intelligent the politicians the better they will be, so the less likely is that <text:span text:style-name="T43">P</text:span><text:span text:style-name="T44">c</text:span><text:span text:style-name="T890">’s</text:span> value falls below 1. And the more politicians the more variables they will <text:span text:style-name="T930">be able to</text:span> handle and the less likely <text:span text:style-name="T931">too that </text:span><text:span text:style-name="T43">P</text:span><text:span text:style-name="T45">c</text:span><text:span text:style-name="T23"> <text:s/></text:span>is under 1. Yet the more <text:span text:style-name="T930">tasks are </text:span>demanded from them <text:span text:style-name="T932">(</text:span><text:span text:style-name="T46">vp</text:span><text:span text:style-name="T932">)</text:span>, the more variables they have to handle and <text:span text:style-name="T933">then </text:span>the output <text:span text:style-name="T934">of the division conforming </text:span><text:span text:style-name="T45">Pc</text:span> decreases, making it probably smaller than 1. <text:span text:style-name="T935">If so, it </text:span><text:span text:style-name="T936">overall decreases the general equation’s numerator, worsening the resource distribution capabilities of a society:</text:span></text:p>
      <text:p text:style-name="P174"/>
      <text:p text:style-name="P174"><draw:frame draw:style-name="fr2" draw:name="Image16" text:anchor-type="char" svg:width="4.2083in" svg:height="0.9063in" draw:z-index="10"><draw:image xlink:href="Pictures/100000010000019400000057C8456BCE2D2E7849.png" xlink:type="simple" xlink:show="embed" xlink:actuate="onLoad" draw:mime-type="image/png"/></draw:frame></text:p>
      <text:p text:style-name="P171"/>
      <text:p text:style-name="P218"/>
      <text:p text:style-name="P218"/>
      <text:p text:style-name="P218"/>
      <text:p text:style-name="P218"/>
      <text:p text:style-name="P60">f(<text:span text:style-name="T888">t, </text:span><text:span text:style-name="T937">I</text:span><text:span text:style-name="T888">, </text:span><text:span text:style-name="T931">Cc</text:span><text:span text:style-name="T888">, ip, </text:span><text:span text:style-name="T937">pp</text:span><text:span text:style-name="T888">, </text:span><text:span text:style-name="T937">vp, V</text:span>) = <text:span text:style-name="T891">(</text:span><text:span text:style-name="T884">(</text:span>t^<text:span text:style-name="T892">I</text:span><text:span text:style-name="T884">)</text:span> * <text:span text:style-name="T931">Cc</text:span><text:span text:style-name="T894"> </text:span><text:span text:style-name="T877">* </text:span><text:span text:style-name="T878">(</text:span><text:span text:style-name="T869">i</text:span><text:span text:style-name="T938">p * </text:span><text:span text:style-name="T878">pp/ <text:s/></text:span><text:span text:style-name="T867">v</text:span><text:span text:style-name="T880">p</text:span><text:span text:style-name="T881">)</text:span><text:span text:style-name="T891">) </text:span>/ <text:span text:style-name="T895">V</text:span></text:p>
      <text:p text:style-name="P172"/>
      <text:p text:style-name="P175">This <text:span text:style-name="T939">same yet </text:span>more complex equation, now reflects more clearly the biological limits of politicians.</text:p>
      <text:p text:style-name="P175"/>
      <text:p text:style-name="P177">Note that these centralization factors have a very similar mathematical shape to the initial: <text:span text:style-name="T23">(v / V)</text:span>. <text:span text:style-name="T940">Reaching these shapes from observing “different” facts </text:span>is not coincidence because at <text:soft-page-break/>the end of the day we are describing the same idea of humans solving problems, therefore similar factors and mechanics must apply.</text:p>
      <text:p text:style-name="P219"/>
      <text:p text:style-name="P61">Let’s now break down <text:span text:style-name="T23">Cc</text:span>, the civil centralization factor. It is meant to reflect a very similar behavior as the <text:span text:style-name="T23">Pc</text:span>, after all, politicians and citizens are all humans.</text:p>
      <text:p text:style-name="P61"/>
      <text:p text:style-name="P178"><text:span text:style-name="T941">The more variables citizens can handle (</text:span><text:span text:style-name="T47">VC</text:span><text:span text:style-name="T941">) compared to what is demanded from them (</text:span><text:span text:style-name="T47">vc</text:span><text:span text:style-name="T941">)</text:span><text:span text:style-name="T942">, the greater the output too. </text:span><text:span text:style-name="T941">As said, this reflects similar reasoning, if your capabilities are superior to the complexity brought by the amount of tasks you have to handle, then your resource distribution capability, which is the task we are trying to </text:span><text:span text:style-name="T943">understand</text:span><text:span text:style-name="T941"> now, improves.</text:span></text:p>
      <text:p text:style-name="P176"/>
      <text:p text:style-name="P179"><text:span text:style-name="T944">L</text:span>et’s <text:span text:style-name="T944">now </text:span><text:span text:style-name="T943">then </text:span>break down the <text:span text:style-name="T944">other </text:span>big component <text:span text:style-name="T48">Cc:</text:span></text:p>
      <text:p text:style-name="P238"/>
      <text:p text:style-name="P172"><text:span text:style-name="T874">C</text:span><text:span text:style-name="T924">c</text:span><text:span text:style-name="T916"> = </text:span><text:span text:style-name="T878">(</text:span><text:span text:style-name="T874">V</text:span><text:span text:style-name="T926">C </text:span><text:span text:style-name="T878">/ </text:span><text:span text:style-name="T867">v</text:span><text:span text:style-name="T880">p</text:span><text:span text:style-name="T881">)</text:span></text:p>
      <text:p text:style-name="P173"><text:span text:style-name="T927">A</text:span>s <text:span text:style-name="T943">VC</text:span> = i<text:span text:style-name="T943">c</text:span> * <text:span text:style-name="T943">cp</text:span>, <text:span text:style-name="T927">then</text:span> we can write</text:p>
      <text:p text:style-name="P172"><text:span text:style-name="T927">C</text:span><text:span text:style-name="T924">c</text:span><text:span text:style-name="T916"> = </text:span><text:span text:style-name="T878">(</text:span><text:span text:style-name="T890">i</text:span><text:span text:style-name="T943">c</text:span><text:span text:style-name="T890"> * </text:span><text:span text:style-name="T943">cp </text:span><text:span text:style-name="T878">/ </text:span><text:span text:style-name="T867">v</text:span><text:span text:style-name="T880">p</text:span><text:span text:style-name="T881">)</text:span></text:p>
      <text:p text:style-name="P220"/>
      <text:p text:style-name="P62">The overall equations looks now like:</text:p>
      <text:p text:style-name="P62"/>
      <text:p text:style-name="P62"><draw:frame draw:style-name="fr2" draw:name="Image17" text:anchor-type="char" svg:width="5.0417in" svg:height="0.8437in" draw:z-index="11"><draw:image xlink:href="Pictures/10000001000001E40000005120AF2C283271E425.png" xlink:type="simple" xlink:show="embed" xlink:actuate="onLoad" draw:mime-type="image/png"/></draw:frame></text:p>
      <text:p text:style-name="P159"/>
      <text:p text:style-name="P159"/>
      <text:p text:style-name="P159"/>
      <text:p text:style-name="P159"/>
      <text:p text:style-name="P159"/>
      <text:p text:style-name="P159">f(<text:span text:style-name="T888">t, </text:span><text:span text:style-name="T937">I</text:span><text:span text:style-name="T888">, </text:span><text:span text:style-name="T945">ic</text:span><text:span text:style-name="T888">, </text:span><text:span text:style-name="T945">cp,</text:span><text:span text:style-name="T888"> ip, </text:span><text:span text:style-name="T937">pp</text:span><text:span text:style-name="T888">, </text:span><text:span text:style-name="T937">vp, V</text:span>) = <text:span text:style-name="T891">(</text:span><text:span text:style-name="T884">(</text:span>t^<text:span text:style-name="T892">I</text:span><text:span text:style-name="T884">)</text:span> * <text:span text:style-name="T878">(</text:span><text:span text:style-name="T890">i</text:span><text:span text:style-name="T943">c</text:span><text:span text:style-name="T890"> * </text:span><text:span text:style-name="T943">cp </text:span><text:span text:style-name="T878">/ </text:span><text:span text:style-name="T867">v</text:span><text:span text:style-name="T880">p</text:span><text:span text:style-name="T881">)</text:span><text:span text:style-name="T894"> </text:span><text:span text:style-name="T877">* </text:span><text:span text:style-name="T878">(</text:span><text:span text:style-name="T869">i</text:span><text:span text:style-name="T938">p * </text:span><text:span text:style-name="T878">pp/ <text:s/></text:span><text:span text:style-name="T867">v</text:span><text:span text:style-name="T880">p</text:span><text:span text:style-name="T881">)</text:span><text:span text:style-name="T891">) </text:span>/ <text:span text:style-name="T895">V</text:span></text:p>
      <text:p text:style-name="P180"/>
      <text:p text:style-name="P180"><text:span text:style-name="T856">Now </text:span>let’s break down another simple component, the total intelligence (<text:span text:style-name="T23">I </text:span>). Which is just <text:span text:style-name="T946">(ic+ip)</text:span>:</text:p>
      <text:p text:style-name="P180"/>
      <text:p text:style-name="P180"><draw:frame draw:style-name="fr2" draw:name="Image18" text:anchor-type="char" svg:width="5.0311in" svg:height="0.802in" draw:z-index="12"><draw:image xlink:href="Pictures/10000001000001E30000004D651DD5093DD00D98.png" xlink:type="simple" xlink:show="embed" xlink:actuate="onLoad" draw:mime-type="image/png"/></draw:frame></text:p>
      <text:p text:style-name="P180"/>
      <text:p text:style-name="P159"/>
      <text:p text:style-name="P159"/>
      <text:p text:style-name="P159"/>
      <text:p text:style-name="P159">f(<text:span text:style-name="T888">t, </text:span><text:span text:style-name="T286">i</text:span><text:span text:style-name="T287">c, ip</text:span><text:span text:style-name="T888">, </text:span><text:span text:style-name="T945">ic</text:span><text:span text:style-name="T888">, </text:span><text:span text:style-name="T945">cp,</text:span><text:span text:style-name="T888"> ip, </text:span><text:span text:style-name="T937">pp</text:span><text:span text:style-name="T888">, </text:span><text:span text:style-name="T937">vp, V</text:span>) = <text:span text:style-name="T891">(</text:span><text:span text:style-name="T884">(</text:span>t^<text:span text:style-name="T287">(</text:span><text:span text:style-name="T286">i</text:span><text:span text:style-name="T287">c+ip)</text:span><text:span text:style-name="T884">)</text:span> * <text:span text:style-name="T878">(</text:span><text:span text:style-name="T890">i</text:span><text:span text:style-name="T943">c</text:span><text:span text:style-name="T890"> * </text:span><text:span text:style-name="T943">cp </text:span><text:span text:style-name="T878">/ </text:span><text:span text:style-name="T867">v</text:span><text:span text:style-name="T880">p</text:span><text:span text:style-name="T881">)</text:span><text:span text:style-name="T894"> </text:span><text:span text:style-name="T877">* </text:span><text:span text:style-name="T878">(</text:span><text:span text:style-name="T869">i</text:span><text:span text:style-name="T938">p * </text:span><text:span text:style-name="T878">pp/ <text:s/></text:span><text:span text:style-name="T867">v</text:span><text:span text:style-name="T880">p</text:span><text:span text:style-name="T881">)</text:span><text:span text:style-name="T891">) </text:span>/ <text:span text:style-name="T895">V</text:span></text:p>
      <text:p text:style-name="P159"/>
      <text:p text:style-name="P181">The <text:span text:style-name="T947">mechanics represented on </text:span><text:span text:style-name="T49">t</text:span><text:span text:style-name="T947"> ^</text:span><text:span text:style-name="T49">I</text:span><text:span text:style-name="T947"> </text:span><text:s/><text:span text:style-name="T947">are</text:span> just that how much technological advancement contributes in more efficient resource distribution is directly proportional to how intelligent people are. <text:span text:style-name="T947">And, the more intelligent people are, represented as the sum of the intelligences, <text:s/>the better they will distribute resources </text:span><text:span text:style-name="T948">to</text:span><text:span text:style-name="T947">.</text:span></text:p>
      <text:p text:style-name="P181"/>
      <text:p text:style-name="P181"><text:span text:style-name="T949">F</text:span>inally, let’s break down <text:span text:style-name="T23">V </text:span>(<text:span text:style-name="T950">amounts </text:span><text:span text:style-name="T951">of variables that </text:span><text:span text:style-name="T950">need to be handled</text:span>):</text:p>
      <text:p text:style-name="P181"/>
      <text:p text:style-name="P182">V = d * (cp + pp)</text:p>
      <text:p text:style-name="P183">d = <text:span text:style-name="T952">average number of </text:span>desires <text:span text:style-name="T953">and needs </text:span><text:span text:style-name="T952">per person</text:span></text:p>
      <text:p text:style-name="P183"/>
      <text:p text:style-name="P184">These relations highlight that, the more desires <text:span text:style-name="T954">and needs </text:span>the harder it will be to manage resources effectively to satisfy all of them. <text:span text:style-name="T955">Because that leads to a higher denominator, leading to a smaller result in the </text:span><text:span text:style-name="T930">(</text:span><text:span text:style-name="T50">v / V</text:span><text:span text:style-name="T930">)</text:span><text:span text:style-name="T955"> division.</text:span> <text:span text:style-name="T956">Furthermore</text:span>, the more people the more desires <text:span text:style-name="T957">and needs </text:span>you will <text:span text:style-name="T957">have </text:span><text:span text:style-name="T956">and the greater the denominator too</text:span>.</text:p>
      <text:p text:style-name="P184"/>
      <text:p text:style-name="P185"><text:span text:style-name="T958">Curiously, one of my previous arguments is also reflected on the equation. </text:span><text:span text:style-name="T930">For the betterment of the output</text:span> you can increase the numerator <text:span text:style-name="T955">by playing around with the factors that conform it. </text:span><text:span text:style-name="T959">And note that, just by increasing intelligence, all factors on the numerator increase. So, this is why I say that, regardless of the resource distribution protocol of preference, Cheerfulis</text:span><text:span text:style-name="T960">m</text:span><text:span text:style-name="T959"> can help.</text:span></text:p>
      <text:p text:style-name="P185"/>
      <text:p text:style-name="P186"><text:span text:style-name="T961">Like so,</text:span> the final detailed equation <text:span text:style-name="T962">results </text:span>as:</text:p>
      <text:p text:style-name="P186"/>
      <text:p text:style-name="P186"/>
      <text:p text:style-name="P186"/>
      <text:p text:style-name="P63"><text:soft-page-break/></text:p>
      <text:p text:style-name="P63"><draw:frame draw:style-name="fr1" draw:name="Image15" text:anchor-type="char" svg:x="0.5925in" svg:y="-0.0256in" svg:width="5.0728in" svg:height="1.1665in" draw:z-index="9"><draw:image xlink:href="Pictures/10000001000001E70000007046429609FD40C839.png" xlink:type="simple" xlink:show="embed" xlink:actuate="onLoad" draw:mime-type="image/png"/></draw:frame></text:p>
      <text:p text:style-name="P63"/>
      <text:p text:style-name="P63"/>
      <text:p text:style-name="P63"/>
      <text:p text:style-name="P63"/>
      <text:p text:style-name="P63"/>
      <text:p text:style-name="P63"/>
      <text:p text:style-name="P63"/>
      <text:p text:style-name="P159"><text:span text:style-name="T288">f(</text:span><text:span text:style-name="T289">t, </text:span><text:span text:style-name="T286">i</text:span><text:span text:style-name="T287">c, ip</text:span><text:span text:style-name="T289">, </text:span><text:span text:style-name="T290">ic</text:span><text:span text:style-name="T289">, </text:span><text:span text:style-name="T290">cp,</text:span><text:span text:style-name="T289"> ip, </text:span><text:span text:style-name="T291">pp</text:span><text:span text:style-name="T289">, </text:span><text:span text:style-name="T291">vp, </text:span><text:span text:style-name="T292">d</text:span><text:span text:style-name="T288">) = </text:span><text:span text:style-name="T293">(</text:span><text:span text:style-name="T286">(</text:span><text:span text:style-name="T288">t^</text:span><text:span text:style-name="T287">(</text:span><text:span text:style-name="T286">i</text:span><text:span text:style-name="T287">c+ip)</text:span><text:span text:style-name="T286">)</text:span><text:span text:style-name="T288"> * </text:span><text:span text:style-name="T294">(</text:span><text:span text:style-name="T295">i</text:span><text:span text:style-name="T296">c</text:span><text:span text:style-name="T295"> * </text:span><text:span text:style-name="T296">cp </text:span><text:span text:style-name="T294">/ </text:span><text:span text:style-name="T297">v</text:span><text:span text:style-name="T298">p</text:span><text:span text:style-name="T299">)</text:span><text:span text:style-name="T300"> </text:span><text:span text:style-name="T301">* </text:span><text:span text:style-name="T294">(</text:span><text:span text:style-name="T302">i</text:span><text:span text:style-name="T303">p * </text:span><text:span text:style-name="T294">pp/ <text:s/></text:span><text:span text:style-name="T297">v</text:span><text:span text:style-name="T298">p</text:span><text:span text:style-name="T299">)</text:span><text:span text:style-name="T293">) </text:span><text:span text:style-name="T288">/ </text:span><text:span text:style-name="T304">d * (cp + pp)</text:span></text:p>
      <text:p text:style-name="P185"/>
      <text:p text:style-name="P187">If you remember the power equation from last chapter:</text:p>
      <text:p text:style-name="P159"/>
      <text:p text:style-name="P64">f(m, y) = <text:s/>m * (1 + y)</text:p>
      <text:p text:style-name="P64"/>
      <text:p text:style-name="P65">In this equation <text:span text:style-name="T23">y</text:span><text:span text:style-name="T963"> </text:span>was how well the society managed information.</text:p>
      <text:p text:style-name="P65"/>
      <text:p text:style-name="P65">Because the better a society does this the better they can solve their problems, then the better they distribute resources. So<text:span text:style-name="T964"> we </text:span><text:span text:style-name="T965">could </text:span><text:span text:style-name="T966">substitute </text:span><text:span text:style-name="T964">the </text:span><text:span text:style-name="T51">y</text:span><text:span text:style-name="T964"> factor </text:span><text:span text:style-name="T966">for the </text:span><text:span text:style-name="T967">(</text:span><text:span text:style-name="T52">v / V</text:span><text:span text:style-name="T53">)</text:span><text:span text:style-name="T966"> one presented</text:span><text:span text:style-name="T964">.</text:span></text:p>
      <text:p text:style-name="P65"/>
      <text:p text:style-name="P65"><text:span text:style-name="T968">How to answer w</text:span><text:span text:style-name="T964">ho will win in a fight between civilizations? Just, </text:span><text:span text:style-name="T969">even if impossible today,</text:span><text:span text:style-name="T964"> somehow measure all these </text:span><text:span text:style-name="T970">variables</text:span><text:span text:style-name="T964">, represent </text:span><text:span text:style-name="T970">their </text:span><text:span text:style-name="T971">mathematical </text:span><text:span text:style-name="T970">relations </text:span><text:span text:style-name="T971">as per measured reality</text:span><text:span text:style-name="T964">, </text:span><text:span text:style-name="T971">like physics,</text:span><text:span text:style-name="T964"> and you should </text:span><text:span text:style-name="T968">get a realistic answer</text:span><text:span text:style-name="T964">. </text:span><text:span text:style-name="T972">You could even, theoretically and patiently, measure all the data, and as conflicts surge and collapse, see the relation between the data and craft the actual mathematical formula.</text:span></text:p>
      <text:p text:style-name="P65"/>
      <text:p text:style-name="P66">There is still one factor missing <text:span text:style-name="T973">though</text:span>, time. This equation can help reason through the present of a civilization, but not its future. That is what next chapter is about.</text:p>
      <text:p text:style-name="P67"/>
      <text:p text:style-name="P188"><text:span text:style-name="T974">Anyway, </text:span>here you have it. An iterative process explaining each variable so you can better understand <text:span text:style-name="T975">how </text:span><text:span text:style-name="T976">effective </text:span><text:span text:style-name="T975">resource distribution works</text:span>. You can try plug in numbers to the variables to visualize it even better. Like we did in the power dynamics chapter.</text:p>
      <text:p text:style-name="P188"/>
      <text:p text:style-name="P188"><text:span text:style-name="T977">I would like to highlight </text:span><text:span text:style-name="T978">the process </text:span><text:span text:style-name="T979">with</text:span><text:span text:style-name="T978"> which </text:span>I build this equation: I observed natural phenomena, natural facts, thought <text:span text:style-name="T980">about t</text:span><text:span text:style-name="T174">hem</text:span><text:span text:style-name="T980"> </text:span>and described their relations.</text:p>
      <text:p text:style-name="P188"/>
      <text:p text:style-name="P188"><text:span text:style-name="T981">Then </text:span>I noted the relations and the phenomena had too many parts <text:span text:style-name="T982">(</text:span><text:span text:style-name="T54">i</text:span><text:span text:style-name="T28">c</text:span><text:span text:style-name="T866">, </text:span><text:span text:style-name="T28">cp</text:span><text:span text:style-name="T983">, </text:span><text:span text:style-name="T28">ip</text:span><text:span text:style-name="T984">, </text:span><text:span text:style-name="T28">pp</text:span><text:span text:style-name="T866">,</text:span><text:span text:style-name="T28"> </text:span><text:span text:style-name="T55">t</text:span><text:span text:style-name="T985">,</text:span><text:span text:style-name="T984"> </text:span><text:span text:style-name="T982">etc). </text:span><text:span text:style-name="T986">So</text:span> I started <text:span text:style-name="T987">grouping up </text:span>the problem’<text:span text:style-name="T988">s variables</text:span> into “bigger-variables” encapsulating them. <text:span text:style-name="T977">Creating things l</text:span>ike the centralization factor, the total intelligence etc.</text:p>
      <text:p text:style-name="P188"/>
      <text:p text:style-name="P189">In the engineer’s terms, I saw a really complex system involving lots of variables. So I decided to break down the system into other smaller, still slightly complex systems, encapsulating o<text:span text:style-name="T989">n</text:span> each the <text:span text:style-name="T989">different </text:span>variables that appeared on the original one. <text:span text:style-name="T990">Like for example the </text:span><text:span text:style-name="T991">centralization</text:span><text:span text:style-name="T56"> </text:span><text:span text:style-name="T990">factor</text:span><text:span text:style-name="T991">s</text:span><text:span text:style-name="T990">.</text:span></text:p>
      <text:p text:style-name="P189"/>
      <text:p text:style-name="P190">Then I analyzed those modules and then revisited the original module of effective resource distribution to see how it would make sense for it to relate <text:span text:style-name="T992">and connect </text:span><text:span text:style-name="T993">each </text:span><text:span text:style-name="T992">of </text:span><text:span text:style-name="T993">these new </text:span>other sub-modules. <text:span text:style-name="T994">Adjusting definitions on the original system or sub-systems if necessary.</text:span></text:p>
      <text:p text:style-name="P188"/>
      <text:p text:style-name="P191">Sometimes it was better for me to focus on how to mathematically represent <text:span text:style-name="T995">a </text:span>bigger <text:span text:style-name="T996">module</text:span> first, sometimes <text:span text:style-name="T997">a </text:span>smaller <text:span text:style-name="T997">on</text:span><text:span text:style-name="T998">e</text:span>, anyway, I had to go back and forth. Define, observe, redefine, make it all make sense and not contradict <text:span text:style-name="T999">itself.</text:span> <text:span text:style-name="T1000">Via </text:span>thinking like an engineer.</text:p>
      <text:p text:style-name="P191"/>
      <text:p text:style-name="P192">Taking all <text:span text:style-name="T1001">variables on the original system</text:span>, grouping them up in <text:span text:style-name="T1001">smaller </text:span>components <text:span text:style-name="T1002">and breaking down like so the problem is smaller parts.</text:span> <text:span text:style-name="T1001">S</text:span>lowly defining, <text:span text:style-name="T1003">analyzing,</text:span> <text:span text:style-name="T1001">the </text:span>relation<text:span text:style-name="T1001">s</text:span> between the<text:span text:style-name="T1004">m</text:span>. <text:span text:style-name="T1005">Math representations </text:span>might not be the most comfortable representation for all of you. <text:span text:style-name="T1006">At least </text:span><text:span text:style-name="T1007">they work very well</text:span><text:span text:style-name="T1006"> </text:span>for me.</text:p>
      <text:p text:style-name="P192"/>
      <text:p text:style-name="P192">However when problems get complex you must be methodical, slow, thinking, go back and forth <text:span text:style-name="T1008">and have some way of easily representing that information just in case you </text:span><text:span text:style-name="T1009">can not</text:span><text:span text:style-name="T1008"> remember previous conclusions </text:span><text:span text:style-name="T1010">or relations</text:span><text:span text:style-name="T1008">. </text:span><text:span text:style-name="T1011">Simple m</text:span><text:span text:style-name="T1008">ath </text:span><text:span text:style-name="T1011">operations </text:span><text:span text:style-name="T1008">come very handy for </text:span><text:soft-page-break/><text:span text:style-name="T1008">that. </text:span><text:span text:style-name="T1012">Yet, who knows, maybe other methods fit you better, what are you waiting for? Try it out, invent better methods for yourself.</text:span></text:p>
      <text:p text:style-name="P192"/>
      <text:p text:style-name="P192"><text:span text:style-name="T1013">Regardless of how you represent it, </text:span><text:span text:style-name="T1014">please </text:span><text:span text:style-name="T1012">do it, </text:span><text:span text:style-name="T1013">learn, analyze, </text:span><text:span text:style-name="T1014">it is the only way to keep improving our world</text:span><text:span text:style-name="T1012">.</text:span></text:p>
      <text:p text:style-name="P192"/>
      <text:p text:style-name="P193">This model I created does not determine which protocol of resource distribution is best. It is build upon the simple idea of not giving anyone more stuff that he can handle. Wether politicians or citizens.</text:p>
      <text:p text:style-name="P193"/>
      <text:p text:style-name="P193">I just added this section so to have another example of imperfect, in the sense of incomplete, analysis of a system. So the reader can see how thinking truly looks like most of the time.</text:p>
      <text:p text:style-name="P193"/>
      <text:p text:style-name="P193">Usually you do not nail the truth at first try. We need the fixed variable resolution technique, revise definition, imagine new ones, connect etc etc</text:p>
      <text:p text:style-name="P193"/>
      <text:p text:style-name="P193">Notice that I have not justified my bet yet, why is libertarianism the end game? Trying to find reasons that fully explain that answer is how I created this equation that helped me organize all my thoughts and keep progressing.</text:p>
      <text:p text:style-name="P254"/>
      <text:p text:style-name="P255">||.1|-|-|1-1-1-1-1-1-|.|-|.1.1</text:p>
      <text:p text:style-name="P255"/>
      <text:p text:style-name="P256"><text:span text:style-name="T1015">Then this leads to a progressive decentralization of societies at the rhythm of the governors’ </text:span><text:span text:style-name="T1016">class</text:span><text:span text:style-name="T1015"> boredom </text:span><text:span text:style-name="T1017">tolerance</text:span><text:span text:style-name="T1015">. </text:span></text:p>
      <text:p text:style-name="P254"/>
      <text:p text:style-name="P69">Stepping aside for a second. This latter idea I had, <text:span text:style-name="T1018">the one </text:span>of societies decentralizing at the pace of the governor’s <text:span text:style-name="T1019">class</text:span> boredom tolerance, it looks kinda true. Like, most of the inventors, philosophers etc whose ideas lead to progress, <text:span text:style-name="T1020">pertained to</text:span> <text:span text:style-name="T1021">some </text:span>elite classes, “bored”, just thinking. This might just be a natural phenomena of human societies, a sociology principle. <text:span text:style-name="T1022">Anyway.</text:span></text:p>
      <text:p text:style-name="P69"/>
      <text:p text:style-name="P252">PASTED: <text:span text:style-name="T1023">maybe these, modified, should go chapter to chapter 8</text:span></text:p>
      <text:p text:style-name="P246">On feedback loops of abusive information: price and State intervention.</text:p>
      <text:p text:style-name="P253"/>
      <text:p text:style-name="P70">As <text:span text:style-name="T1024">we have seen in previous chapters, humans have a static-dynamic dilemma. We are driven by exploration and dynamism yet we require a static point of reference.</text:span></text:p>
      <text:p text:style-name="P70"/>
      <text:p text:style-name="P71">And, as we saw, what we should do to minimize abuse, <text:span text:style-name="T1025">therefore to </text:span><text:span text:style-name="T1026">optimize</text:span><text:span text:style-name="T1025"> good, </text:span>is to align those static and dynamic forces. If you want <text:span text:style-name="T1025">or need </text:span>to do something out of our dynamic needs and desires, the static force should not make it impossible.</text:p>
      <text:p text:style-name="P71"/>
      <text:p text:style-name="P72">If they do not, you are not being abused and we all live nice together.</text:p>
      <text:p text:style-name="P72"/>
      <text:p text:style-name="P242">Non-miniml I<text:span text:style-name="T1027">s</text:span> ju<text:span text:style-name="T1027">st</text:span> a<text:span text:style-name="T1028">n</text:span> incoherence on my definitions, read the following as: when to abuse edge cases.</text:p>
      <text:p text:style-name="P73">EDGE CASE <text:span text:style-name="T1029">for non-minimal abuse</text:span>: what if a minority, like 1 person is actually correct and others are not. Then, should it abuse? Theoretically: yes <text:span text:style-name="T1030">if it is a vital matter</text:span>. <text:span text:style-name="T1030">If not, then there is no way of knowing, too much variables </text:span><text:span text:style-name="T1031">(like what if poliamorous were right?)</text:span><text:span text:style-name="T1030">. </text:span><text:span text:style-name="T1032">[the </text:span><text:span text:style-name="T1033">not-</text:span><text:span text:style-name="T1032">rape principle]</text:span></text:p>
      <text:p text:style-name="P73"/>
      <text:p text:style-name="P73">In practice: it can not. <text:span text:style-name="T1034">At least a single individual. And if a group, or small groups coordinated, to some extent. (should they??? =&gt; gun-to-monkey principle) </text:span><text:span text:style-name="T1035">If vital yes, if not, well the some chaos due to revolutions (big or small), if they control okay, if not mmmm… </text:span><text:span text:style-name="T1036">Not measurable… too much variables… then… let follow</text:span><text:span text:style-name="T1035"> </text:span><text:span text:style-name="T1037">The </text:span><text:span text:style-name="T1033">not-</text:span><text:span text:style-name="T1037">rape principle: bad to do force others do stuff which is non-vital. </text:span><text:span text:style-name="T1033">Cheerfulism follows the not-rape principle.</text:span></text:p>
      <text:p text:style-name="P73"/>
      <text:p text:style-name="P74">(on peace, add security, gray perception area based on the national-entity???)</text:p>
      <text:p text:style-name="P73"/>
      <text:p text:style-name="P75">Best you can do is let them communicate the wrongness to others. Less chaotic.</text:p>
      <text:p text:style-name="P253"><text:soft-page-break/></text:p>
      <text:p text:style-name="P253"/>
      <text:p text:style-name="P260"><text:bookmark-start text:name="5.2.2.1.- Why soc or com shit at var"/><text:span text:style-name="T1">5.2.</text:span><text:span text:style-name="T6">2</text:span><text:span text:style-name="T1">.</text:span><text:span text:style-name="T7">3</text:span><text:span text:style-name="T8">.</text:span><text:span text:style-name="T1">- Why socia</text:span><text:span text:style-name="T202">lism or communism can’t handle th</text:span><text:span text:style-name="T305">ese</text:span><text:span text:style-name="T202"> variables? </text:span><text:span text:style-name="T306">Allegedly.</text:span><text:bookmark-end text:name="5.2.2.1.- Why soc or com shit at var"/></text:p>
      <text:p text:style-name="P257"/>
      <text:p text:style-name="P194"><text:span text:style-name="T202">In previous ver</text:span>sions of the book, I used the argumentation <text:span text:style-name="T1038">you will read now</text:span>. <text:span text:style-name="T1038">W</text:span>hich <text:span text:style-name="T1038">I now</text:span> think <text:span text:style-name="T1039">it </text:span>is <text:span text:style-name="T1040">incomplete </text:span><text:span text:style-name="T1038">and insufficient. B</text:span>ut I’m going to keep it so the presentation of ideas flows more smoothly to the reader.</text:p>
      <text:p text:style-name="P194"/>
      <text:p text:style-name="P194"><text:span text:style-name="T1041">Let’s invoke a </text:span><text:span text:style-name="T1042">textual</text:span><text:span text:style-name="T1041"> time traveling machine </text:span><text:span text:style-name="T1042">and read what </text:span><text:span text:style-name="T1043">I used to think </text:span><text:span text:style-name="T1040">as a complete and <text:s/>indisputable argumentation.</text:span></text:p>
      <text:p text:style-name="P194"/>
      <text:p text:style-name="P194"><text:span text:style-name="T1044">Whenever you see the word </text:span><text:span text:style-name="T20">donkey</text:span><text:span text:style-name="T1044"> <text:s/>again, we will be back to the present </text:span><text:span text:style-name="T1038">(imagine time traveling noises) </text:span><text:span text:style-name="T1043">:</text:span></text:p>
      <text:p text:style-name="P194"/>
      <text:p text:style-name="P91"><text:span text:style-name="T1045">First, </text:span><text:span text:style-name="T1046">nowadays </text:span><text:span text:style-name="T1045">s</text:span><text:span text:style-name="T1047">ometimes a human can’t </text:span><text:span text:style-name="T1048">even </text:span><text:span text:style-name="T1047">handle </text:span><text:span text:style-name="T1048">properly </text:span><text:span text:style-name="T1047">the struggles and intricacies of </text:span><text:span text:style-name="T1049">its</text:span><text:span text:style-name="T1047"> own life. The smartest of us can do it and help a few of their friends on the way. But, how </text:span><text:span text:style-name="T1050">to</text:span><text:span text:style-name="T1047"> expect a government conformed by </text:span><text:span text:style-name="T1051">a small group of </text:span><text:span text:style-name="T1047">people to be able to allocate resources </text:span><text:span text:style-name="T1045">and satisfy needs </text:span><text:span text:style-name="T1047">effectively </text:span><text:span text:style-name="T1045">for </text:span><text:span text:style-name="T1052">a</text:span><text:span text:style-name="T1045"> population way bigger than the</text:span><text:span text:style-name="T1052">m</text:span><text:span text:style-name="T1045">. T</text:span><text:span text:style-name="T1047">he amount of variables they gotta take into account </text:span><text:span text:style-name="T1051">escalates so rapidly </text:span><text:span text:style-name="T1053">that it</text:span><text:span text:style-name="T1054"> easily </text:span><text:span text:style-name="T1055">creat</text:span><text:span text:style-name="T1056">es </text:span><text:span text:style-name="T1057">unexpected, </text:span><text:span text:style-name="T1058">uncontrollable </text:span><text:span text:style-name="T1059">consequences </text:span><text:span text:style-name="T1060">with or without</text:span><text:span text:style-name="T1054"> butterfly effect</text:span><text:span text:style-name="T1061">s</text:span><text:span text:style-name="T1047">. There is just a very high chance they mess up on the try.</text:span></text:p>
      <text:p text:style-name="P91"/>
      <text:p text:style-name="P91"><text:span text:style-name="T1047">Even if th</text:span><text:span text:style-name="T1062">e</text:span><text:span text:style-name="T1063">y are</text:span><text:span text:style-name="T1062"> </text:span><text:span text:style-name="T1064">the </text:span><text:span text:style-name="T1062">smartest </text:span><text:span text:style-name="T1047">people, there is no way they can </text:span><text:span text:style-name="T1065">allocate</text:span><text:span text:style-name="T1047"> resources effectively for populations that are X times </text:span><text:span text:style-name="T1066">larger</text:span><text:span text:style-name="T1047">. </text:span><text:span text:style-name="T1067">T</text:span><text:span text:style-name="T1068">he number of variables </text:span><text:span text:style-name="T1069">doesn’t escalate linearly, </text:span><text:span text:style-name="T1070">nor</text:span><text:span text:style-name="T1069"> quadratically, it escalates, at least, cubically. </text:span><text:span text:style-name="T1071">B</text:span><text:span text:style-name="T1065">ecause </text:span><text:span text:style-name="T1072">desires and needs are influence</text:span><text:span text:style-name="T1073">d</text:span><text:span text:style-name="T1072"> by lots of ever changing facto</text:span><text:span text:style-name="T1074">rs</text:span><text:span text:style-name="T1069">.</text:span></text:p>
      <text:p text:style-name="P91"/>
      <text:p text:style-name="P91"><text:span text:style-name="T1075">Then increase the </text:span><text:span text:style-name="T1076">S</text:span><text:span text:style-name="T1075">tate’</text:span><text:span text:style-name="T1076">s</text:span><text:span text:style-name="T1075"> size you might be thinking, but at this point, if most of the population are the </text:span><text:span text:style-name="T1076">S</text:span><text:span text:style-name="T1075">tate and </text:span><text:span text:style-name="T1077">have the power to take </text:span><text:span text:style-name="T1075">decisions </text:span><text:span text:style-name="T1067">on how to handle their resources, </text:span><text:span text:style-name="T1078">then</text:span><text:span text:style-name="T1067"> we end up in </text:span><text:span text:style-name="T1079">libertarianism, </text:span><text:span text:style-name="T1080">don’t we?</text:span></text:p>
      <text:p text:style-name="P91"/>
      <text:p text:style-name="P91"><text:span text:style-name="T307">I will d</text:span><text:span text:style-name="T1081">evelop this further in a bit but this is the essence on why socialism and communism are always so inefficient </text:span><text:span text:style-name="T1082">compared to libertarianism. </text:span><text:span text:style-name="T1083">They assign to</text:span><text:span text:style-name="T1084">o</text:span><text:span text:style-name="T1083"> many variables to a reduced group of humans who can’t, biologically </text:span><text:span text:style-name="T1085">and technolog</text:span><text:span text:style-name="T1086">i</text:span><text:span text:style-name="T1085">cally</text:span><text:span text:style-name="T1083">, handle them. </text:span><text:span text:style-name="T1087">Leading to </text:span><text:span text:style-name="T1088">bad </text:span><text:span text:style-name="T1089">or less good</text:span><text:span text:style-name="T1088"> outcomes</text:span><text:span text:style-name="T1087">.</text:span></text:p>
      <text:p text:style-name="P248"/>
      <text:p text:style-name="P261"><text:span text:style-name="T9">Old section: </text:span><text:bookmark-start text:name="5.2.2.2.- Libertarianism var cool"/><text:span text:style-name="T1">5.2.</text:span><text:span text:style-name="T6">2</text:span>.<text:span text:style-name="T1090">2.</text:span>- Why does libertarianism handle this issue way <text:span text:style-name="T1091">much</text:span> <text:span text:style-name="T1092">more </text:span>gracefully?<text:bookmark-end text:name="5.2.2.2.- Libertarianism var cool"/></text:p>
      <text:p text:style-name="P249"/>
      <text:p text:style-name="P195">Libertarianism breaks down the responsibility of handling variables to the smallest size, the individual. So as long as the individuals are intelligent enough to organize their life with their neighbors, it will work out.</text:p>
      <text:p text:style-name="P195"/>
      <text:p text:style-name="P195"><text:span text:style-name="T1093">Libertarianism </text:span><text:span text:style-name="T1094">distributes all variables in a more even way. </text:span><text:span text:style-name="T1095">Giving </text:span><text:span text:style-name="T1093">each human </text:span><text:span text:style-name="T1095">holding </text:span><text:span text:style-name="T1096">the S</text:span><text:span text:style-name="T1094">tate’</text:span><text:span text:style-name="T1096">s</text:span><text:span text:style-name="T1094"> power </text:span><text:span text:style-name="T1093">the minimum amount of variables to handle when distributing its resources. </text:span><text:span text:style-name="T1097">T</text:span><text:span text:style-name="T1093">hus there is </text:span><text:span text:style-name="T1098">the highest </text:span><text:span text:style-name="T1093">likelihood for </text:span><text:span text:style-name="T1098">each </text:span><text:span text:style-name="T1099">public worker</text:span><text:span text:style-name="T1093"> to be successful </text:span><text:span text:style-name="T1100">managing them. A</text:span><text:span text:style-name="T1098">s it has been assigned the </text:span><text:span text:style-name="T1093">small</text:span><text:span text:style-name="T1097">est </text:span><text:span text:style-name="T1098">amount of variables possible by default.</text:span></text:p>
      <text:p text:style-name="P195"/>
      <text:p text:style-name="P196"><text:span text:style-name="T1099">From the citizen level, it does increase the amount </text:span><text:span text:style-name="T1101">of variables </text:span><text:span text:style-name="T1099">they must handle compared to a more centralized statist protocol. Then, s</text:span>ome individuals <text:span text:style-name="T1102">will</text:span> be capable, some won’t. <text:span text:style-name="T1103">So </text:span><text:span text:style-name="T1104">the more intelligent each citizen is, the higher the likelihood </text:span><text:span text:style-name="T1105">of a case where </text:span><text:span text:style-name="T1104">the citizen will handle the variables correctly.</text:span></text:p>
      <text:p text:style-name="P196"/>
      <text:p text:style-name="P196"><text:span text:style-name="T1106">In </text:span><text:span text:style-name="T1107">the</text:span><text:span text:style-name="T1106"> general picture, and as per recent history,</text:span> <text:span text:style-name="T23">the likelihood of success </text:span><text:span text:style-name="T57">per individual, </text:span><text:span text:style-name="T58">wether with or without institutional </text:span><text:span text:style-name="T57">power,</text:span><text:span text:style-name="T1108"> </text:span>is <text:span text:style-name="T1109">higher</text:span> <text:span text:style-name="T1106">in more decentralized </text:span><text:span text:style-name="T1110">protocols.</text:span> <text:span text:style-name="T1111">Resulting in</text:span><text:span text:style-name="T1112">, on </text:span><text:span text:style-name="T1113">mathematical </text:span><text:span text:style-name="T1112">tendenc</text:span><text:span text:style-name="T1114">ies </text:span><text:span text:style-name="T1112">terms, libertarianism succeed</text:span><text:span text:style-name="T1115">ing </text:span><text:span text:style-name="T1116">further</text:span><text:span text:style-name="T1115"> than </text:span><text:span text:style-name="T1112">socialism or communism.</text:span></text:p>
      <text:p text:style-name="P196"/>
      <text:p text:style-name="P197"><text:span text:style-name="T1117">For</text:span> now <text:span text:style-name="T1117">it is </text:span>indisputable that <text:span text:style-name="T1118">decentralized protocols</text:span> tend to have greater growth, whether it is sustainable is another question, but it is indisputable they do have better growth within the <text:soft-page-break/>recent history. <text:span text:style-name="T1118">Why? Because people in these protocols were intelligent enough, using their biology and technology, to handle the variables, </text:span><text:span text:style-name="T1119">a.k.a. manage the information, so as to</text:span><text:span text:style-name="T1120"> solve </text:span><text:span text:style-name="T1119">their </text:span><text:span text:style-name="T1120">problems</text:span><text:span text:style-name="T1118">.</text:span></text:p>
      <text:p text:style-name="P197"/>
      <text:p text:style-name="P198">More centralized protocols did not do that good, or even did bad, <text:span text:style-name="T1117">mainly because of leaving complex problems, a.k.a. too </text:span><text:span text:style-name="T1121">many</text:span><text:span text:style-name="T1117"> variables, to a limited amount of people. </text:span><text:span text:style-name="T854">S</text:span>o they could not solve problems as fast or as well as other <text:span text:style-name="T1122">more </text:span>decentralized nations.</text:p>
      <text:p text:style-name="P198"/>
      <text:p text:style-name="P154">Yet do not be an innocent <text:span text:style-name="T1123">and believe everything I write</text:span>, libertarianism is not perfect. More on this <text:span text:style-name="T1124">in a bit</text:span><text:span text:style-name="T151">.</text:span></text:p>
      <text:p text:style-name="P154"/>
      <text:p text:style-name="P223"><text:span text:style-name="T18">d</text:span><text:span text:style-name="T16">onkey</text:span>.</text:p>
      <text:p text:style-name="P199"/>
      <text:p text:style-name="P199">Can you come up with a question that makes this whole argumentation shake? I encourage you to think about it. <text:span text:style-name="T1123">I</text:span>f not here is the question I <text:span text:style-name="T1125">asked myself</text:span>:</text:p>
      <text:p text:style-name="P199"/>
      <text:p text:style-name="P199">Wait, aren’t big <text:span text:style-name="T1126">private </text:span>corporations a smaller set of people who manage resource<text:span text:style-name="T1127">s</text:span> for sets of people way lager than themselves? <text:span text:style-name="T1127">And they, allegedly, are successful at it. In the sense that people can be content and consume their products or services willingly.</text:span></text:p>
      <text:p text:style-name="P199"/>
      <text:p text:style-name="P200">Therefore, the argumentation that a centralized and small group of people in a public institution can not efficiently distribute resources due to its <text:span text:style-name="T1128">small</text:span> size starts feeling off.</text:p>
      <text:p text:style-name="P200"/>
      <text:p text:style-name="P200">Yet, it has some element of truth, the size of <text:span text:style-name="T1129">a </text:span>dominant group clearly affects its capability to coordinate and influence other groups. <text:span text:style-name="T1130">Ease to see in this mental exercise: </text:span>If a large worldwide modern corporation suddenly had half of its members, their services <text:span text:style-name="T1129">likely </text:span>become infeas<text:span text:style-name="T1131">i</text:span>ble.</text:p>
      <text:p text:style-name="P200"/>
      <text:p text:style-name="P201">So I kept thinking. Combining my knowledge <text:span text:style-name="T1132">(fixed variables) </text:span>and the artistic part of thinking <text:span text:style-name="T1132">like</text:span> an engineer I felt like there has to be, at least, one more basic principle of human organizations I’m missing. This system can be broken down in other more fundamental ones.</text:p>
      <text:p text:style-name="P201"/>
      <text:p text:style-name="P202">My first hunch was pointing at power. The reduced group of public people can use all sorts of power to do as they please. If we assume anything more centralized than a perfect democracy, <text:span text:style-name="T1133">like oligarcracies or dictatorships,</text:span> we can see that gaps appear, bigger or smaller, where abusive traits can be used by the smaller group to abuse the bigger group they work for, <text:span text:style-name="T1134">tutor, </text:span><text:s/>or maybe enslave.</text:p>
      <text:p text:style-name="P202"/>
      <text:p text:style-name="P202">The private groups <text:span text:style-name="T1135">don’t have “raw power”</text:span>, due to their lack fo physical army, <text:span text:style-name="T1136">they</text:span> must abide by the law most of the time, or at least they must seduce it. <text:span text:style-name="T1137">A.k.a. corrupt it.</text:span></text:p>
      <text:p text:style-name="P202"/>
      <text:p text:style-name="P203">Are th<text:span text:style-name="T1133">ese</text:span> gaps of abuse, which, as explained earlier, even if they benefit the abuser, they <text:s/>overall do not really <text:span text:style-name="T1138">accelerate</text:span> the <text:span text:style-name="T1139">thriving</text:span> of the species, a nice understanding and complement to the critique? <text:span text:style-name="T1140">Is allowing a non-minimal State size (socialism) leading to the more frequent appearance of th</text:span><text:span text:style-name="T1141">ese</text:span><text:span text:style-name="T1140"> </text:span><text:span text:style-name="T308">arbitrage opportunities </text:span><text:span text:style-name="T309">of </text:span><text:span text:style-name="T310">power </text:span><text:span text:style-name="T308">abuse?</text:span></text:p>
      <text:p text:style-name="P76"/>
      <text:p text:style-name="P77">Taking a more libertarian <text:span text:style-name="T1142">starting </text:span>approach <text:span text:style-name="T1142">to destroy the argumentation</text:span>, some people would argue that the private smaller groups are better because of competition. The free market allows only the fittest group<text:span text:style-name="T1143">s</text:span> <text:span text:style-name="T1143">to survive</text:span>, the one<text:span text:style-name="T1143">s</text:span> who serve “better” the interest of the consumer. And, because public institutions have no competing agent, due to their monopoly of violence, they have no continuous<text:span text:style-name="T1144"> </text:span>incentive to make things better. Therefore, when we create a public institution we are letting ourselves be dependent on which mood the bureaucrat woke up with <text:span text:style-name="T1145">that day</text:span>, willing to improve society and work as hard as he can? Or feeling lazy and conformist?</text:p>
      <text:p text:style-name="P77"/>
      <text:p text:style-name="P77"><text:span text:style-name="T1146">This, at least, until the threat of new elections, if we assume </text:span><text:span text:style-name="T1147">the presence of a voting</text:span><text:span text:style-name="T1146"> system </text:span><text:span text:style-name="T1148">with a decent set of competitors</text:span><text:span text:style-name="T1146">. </text:span><text:span text:style-name="T1149">Or the threat of other States from other countries trying to seduce their citizens to </text:span><text:span text:style-name="T1150">immigrate</text:span><text:span text:style-name="T1149"> to theirs because of better conditions. </text:span><text:span text:style-name="T1151">Or maybe other States trying to create defamation campaigns to destabilize the country and gain a competitive advantage over them. </text:span><text:span text:style-name="T1152">Or even conquering them. </text:span><text:span text:style-name="T1153">External nations also create natural competition in the market of power. However, f</text:span><text:span text:style-name="T1149">or initial simplicity, let’s also assume there is just one country in the world.</text:span></text:p>
      <text:p text:style-name="P77"><text:soft-page-break/></text:p>
      <text:p text:style-name="P78"><text:span text:style-name="T1149">In a single country context, t</text:span>he principle is that, if the institution under-performs, and the people notice, allegedly in a <text:span text:style-name="T1154">system with voting</text:span>, people will vote them out <text:span text:style-name="T1155">in the next election</text:span>. <text:span text:style-name="T1156">Therefore, the “threat” of elections should incentivize lesser corruption.</text:span></text:p>
      <text:p text:style-name="P78"/>
      <text:p text:style-name="P204"><text:span text:style-name="T202">Elections are every X years, usually 4, so the feedback loop of adaptation to inefficiencies is way slower than in the market. </text:span><text:span text:style-name="T311">I</text:span><text:span text:style-name="T202">n the, allegedly, free flow of money. If a</text:span> merchant’s product is jut not worth it, the people stop buying it tomorrow, right away, not in <text:span text:style-name="T1157">X</text:span> years from then. <text:span text:style-name="T1157">And then, the merchant either improves and becomes useful again, or the business disap</text:span><text:span text:style-name="T1142">p</text:span><text:span text:style-name="T1157">ears.</text:span></text:p>
      <text:p text:style-name="P204"/>
      <text:p text:style-name="P205">But as explored, as per biological principles, we do need some degree of stability and static-ness to function as organisms. <text:span text:style-name="T1158">Therefore we can’t just let the elections be every month, every week, or even </text:span><text:span text:style-name="T1159">be</text:span><text:span text:style-name="T1158"> about every single small decision some institution has to make.</text:span></text:p>
      <text:p text:style-name="P205"/>
      <text:p text:style-name="P206">Our brains can’t be just voting every day and/or about everything instead of working or enjoying life, which <text:span text:style-name="T1160">are</text:span> <text:span text:style-name="T1160">things </text:span>we must do at a biological level.</text:p>
      <text:p text:style-name="P205"/>
      <text:p text:style-name="P206">Here is where power and economics mix. And if we want to understand and reach deeper principles we must abstract ourselves from both, because otherwise we will always be missing some part of the picture. <text:span text:style-name="T1161">The perspective of a one-eyed </text:span><text:span text:style-name="T1162">human</text:span><text:span text:style-name="T1161">.</text:span></text:p>
      <text:p text:style-name="P204"/>
      <text:p text:style-name="P207">And <text:span text:style-name="T1158">precisely </text:span>here, I will stop this section, for now. <text:span text:style-name="T1163">I want to keep explaining more thoughts on these topics, </text:span><text:span text:style-name="T1164">I feel incapable of reaching convincing explanations, for myself and for others, using </text:span><text:span text:style-name="T1163">current modern </text:span><text:span text:style-name="T1164">political and economical </text:span><text:span text:style-name="T1163">concepts. I first need to explain to you more ideas in order to actually and properly answer the question of: why is libertarianism </text:span><text:span text:style-name="T1165">theoretically</text:span><text:span text:style-name="T1163"> better than any other protocol?</text:span></text:p>
      <text:p text:style-name="P208"/>
      <text:p text:style-name="P68">Now, let’s keep understanding.</text:p>
      <text:p text:style-name="P68"/>
      <text:p text:style-name="P299">///// <text:span text:style-name="T1202">THINK ABOUT LATER, MAYBE SOME SMALL PHRASING IS HELPFUL</text:span></text:p>
      <text:p text:style-name="P299"/>
      <text:p text:style-name="P304">12.1.10.- Isn’t the minimization of abuse the maximization of happiness? <text:span text:style-name="T1206">What is actually the optimization of happiness?</text:span></text:p>
      <text:p text:style-name="P304"/>
      <text:p text:style-name="P301">No bcs less abuse is less evil and more good, more good is subjective, not more good is more drug for me, but more good as individual defines, but individual has max intel so we are not just maximizing drug consumption and lust control when we minimize abuse in institutions, but we are maximizing everyone’s ability to do good, as per what their own intelligent thinks the diretion of that is. That is why I keep insisting in maximizing happiness</text:p>
      <text:p text:style-name="P305"/>
      <text:p text:style-name="P302"><text:span text:style-name="T1207">RELATED????:::: </text:span>As we have seen, a social institution is a power organization to aim to satisfy as much desires possible for the society it governs for or over. <text:span text:style-name="T1208">We have also seen that for people to live happy live abuse must be the minimal. The only way to minimize abuse is to maximize everyone’s intelligence, and even in that case, that is just a minimization.</text:span></text:p>
      <text:p text:style-name="P303"/>
      <text:p text:style-name="P300">Therefore, if someone is just intelligent and powerful enough it will abuse. Therefore if we leave powerful positions to technocrats without democratic mechanisms they will abuse with higher frequency than not as intelligent individuals. <text:span text:style-name="T1203">So, an oligarchy o</text:span><text:span text:style-name="T1204">f</text:span><text:span text:style-name="T1203"> technocrats is not what we need to live the happiest of lives. But as per human nature observed, happiness is optimized, not maximized. So this observation still aligns with human nature. </text:span><text:span text:style-name="T1205">Maybe we do need some sacrifice on the chance of a technocrat abusing sometimes in order to organize society better. In the same way we not always as individuals must seek immediate happiness responses or we must do something that is at first glance bad for u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5T23:48:43.495012426</meta:creation-date>
    <dc:date>2026-02-06T20:50:25.945041596</dc:date>
    <meta:editing-duration>P1DT19H11M27S</meta:editing-duration>
    <meta:editing-cycles>11</meta:editing-cycles>
    <meta:generator>LibreOffice/7.3.7.2$Linux_X86_64 LibreOffice_project/30$Build-2</meta:generator>
    <meta:document-statistic meta:table-count="0" meta:image-count="13" meta:object-count="0" meta:page-count="25" meta:paragraph-count="320" meta:word-count="14267" meta:character-count="83851" meta:non-whitespace-character-count="69873"/>
  </office:meta>
</office:document-meta>
</file>